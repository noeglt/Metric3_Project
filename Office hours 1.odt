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e4d" officeooo:paragraph-rsid="00105e4d"/>
    </style:style>
    <style:style style:name="P2" style:family="paragraph" style:parent-style-name="Standard">
      <style:text-properties officeooo:rsid="00105e4d" officeooo:paragraph-rsid="00105e4d"/>
    </style:style>
    <style:style style:name="P3" style:family="paragraph" style:parent-style-name="Standard">
      <style:text-properties officeooo:rsid="00124452" officeooo:paragraph-rsid="00124452"/>
    </style:style>
    <style:style style:name="P4" style:family="paragraph" style:parent-style-name="Standard">
      <style:text-properties officeooo:rsid="0013d6bf" officeooo:paragraph-rsid="0013d6bf"/>
    </style:style>
    <style:style style:name="P5" style:family="paragraph" style:parent-style-name="Standard">
      <style:text-properties officeooo:rsid="0013d6bf" officeooo:paragraph-rsid="0015b44c"/>
    </style:style>
    <style:style style:name="P6" style:family="paragraph" style:parent-style-name="Standard">
      <style:text-properties officeooo:rsid="0015b44c" officeooo:paragraph-rsid="0015b44c"/>
    </style:style>
    <style:style style:name="P7" style:family="paragraph" style:parent-style-name="Standard">
      <style:text-properties officeooo:rsid="001803a7" officeooo:paragraph-rsid="001803a7"/>
    </style:style>
    <style:style style:name="T1" style:family="text">
      <style:text-properties officeooo:rsid="001665a3"/>
    </style:style>
    <style:style style:name="T2" style:family="text">
      <style:text-properties officeooo:rsid="0016dd77"/>
    </style:style>
    <style:style style:name="T3" style:family="text">
      <style:text-properties officeooo:rsid="00180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 : </text:p>
      <text:p text:style-name="P1">-unit roots… but not for all variables right ?</text:p>
      <text:p text:style-name="P1">-Extensions : run tests, question of dates, see if the main results continue to hold. </text:p>
      <text:p text:style-name="P1">-Question of the data availability </text:p>
      <text:p text:style-name="P1">-Replication : only the VAR part, right ?</text:p>
      <text:p text:style-name="P3">Question of the bootstrapping</text:p>
      <text:p text:style-name="P3"/>
      <text:p text:style-name="P4">Use the same window of time, same data. </text:p>
      <text:p text:style-name="P4"/>
      <text:p text:style-name="P4">Unit root tests, stationarity tests, </text:p>
      <text:p text:style-name="P4">IRS tests </text:p>
      <text:p text:style-name="P4"/>
      <text:p text:style-name="P5">lag order selection BIC. BIC penalizes the most ? Then Hannan Quinn </text:p>
      <text:p text:style-name="P4"/>
      <text:p text:style-name="P4">estimate the VAR : stability </text:p>
      <text:p text:style-name="P4"/>
      <text:p text:style-name="P4">check the residuals : behave roughly like white noise : its fine. Otherwise go to a higher order lag </text:p>
      <text:p text:style-name="P1"/>
      <text:p text:style-name="P6">forecast error variance </text:p>
      <text:p text:style-name="P6"/>
      <text:p text:style-name="P6">Extension : </text:p>
      <text:p text:style-name="P6">-Chronological (cut it before COVID?)</text:p>
      <text:p text:style-name="P6">-Run the full exercise </text:p>
      <text:p text:style-name="P6">full sample, subsample</text:p>
      <text:p text:style-name="P6">-<text:span text:style-name="T1">Extra variable (regarder ce que Kilian exclut)</text:span></text:p>
      <text:p text:style-name="P6">-<text:span text:style-name="T2">different economies</text:span></text:p>
      <text:p text:style-name="P6">-<text:span text:style-name="T3">new economic question </text:span></text:p>
      <text:p text:style-name="P6"/>
      <text:p text:style-name="P7">bootstrap</text:p>
      <text:p text:style-name="P7"/>
      <text:p text:style-name="P7">Report : </text:p>
      <text:p text:style-name="P7">-Replication</text:p>
      <text:p text:style-name="P7"><text:tab/>report</text:p>
      <text:p text:style-name="P7">-Extension</text:p>
      <text:p text:style-name="P7"><text:tab/>report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onyme</meta:initial-creator>
    <meta:creation-date>2026-04-23T14:10:21.574000000</meta:creation-date>
    <dc:date>2026-05-05T12:54:55.022000000</dc:date>
    <dc:creator>Anonyme</dc:creator>
    <meta:editing-duration>P10DT22H22M17S</meta:editing-duration>
    <meta:editing-cycles>6</meta:editing-cycles>
    <meta:generator>LibreOffice/7.3.4.2$Windows_x86 LibreOffice_project/728fec16bd5f605073805c3c9e7c4212a0120dc5</meta:generator>
    <meta:document-statistic meta:table-count="0" meta:image-count="0" meta:object-count="0" meta:page-count="1" meta:paragraph-count="26" meta:word-count="130" meta:character-count="796" meta:non-whitespace-character-count="676"/>
  </office:meta>
</office:document-meta>
</file>