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onyme</meta:initial-creator>
    <meta:creation-date>2026-05-13T14:20:35.78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4.2$Windows_x86 LibreOffice_project/728fec16bd5f605073805c3c9e7c4212a0120dc5</meta:generator>
  </office:meta>
</office:document-meta>
</file>