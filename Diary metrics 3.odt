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style:line-height-at-least="0.344cm" fo:orphans="2" fo:widows="2" fo:text-indent="0cm" style:auto-text-indent="false"/>
      <style:text-properties fo:font-variant="normal" fo:text-transform="none" fo:color="#222222" loext:opacity="100%" style:font-name="Arial" fo:font-size="12pt" fo:letter-spacing="normal" fo:font-style="normal" fo:font-weight="normal" officeooo:paragraph-rsid="00067b61"/>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officeooo:paragraph-rsid="0008a9d2"/>
    </style:style>
    <style:style style:name="P4" style:family="paragraph" style:parent-style-name="Text_20_body">
      <style:paragraph-properties fo:margin-left="0cm" fo:margin-right="0cm" fo:orphans="2" fo:widows="2" fo:text-indent="0cm" style:auto-text-indent="false"/>
      <style:text-properties officeooo:paragraph-rsid="0008a9d2"/>
    </style:style>
    <style:style style:name="P5"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style:font-name="Arial" fo:font-size="12pt" fo:letter-spacing="normal" fo:font-style="normal" fo:font-weight="normal" officeooo:rsid="001e66c8"/>
    </style:style>
    <style:style style:name="T3" style:family="text">
      <style:text-properties fo:font-weight="bold" style:font-weight-asian="bold" style:font-weight-complex="bold"/>
    </style:style>
    <style:style style:name="T4" style:family="text">
      <style:text-properties officeooo:rsid="000d83c2"/>
    </style:style>
    <style:style style:name="T5" style:family="text">
      <style:text-properties officeooo:rsid="000eec7c"/>
    </style:style>
    <style:style style:name="T6" style:family="text">
      <style:text-properties officeooo:rsid="000f4e33"/>
    </style:style>
    <style:style style:name="T7" style:family="text">
      <style:text-properties officeooo:rsid="0010a3e9"/>
    </style:style>
    <style:style style:name="T8" style:family="text">
      <style:text-properties officeooo:rsid="0012108f"/>
    </style:style>
    <style:style style:name="T9" style:family="text">
      <style:text-properties officeooo:rsid="0011564e"/>
    </style:style>
    <style:style style:name="T10" style:family="text">
      <style:text-properties officeooo:rsid="0012356b"/>
    </style:style>
    <style:style style:name="T11" style:family="text">
      <style:text-properties officeooo:rsid="00158ded"/>
    </style:style>
    <style:style style:name="T12" style:family="text">
      <style:text-properties officeooo:rsid="0015b56a"/>
    </style:style>
    <style:style style:name="T13" style:family="text">
      <style:text-properties officeooo:rsid="00163554"/>
    </style:style>
    <style:style style:name="T14" style:family="text">
      <style:text-properties officeooo:rsid="00190551"/>
    </style:style>
    <style:style style:name="T15" style:family="text">
      <style:text-properties officeooo:rsid="001a3da0"/>
    </style:style>
    <style:style style:name="T16" style:family="text">
      <style:text-properties officeooo:rsid="001da356"/>
    </style:style>
    <style:style style:name="T17" style:family="text">
      <style:text-properties officeooo:rsid="0017d15c"/>
    </style:style>
    <style:style style:name="T18" style:family="text">
      <style:text-properties officeooo:rsid="001e66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We have a problem for 1973 data on importing oil prices in the US. Data is harmonized only since 1974. Kilian does not really explain how he gets 1973 data, so we simply extrapolated using various sources on the 1973 shocks (3.5 dollars a gallon in january, linear increase to 4.5 in octobre, then jumb to 9 in december). It’s quite cheap but it’s not the goal of the exercise</text:p>
      <text:p text:style-name="P1"/>
      <text:p text:style-name="P1">- The three tests agree on the fact that the index and real prices are not stationary. We can differentiate real prices <text:span text:style-name="T18">without loss of interpretability (growth rates), but we don’t do itr</text:span></text:p>
      <text:p text:style-name="P2"/>
      <text:p text:style-name="P2">- data cleaning OK</text:p>
      <text:p text:style-name="P2">- Stationarity tests : three tests reject stationarity for index and price (no problem for growth). Price is differentiable without loss of interpretability, that’s what we do. We can’t do the same with the index that is already logged and linearly detrended</text:p>
      <text:p text:style-name="P3">We re run the tests, no problem for growth and delta real price oil.</text:p>
      <text:p text:style-name="P4"><text:span text:style-name="T1">-Lag order selection. Between 2 and 3 according to the tests. Because Kilian chose 24, we will stick with </text:span><text:span text:style-name="T2">24</text:span></text:p>
      <text:p text:style-name="P5"/>
      <text:p text:style-name="P2">growth real price : 0.47 o’der 1, -0.12 order 2</text:p>
      <text:p text:style-name="P5"/>
      <text:p text:style-name="P2">growth prod : -0.1 order 1, otherwise not significant</text:p>
      <text:p text:style-name="P5"/>
      <text:p text:style-name="P2">growth index : 1.2 (not stationary it’s big shit) order 1 ; -0.3 order 2</text:p>
      <text:p text:style-name="P5"/>
      <text:p text:style-name="P2">Correlations are not significant</text:p>
      <text:p text:style-name="P5"/>
      <text:p text:style-name="P2">Stability tests :</text:p>
      <text:p text:style-name="P5"/>
      <text:p text:style-name="P2">max modulus 0,976 very very persistent data</text:p>
      <text:p text:style-name="P5"/>
      <text:p text:style-name="P2">normality is rejected and we have autocorrelation</text:p>
      <text:p text:style-name="P5"/>
      <text:p text:style-name="P2"><text:span text:style-name="T3">IRFs</text:span> : <text:span text:style-name="T4">due to the non-stationnarity of level variables, we transform them into growth rates, except for the index. </text:span><text:span text:style-name="T5">However, we needed to create cumulate_irf function to yield interpretable results → </text:span><text:span text:style-name="T6">in fact, we recover level changes </text:span><text:span text:style-name="T7">at time </text:span><text:span text:style-name="T8">t</text:span><text:span text:style-name="T6"> following shocks by summing over changes in growth rates </text:span><text:span text:style-name="T9">over t =0 up to </text:span><text:span text:style-name="T10">period t. </text:span><text:span text:style-name="T11">This allows us to obtain analogue IRFs to Killian (2009), whereas the IRFs in terms of growth ranges </text:span><text:span text:style-name="T12">could not be interpreted at face value </text:span><text:span text:style-name="T13">(</text:span><text:span text:style-name="T14">but</text:span><text:span text:style-name="T13"> for the </text:span><text:span text:style-name="T15">Killian </text:span><text:span text:style-name="T13">index, hence the fact </text:span><text:span text:style-name="T16">it </text:span><text:span text:style-name="T13">is not included in the cumsum function</text:span><text:span text:style-name="T17">).</text:span></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onyme</meta:initial-creator>
    <meta:creation-date>2026-05-13T14:20:35.783000000</meta:creation-date>
    <meta:generator>LibreOffice/7.3.4.2$Windows_x86 LibreOffice_project/728fec16bd5f605073805c3c9e7c4212a0120dc5</meta:generator>
    <dc:date>2026-05-18T13:42:24.802000000</dc:date>
    <meta:editing-duration>PT8M55S</meta:editing-duration>
    <meta:editing-cycles>23</meta:editing-cycles>
    <dc:creator>Anonyme</dc:creator>
    <meta:document-statistic meta:table-count="0" meta:image-count="0" meta:object-count="0" meta:page-count="2" meta:paragraph-count="14" meta:word-count="336" meta:character-count="1883" meta:non-whitespace-character-count="1561"/>
  </office:meta>
</office:document-meta>
</file>