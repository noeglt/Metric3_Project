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3.574cm" svg:height="13.288cm" svg:x="15.163cm" svg:y="0.108cm">
            <draw:object draw:notify-on-update-of-ranges="Feuille1.B1:Feuille1.B419 Feuille1.C1:Feuille1.C419 Feuille1.D1:Feuille1.D4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Jaune = prix</text:p>
          </table:table-cell>
          <table:table-cell office:value-type="float" office:value="11.877264" calcext:value-type="float">
            <text:p>1,19E+01</text:p>
          </table:table-cell>
          <table:table-cell office:value-type="float" office:value="36.064235" calcext:value-type="float">
            <text:p>3,61E+01</text:p>
          </table:table-cell>
          <table:table-cell office:value-type="float" office:value="-47.999534" calcext:value-type="float">
            <text:p>-4,80E+01</text:p>
          </table:table-cell>
        </table:table-row>
        <table:table-row table:style-name="ro1">
          <table:table-cell office:value-type="string" calcext:value-type="string">
            <text:p>Bleu = production</text:p>
          </table:table-cell>
          <table:table-cell office:value-type="float" office:value="1.4191496" calcext:value-type="float">
            <text:p>1,42E+00</text:p>
          </table:table-cell>
          <table:table-cell office:value-type="float" office:value="41.527016" calcext:value-type="float">
            <text:p>4,15E+01</text:p>
          </table:table-cell>
          <table:table-cell office:value-type="float" office:value="-48.286474" calcext:value-type="float">
            <text:p>-4,83E+01</text:p>
          </table:table-cell>
        </table:table-row>
        <table:table-row table:style-name="ro1">
          <table:table-cell office:value-type="string" calcext:value-type="string">
            <text:p>orange index</text:p>
          </table:table-cell>
          <table:table-cell office:value-type="float" office:value="1.1777108" calcext:value-type="float">
            <text:p>1,18E+00</text:p>
          </table:table-cell>
          <table:table-cell office:value-type="float" office:value="43.99125" calcext:value-type="float">
            <text:p>4,40E+01</text:p>
          </table:table-cell>
          <table:table-cell office:value-type="float" office:value="-47.0825" calcext:value-type="float">
            <text:p>-4,71E+01</text:p>
          </table:table-cell>
        </table:table-row>
        <table:table-row table:style-name="ro1">
          <table:table-cell/>
          <table:table-cell office:value-type="float" office:value="27.455136" calcext:value-type="float">
            <text:p>2,75E+01</text:p>
          </table:table-cell>
          <table:table-cell office:value-type="float" office:value="48.105889" calcext:value-type="float">
            <text:p>4,81E+01</text:p>
          </table:table-cell>
          <table:table-cell office:value-type="float" office:value="-43.857651" calcext:value-type="float">
            <text:p>-4,39E+01</text:p>
          </table:table-cell>
        </table:table-row>
        <table:table-row table:style-name="ro1">
          <table:table-cell office:value-type="string" calcext:value-type="string">
            <text:p>b prod</text:p>
          </table:table-cell>
          <table:table-cell office:value-type="float" office:value="-13.110436" calcext:value-type="float">
            <text:p>-1,31E+01</text:p>
          </table:table-cell>
          <table:table-cell office:value-type="float" office:value="52.033462" calcext:value-type="float">
            <text:p>5,20E+01</text:p>
          </table:table-cell>
          <table:table-cell office:value-type="float" office:value="-41.571063" calcext:value-type="float">
            <text:p>-4,16E+01</text:p>
          </table:table-cell>
        </table:table-row>
        <table:table-row table:style-name="ro1">
          <table:table-cell office:value-type="string" calcext:value-type="string">
            <text:p>c index</text:p>
          </table:table-cell>
          <table:table-cell office:value-type="float" office:value="36.258073" calcext:value-type="float">
            <text:p>3,63E+01</text:p>
          </table:table-cell>
          <table:table-cell office:value-type="float" office:value="52.942861" calcext:value-type="float">
            <text:p>5,29E+01</text:p>
          </table:table-cell>
          <table:table-cell office:value-type="float" office:value="-40.98796" calcext:value-type="float">
            <text:p>-4,10E+01</text:p>
          </table:table-cell>
        </table:table-row>
        <table:table-row table:style-name="ro1">
          <table:table-cell office:value-type="string" calcext:value-type="string">
            <text:p>d prix</text:p>
          </table:table-cell>
          <table:table-cell office:value-type="float" office:value="-14.084422" calcext:value-type="float">
            <text:p>-1,41E+01</text:p>
          </table:table-cell>
          <table:table-cell office:value-type="float" office:value="57.665996" calcext:value-type="float">
            <text:p>5,77E+01</text:p>
          </table:table-cell>
          <table:table-cell office:value-type="float" office:value="-42.78173" calcext:value-type="float">
            <text:p>-4,28E+01</text:p>
          </table:table-cell>
        </table:table-row>
        <table:table-row table:style-name="ro1">
          <table:table-cell/>
          <table:table-cell office:value-type="float" office:value="20.83655" calcext:value-type="float">
            <text:p>2,08E+01</text:p>
          </table:table-cell>
          <table:table-cell office:value-type="float" office:value="63.15587" calcext:value-type="float">
            <text:p>6,32E+01</text:p>
          </table:table-cell>
          <table:table-cell office:value-type="float" office:value="-37.573865" calcext:value-type="float">
            <text:p>-3,76E+01</text:p>
          </table:table-cell>
        </table:table-row>
        <table:table-row table:style-name="ro1">
          <table:table-cell/>
          <table:table-cell office:value-type="float" office:value="-23.715772" calcext:value-type="float">
            <text:p>-2,37E+01</text:p>
          </table:table-cell>
          <table:table-cell office:value-type="float" office:value="74.403785" calcext:value-type="float">
            <text:p>7,44E+01</text:p>
          </table:table-cell>
          <table:table-cell office:value-type="float" office:value="-38.454928" calcext:value-type="float">
            <text:p>-3,85E+01</text:p>
          </table:table-cell>
        </table:table-row>
        <table:table-row table:style-name="ro1">
          <table:table-cell/>
          <table:table-cell office:value-type="float" office:value="-59.708188" calcext:value-type="float">
            <text:p>-5,97E+01</text:p>
          </table:table-cell>
          <table:table-cell office:value-type="float" office:value="72.90661" calcext:value-type="float">
            <text:p>7,29E+01</text:p>
          </table:table-cell>
          <table:table-cell office:value-type="float" office:value="-34.808854" calcext:value-type="float">
            <text:p>-3,48E+01</text:p>
          </table:table-cell>
        </table:table-row>
        <table:table-row table:style-name="ro1">
          <table:table-cell/>
          <table:table-cell office:value-type="float" office:value="9.1213" calcext:value-type="float">
            <text:p>9,12E+00</text:p>
          </table:table-cell>
          <table:table-cell office:value-type="float" office:value="76.712093" calcext:value-type="float">
            <text:p>7,67E+01</text:p>
          </table:table-cell>
          <table:table-cell office:value-type="float" office:value="-31.048386" calcext:value-type="float">
            <text:p>-3,10E+01</text:p>
          </table:table-cell>
        </table:table-row>
        <table:table-row table:style-name="ro1">
          <table:table-cell/>
          <table:table-cell office:value-type="float" office:value="26.176654" calcext:value-type="float">
            <text:p>2,62E+01</text:p>
          </table:table-cell>
          <table:table-cell office:value-type="float" office:value="72.71761" calcext:value-type="float">
            <text:p>7,27E+01</text:p>
          </table:table-cell>
          <table:table-cell office:value-type="float" office:value="12.969996" calcext:value-type="float">
            <text:p>1,30E+01</text:p>
          </table:table-cell>
        </table:table-row>
        <table:table-row table:style-name="ro1">
          <table:table-cell/>
          <table:table-cell office:value-type="float" office:value="10.102647" calcext:value-type="float">
            <text:p>1,01E+01</text:p>
          </table:table-cell>
          <table:table-cell office:value-type="float" office:value="64.878445" calcext:value-type="float">
            <text:p>6,49E+01</text:p>
          </table:table-cell>
          <table:table-cell office:value-type="float" office:value="38.00726" calcext:value-type="float">
            <text:p>3,80E+01</text:p>
          </table:table-cell>
        </table:table-row>
        <table:table-row table:style-name="ro1">
          <table:table-cell/>
          <table:table-cell office:value-type="float" office:value="9.2309791" calcext:value-type="float">
            <text:p>9,23E+00</text:p>
          </table:table-cell>
          <table:table-cell office:value-type="float" office:value="68.65206" calcext:value-type="float">
            <text:p>6,87E+01</text:p>
          </table:table-cell>
          <table:table-cell office:value-type="float" office:value="39.179805" calcext:value-type="float">
            <text:p>3,92E+01</text:p>
          </table:table-cell>
        </table:table-row>
        <table:table-row table:style-name="ro1">
          <table:table-cell/>
          <table:table-cell office:value-type="float" office:value="15.544122" calcext:value-type="float">
            <text:p>1,55E+01</text:p>
          </table:table-cell>
          <table:table-cell office:value-type="float" office:value="63.149657" calcext:value-type="float">
            <text:p>6,31E+01</text:p>
          </table:table-cell>
          <table:table-cell office:value-type="float" office:value="38.475565" calcext:value-type="float">
            <text:p>3,85E+01</text:p>
          </table:table-cell>
        </table:table-row>
        <table:table-row table:style-name="ro1">
          <table:table-cell/>
          <table:table-cell office:value-type="float" office:value="3.5457981" calcext:value-type="float">
            <text:p>3,55E+00</text:p>
          </table:table-cell>
          <table:table-cell office:value-type="float" office:value="70.429073" calcext:value-type="float">
            <text:p>7,04E+01</text:p>
          </table:table-cell>
          <table:table-cell office:value-type="float" office:value="39.772538" calcext:value-type="float">
            <text:p>3,98E+01</text:p>
          </table:table-cell>
        </table:table-row>
        <table:table-row table:style-name="ro1">
          <table:table-cell/>
          <table:table-cell office:value-type="float" office:value="-8.8525595" calcext:value-type="float">
            <text:p>-8,85E+00</text:p>
          </table:table-cell>
          <table:table-cell office:value-type="float" office:value="60.627158" calcext:value-type="float">
            <text:p>6,06E+01</text:p>
          </table:table-cell>
          <table:table-cell office:value-type="float" office:value="39.25961" calcext:value-type="float">
            <text:p>3,93E+01</text:p>
          </table:table-cell>
        </table:table-row>
        <table:table-row table:style-name="ro1">
          <table:table-cell/>
          <table:table-cell office:value-type="float" office:value="-23.292599" calcext:value-type="float">
            <text:p>-2,33E+01</text:p>
          </table:table-cell>
          <table:table-cell office:value-type="float" office:value="50.688233" calcext:value-type="float">
            <text:p>5,07E+01</text:p>
          </table:table-cell>
          <table:table-cell office:value-type="float" office:value="36.246946" calcext:value-type="float">
            <text:p>3,62E+01</text:p>
          </table:table-cell>
        </table:table-row>
        <table:table-row table:style-name="ro1">
          <table:table-cell/>
          <table:table-cell office:value-type="float" office:value="-31.902449" calcext:value-type="float">
            <text:p>-3,19E+01</text:p>
          </table:table-cell>
          <table:table-cell office:value-type="float" office:value="48.511725" calcext:value-type="float">
            <text:p>4,85E+01</text:p>
          </table:table-cell>
          <table:table-cell office:value-type="float" office:value="34.486722" calcext:value-type="float">
            <text:p>3,45E+01</text:p>
          </table:table-cell>
        </table:table-row>
        <table:table-row table:style-name="ro1">
          <table:table-cell/>
          <table:table-cell office:value-type="float" office:value="11.852437" calcext:value-type="float">
            <text:p>1,19E+01</text:p>
          </table:table-cell>
          <table:table-cell office:value-type="float" office:value="48.834946" calcext:value-type="float">
            <text:p>4,88E+01</text:p>
          </table:table-cell>
          <table:table-cell office:value-type="float" office:value="31.903647" calcext:value-type="float">
            <text:p>3,19E+01</text:p>
          </table:table-cell>
        </table:table-row>
        <table:table-row table:style-name="ro1">
          <table:table-cell/>
          <table:table-cell office:value-type="float" office:value="3.7577179" calcext:value-type="float">
            <text:p>3,76E+00</text:p>
          </table:table-cell>
          <table:table-cell office:value-type="float" office:value="49.145886" calcext:value-type="float">
            <text:p>4,91E+01</text:p>
          </table:table-cell>
          <table:table-cell office:value-type="float" office:value="30.395373" calcext:value-type="float">
            <text:p>3,04E+01</text:p>
          </table:table-cell>
        </table:table-row>
        <table:table-row table:style-name="ro1">
          <table:table-cell/>
          <table:table-cell office:value-type="float" office:value="1.6348628" calcext:value-type="float">
            <text:p>1,63E+00</text:p>
          </table:table-cell>
          <table:table-cell office:value-type="float" office:value="47.492512" calcext:value-type="float">
            <text:p>4,75E+01</text:p>
          </table:table-cell>
          <table:table-cell office:value-type="float" office:value="30.140623" calcext:value-type="float">
            <text:p>3,01E+01</text:p>
          </table:table-cell>
        </table:table-row>
        <table:table-row table:style-name="ro1">
          <table:table-cell/>
          <table:table-cell office:value-type="float" office:value="-10.765544" calcext:value-type="float">
            <text:p>-1,08E+01</text:p>
          </table:table-cell>
          <table:table-cell office:value-type="float" office:value="26.63957" calcext:value-type="float">
            <text:p>2,66E+01</text:p>
          </table:table-cell>
          <table:table-cell office:value-type="float" office:value="31.654993" calcext:value-type="float">
            <text:p>3,17E+01</text:p>
          </table:table-cell>
        </table:table-row>
        <table:table-row table:style-name="ro1">
          <table:table-cell/>
          <table:table-cell office:value-type="float" office:value="-48.806907" calcext:value-type="float">
            <text:p>-4,88E+01</text:p>
          </table:table-cell>
          <table:table-cell office:value-type="float" office:value="11.562386" calcext:value-type="float">
            <text:p>1,16E+01</text:p>
          </table:table-cell>
          <table:table-cell office:value-type="float" office:value="30.496457" calcext:value-type="float">
            <text:p>3,05E+01</text:p>
          </table:table-cell>
        </table:table-row>
        <table:table-row table:style-name="ro1">
          <table:table-cell/>
          <table:table-cell office:value-type="float" office:value="-23.393275" calcext:value-type="float">
            <text:p>-2,34E+01</text:p>
          </table:table-cell>
          <table:table-cell office:value-type="float" office:value="4.9306377" calcext:value-type="float">
            <text:p>4,93E+00</text:p>
          </table:table-cell>
          <table:table-cell office:value-type="float" office:value="32.093429" calcext:value-type="float">
            <text:p>3,21E+01</text:p>
          </table:table-cell>
        </table:table-row>
        <table:table-row table:style-name="ro1">
          <table:table-cell/>
          <table:table-cell office:value-type="float" office:value="-1.9156272" calcext:value-type="float">
            <text:p>-1,92E+00</text:p>
          </table:table-cell>
          <table:table-cell office:value-type="float" office:value="-8.6688632" calcext:value-type="float">
            <text:p>-8,67E+00</text:p>
          </table:table-cell>
          <table:table-cell office:value-type="float" office:value="33.461023" calcext:value-type="float">
            <text:p>3,35E+01</text:p>
          </table:table-cell>
        </table:table-row>
        <table:table-row table:style-name="ro1">
          <table:table-cell/>
          <table:table-cell office:value-type="float" office:value="-8.9174378" calcext:value-type="float">
            <text:p>-8,92E+00</text:p>
          </table:table-cell>
          <table:table-cell office:value-type="float" office:value="-22.303538" calcext:value-type="float">
            <text:p>-2,23E+01</text:p>
          </table:table-cell>
          <table:table-cell office:value-type="float" office:value="32.932234" calcext:value-type="float">
            <text:p>3,29E+01</text:p>
          </table:table-cell>
        </table:table-row>
        <table:table-row table:style-name="ro1">
          <table:table-cell/>
          <table:table-cell office:value-type="float" office:value="5.5225454" calcext:value-type="float">
            <text:p>5,52E+00</text:p>
          </table:table-cell>
          <table:table-cell office:value-type="float" office:value="-24.93713" calcext:value-type="float">
            <text:p>-2,49E+01</text:p>
          </table:table-cell>
          <table:table-cell office:value-type="float" office:value="32.819119" calcext:value-type="float">
            <text:p>3,28E+01</text:p>
          </table:table-cell>
        </table:table-row>
        <table:table-row table:style-name="ro1">
          <table:table-cell/>
          <table:table-cell office:value-type="float" office:value="29.962196" calcext:value-type="float">
            <text:p>3,00E+01</text:p>
          </table:table-cell>
          <table:table-cell office:value-type="float" office:value="-17.903098" calcext:value-type="float">
            <text:p>-1,79E+01</text:p>
          </table:table-cell>
          <table:table-cell office:value-type="float" office:value="38.489524" calcext:value-type="float">
            <text:p>3,85E+01</text:p>
          </table:table-cell>
        </table:table-row>
        <table:table-row table:style-name="ro1">
          <table:table-cell/>
          <table:table-cell office:value-type="float" office:value="31.172343" calcext:value-type="float">
            <text:p>3,12E+01</text:p>
          </table:table-cell>
          <table:table-cell office:value-type="float" office:value="-22.687221" calcext:value-type="float">
            <text:p>-2,27E+01</text:p>
          </table:table-cell>
          <table:table-cell office:value-type="float" office:value="36.707612" calcext:value-type="float">
            <text:p>3,67E+01</text:p>
          </table:table-cell>
        </table:table-row>
        <table:table-row table:style-name="ro1">
          <table:table-cell/>
          <table:table-cell office:value-type="float" office:value="25.594092" calcext:value-type="float">
            <text:p>2,56E+01</text:p>
          </table:table-cell>
          <table:table-cell office:value-type="float" office:value="-26.356646" calcext:value-type="float">
            <text:p>-2,64E+01</text:p>
          </table:table-cell>
          <table:table-cell office:value-type="float" office:value="37.893827" calcext:value-type="float">
            <text:p>3,79E+01</text:p>
          </table:table-cell>
        </table:table-row>
        <table:table-row table:style-name="ro1">
          <table:table-cell/>
          <table:table-cell office:value-type="float" office:value="37.02579" calcext:value-type="float">
            <text:p>3,70E+01</text:p>
          </table:table-cell>
          <table:table-cell office:value-type="float" office:value="-15.557235" calcext:value-type="float">
            <text:p>-1,56E+01</text:p>
          </table:table-cell>
          <table:table-cell office:value-type="float" office:value="35.673879" calcext:value-type="float">
            <text:p>3,57E+01</text:p>
          </table:table-cell>
        </table:table-row>
        <table:table-row table:style-name="ro1">
          <table:table-cell/>
          <table:table-cell office:value-type="float" office:value="-118.88749" calcext:value-type="float">
            <text:p>-1,19E+02</text:p>
          </table:table-cell>
          <table:table-cell office:value-type="float" office:value="-15.178859" calcext:value-type="float">
            <text:p>-1,52E+01</text:p>
          </table:table-cell>
          <table:table-cell office:value-type="float" office:value="39.447162" calcext:value-type="float">
            <text:p>3,94E+01</text:p>
          </table:table-cell>
        </table:table-row>
        <table:table-row table:style-name="ro1">
          <table:table-cell/>
          <table:table-cell office:value-type="float" office:value="41.380641" calcext:value-type="float">
            <text:p>4,14E+01</text:p>
          </table:table-cell>
          <table:table-cell office:value-type="float" office:value="-6.6756524" calcext:value-type="float">
            <text:p>-6,68E+00</text:p>
          </table:table-cell>
          <table:table-cell office:value-type="float" office:value="41.280268" calcext:value-type="float">
            <text:p>4,13E+01</text:p>
          </table:table-cell>
        </table:table-row>
        <table:table-row table:style-name="ro1">
          <table:table-cell/>
          <table:table-cell office:value-type="float" office:value="16.223125" calcext:value-type="float">
            <text:p>1,62E+01</text:p>
          </table:table-cell>
          <table:table-cell office:value-type="float" office:value="-16.741284" calcext:value-type="float">
            <text:p>-1,67E+01</text:p>
          </table:table-cell>
          <table:table-cell office:value-type="float" office:value="39.19817" calcext:value-type="float">
            <text:p>3,92E+01</text:p>
          </table:table-cell>
        </table:table-row>
        <table:table-row table:style-name="ro1">
          <table:table-cell/>
          <table:table-cell office:value-type="float" office:value="-17.554891" calcext:value-type="float">
            <text:p>-1,76E+01</text:p>
          </table:table-cell>
          <table:table-cell office:value-type="float" office:value="-26.532894" calcext:value-type="float">
            <text:p>-2,65E+01</text:p>
          </table:table-cell>
          <table:table-cell office:value-type="float" office:value="27.859425" calcext:value-type="float">
            <text:p>2,79E+01</text:p>
          </table:table-cell>
        </table:table-row>
        <table:table-row table:style-name="ro1">
          <table:table-cell/>
          <table:table-cell office:value-type="float" office:value="31.913337" calcext:value-type="float">
            <text:p>3,19E+01</text:p>
          </table:table-cell>
          <table:table-cell office:value-type="float" office:value="-30.845826" calcext:value-type="float">
            <text:p>-3,08E+01</text:p>
          </table:table-cell>
          <table:table-cell office:value-type="float" office:value="27.604988" calcext:value-type="float">
            <text:p>2,76E+01</text:p>
          </table:table-cell>
        </table:table-row>
        <table:table-row table:style-name="ro1">
          <table:table-cell/>
          <table:table-cell office:value-type="float" office:value="29.585541" calcext:value-type="float">
            <text:p>2,96E+01</text:p>
          </table:table-cell>
          <table:table-cell office:value-type="float" office:value="-13.799185" calcext:value-type="float">
            <text:p>-1,38E+01</text:p>
          </table:table-cell>
          <table:table-cell office:value-type="float" office:value="29.294073" calcext:value-type="float">
            <text:p>2,93E+01</text:p>
          </table:table-cell>
        </table:table-row>
        <table:table-row table:style-name="ro1">
          <table:table-cell/>
          <table:table-cell office:value-type="float" office:value="-22.13142" calcext:value-type="float">
            <text:p>-2,21E+01</text:p>
          </table:table-cell>
          <table:table-cell office:value-type="float" office:value="-10.641364" calcext:value-type="float">
            <text:p>-1,06E+01</text:p>
          </table:table-cell>
          <table:table-cell office:value-type="float" office:value="28.223462" calcext:value-type="float">
            <text:p>2,82E+01</text:p>
          </table:table-cell>
        </table:table-row>
        <table:table-row table:style-name="ro1">
          <table:table-cell/>
          <table:table-cell office:value-type="float" office:value="5.1251839" calcext:value-type="float">
            <text:p>5,13E+00</text:p>
          </table:table-cell>
          <table:table-cell office:value-type="float" office:value="-2.7935532" calcext:value-type="float">
            <text:p>-2,79E+00</text:p>
          </table:table-cell>
          <table:table-cell office:value-type="float" office:value="27.839381" calcext:value-type="float">
            <text:p>2,78E+01</text:p>
          </table:table-cell>
        </table:table-row>
        <table:table-row table:style-name="ro1">
          <table:table-cell/>
          <table:table-cell office:value-type="float" office:value="38.757941" calcext:value-type="float">
            <text:p>3,88E+01</text:p>
          </table:table-cell>
          <table:table-cell office:value-type="float" office:value="-0.40016598" calcext:value-type="float">
            <text:p>-4,00E-01</text:p>
          </table:table-cell>
          <table:table-cell office:value-type="float" office:value="27.829517" calcext:value-type="float">
            <text:p>2,78E+01</text:p>
          </table:table-cell>
        </table:table-row>
        <table:table-row table:style-name="ro1">
          <table:table-cell/>
          <table:table-cell office:value-type="float" office:value="7.2057148" calcext:value-type="float">
            <text:p>7,21E+00</text:p>
          </table:table-cell>
          <table:table-cell office:value-type="float" office:value="-4.5850303" calcext:value-type="float">
            <text:p>-4,59E+00</text:p>
          </table:table-cell>
          <table:table-cell office:value-type="float" office:value="27.524116" calcext:value-type="float">
            <text:p>2,75E+01</text:p>
          </table:table-cell>
        </table:table-row>
        <table:table-row table:style-name="ro1">
          <table:table-cell/>
          <table:table-cell office:value-type="float" office:value="8.4736682" calcext:value-type="float">
            <text:p>8,47E+00</text:p>
          </table:table-cell>
          <table:table-cell office:value-type="float" office:value="-6.6081813" calcext:value-type="float">
            <text:p>-6,61E+00</text:p>
          </table:table-cell>
          <table:table-cell office:value-type="float" office:value="27.515977" calcext:value-type="float">
            <text:p>2,75E+01</text:p>
          </table:table-cell>
        </table:table-row>
        <table:table-row table:style-name="ro1">
          <table:table-cell/>
          <table:table-cell office:value-type="float" office:value="18.511911" calcext:value-type="float">
            <text:p>1,85E+01</text:p>
          </table:table-cell>
          <table:table-cell office:value-type="float" office:value="-7.2264292" calcext:value-type="float">
            <text:p>-7,23E+00</text:p>
          </table:table-cell>
          <table:table-cell office:value-type="float" office:value="26.18047" calcext:value-type="float">
            <text:p>2,62E+01</text:p>
          </table:table-cell>
        </table:table-row>
        <table:table-row table:style-name="ro1">
          <table:table-cell/>
          <table:table-cell office:value-type="float" office:value="36.208383" calcext:value-type="float">
            <text:p>3,62E+01</text:p>
          </table:table-cell>
          <table:table-cell office:value-type="float" office:value="-4.1277071" calcext:value-type="float">
            <text:p>-4,13E+00</text:p>
          </table:table-cell>
          <table:table-cell office:value-type="float" office:value="25.809356" calcext:value-type="float">
            <text:p>2,58E+01</text:p>
          </table:table-cell>
        </table:table-row>
        <table:table-row table:style-name="ro1">
          <table:table-cell/>
          <table:table-cell office:value-type="float" office:value="11.15496" calcext:value-type="float">
            <text:p>1,12E+01</text:p>
          </table:table-cell>
          <table:table-cell office:value-type="float" office:value="-3.0070054" calcext:value-type="float">
            <text:p>-3,01E+00</text:p>
          </table:table-cell>
          <table:table-cell office:value-type="float" office:value="26.129473" calcext:value-type="float">
            <text:p>2,61E+01</text:p>
          </table:table-cell>
        </table:table-row>
        <table:table-row table:style-name="ro1">
          <table:table-cell/>
          <table:table-cell office:value-type="float" office:value="29.306982" calcext:value-type="float">
            <text:p>2,93E+01</text:p>
          </table:table-cell>
          <table:table-cell office:value-type="float" office:value="-16.616828" calcext:value-type="float">
            <text:p>-1,66E+01</text:p>
          </table:table-cell>
          <table:table-cell office:value-type="float" office:value="26.567188" calcext:value-type="float">
            <text:p>2,66E+01</text:p>
          </table:table-cell>
        </table:table-row>
        <table:table-row table:style-name="ro1">
          <table:table-cell/>
          <table:table-cell office:value-type="float" office:value="-113.32947" calcext:value-type="float">
            <text:p>-1,13E+02</text:p>
          </table:table-cell>
          <table:table-cell office:value-type="float" office:value="-29.198924" calcext:value-type="float">
            <text:p>-2,92E+01</text:p>
          </table:table-cell>
          <table:table-cell office:value-type="float" office:value="28.930631" calcext:value-type="float">
            <text:p>2,89E+01</text:p>
          </table:table-cell>
        </table:table-row>
        <table:table-row table:style-name="ro1">
          <table:table-cell/>
          <table:table-cell office:value-type="float" office:value="77.983205" calcext:value-type="float">
            <text:p>7,80E+01</text:p>
          </table:table-cell>
          <table:table-cell office:value-type="float" office:value="-25.173715" calcext:value-type="float">
            <text:p>-2,52E+01</text:p>
          </table:table-cell>
          <table:table-cell office:value-type="float" office:value="30.640162" calcext:value-type="float">
            <text:p>3,06E+01</text:p>
          </table:table-cell>
        </table:table-row>
        <table:table-row table:style-name="ro1">
          <table:table-cell/>
          <table:table-cell office:value-type="float" office:value="9.7543089" calcext:value-type="float">
            <text:p>9,75E+00</text:p>
          </table:table-cell>
          <table:table-cell office:value-type="float" office:value="-25.468048" calcext:value-type="float">
            <text:p>-2,55E+01</text:p>
          </table:table-cell>
          <table:table-cell office:value-type="float" office:value="30.411017" calcext:value-type="float">
            <text:p>3,04E+01</text:p>
          </table:table-cell>
        </table:table-row>
        <table:table-row table:style-name="ro1">
          <table:table-cell/>
          <table:table-cell office:value-type="float" office:value="-18.950365" calcext:value-type="float">
            <text:p>-1,90E+01</text:p>
          </table:table-cell>
          <table:table-cell office:value-type="float" office:value="-23.67821" calcext:value-type="float">
            <text:p>-2,37E+01</text:p>
          </table:table-cell>
          <table:table-cell office:value-type="float" office:value="28.496427" calcext:value-type="float">
            <text:p>2,85E+01</text:p>
          </table:table-cell>
        </table:table-row>
        <table:table-row table:style-name="ro1">
          <table:table-cell/>
          <table:table-cell office:value-type="float" office:value="-38.987625" calcext:value-type="float">
            <text:p>-3,90E+01</text:p>
          </table:table-cell>
          <table:table-cell office:value-type="float" office:value="-16.671414" calcext:value-type="float">
            <text:p>-1,67E+01</text:p>
          </table:table-cell>
          <table:table-cell office:value-type="float" office:value="29.958037" calcext:value-type="float">
            <text:p>3,00E+01</text:p>
          </table:table-cell>
        </table:table-row>
        <table:table-row table:style-name="ro1">
          <table:table-cell/>
          <table:table-cell office:value-type="float" office:value="18.314101" calcext:value-type="float">
            <text:p>1,83E+01</text:p>
          </table:table-cell>
          <table:table-cell office:value-type="float" office:value="-20.900031" calcext:value-type="float">
            <text:p>-2,09E+01</text:p>
          </table:table-cell>
          <table:table-cell office:value-type="float" office:value="29.529312" calcext:value-type="float">
            <text:p>2,95E+01</text:p>
          </table:table-cell>
        </table:table-row>
        <table:table-row table:style-name="ro1">
          <table:table-cell/>
          <table:table-cell office:value-type="float" office:value="-23.143414" calcext:value-type="float">
            <text:p>-2,31E+01</text:p>
          </table:table-cell>
          <table:table-cell office:value-type="float" office:value="-24.37185" calcext:value-type="float">
            <text:p>-2,44E+01</text:p>
          </table:table-cell>
          <table:table-cell office:value-type="float" office:value="27.727462" calcext:value-type="float">
            <text:p>2,77E+01</text:p>
          </table:table-cell>
        </table:table-row>
        <table:table-row table:style-name="ro1">
          <table:table-cell/>
          <table:table-cell office:value-type="float" office:value="16.960978" calcext:value-type="float">
            <text:p>1,70E+01</text:p>
          </table:table-cell>
          <table:table-cell office:value-type="float" office:value="-26.902206" calcext:value-type="float">
            <text:p>-2,69E+01</text:p>
          </table:table-cell>
          <table:table-cell office:value-type="float" office:value="28.883643" calcext:value-type="float">
            <text:p>2,89E+01</text:p>
          </table:table-cell>
        </table:table-row>
        <table:table-row table:style-name="ro1">
          <table:table-cell/>
          <table:table-cell office:value-type="float" office:value="24.920395" calcext:value-type="float">
            <text:p>2,49E+01</text:p>
          </table:table-cell>
          <table:table-cell office:value-type="float" office:value="-27.018709" calcext:value-type="float">
            <text:p>-2,70E+01</text:p>
          </table:table-cell>
          <table:table-cell office:value-type="float" office:value="27.323108" calcext:value-type="float">
            <text:p>2,73E+01</text:p>
          </table:table-cell>
        </table:table-row>
        <table:table-row table:style-name="ro1">
          <table:table-cell/>
          <table:table-cell office:value-type="float" office:value="-2.5589347" calcext:value-type="float">
            <text:p>-2,56E+00</text:p>
          </table:table-cell>
          <table:table-cell office:value-type="float" office:value="-14.285117" calcext:value-type="float">
            <text:p>-1,43E+01</text:p>
          </table:table-cell>
          <table:table-cell office:value-type="float" office:value="27.247844" calcext:value-type="float">
            <text:p>2,72E+01</text:p>
          </table:table-cell>
        </table:table-row>
        <table:table-row table:style-name="ro1">
          <table:table-cell/>
          <table:table-cell office:value-type="float" office:value="22.83631" calcext:value-type="float">
            <text:p>2,28E+01</text:p>
          </table:table-cell>
          <table:table-cell office:value-type="float" office:value="-14.722074" calcext:value-type="float">
            <text:p>-1,47E+01</text:p>
          </table:table-cell>
          <table:table-cell office:value-type="float" office:value="26.943411" calcext:value-type="float">
            <text:p>2,69E+01</text:p>
          </table:table-cell>
        </table:table-row>
        <table:table-row table:style-name="ro1">
          <table:table-cell/>
          <table:table-cell office:value-type="float" office:value="24.046875" calcext:value-type="float">
            <text:p>2,40E+01</text:p>
          </table:table-cell>
          <table:table-cell office:value-type="float" office:value="-18.628262" calcext:value-type="float">
            <text:p>-1,86E+01</text:p>
          </table:table-cell>
          <table:table-cell office:value-type="float" office:value="27.482167" calcext:value-type="float">
            <text:p>2,75E+01</text:p>
          </table:table-cell>
        </table:table-row>
        <table:table-row table:style-name="ro1">
          <table:table-cell/>
          <table:table-cell office:value-type="float" office:value="-113.88154" calcext:value-type="float">
            <text:p>-1,14E+02</text:p>
          </table:table-cell>
          <table:table-cell office:value-type="float" office:value="-19.05797" calcext:value-type="float">
            <text:p>-1,91E+01</text:p>
          </table:table-cell>
          <table:table-cell office:value-type="float" office:value="25.202783" calcext:value-type="float">
            <text:p>2,52E+01</text:p>
          </table:table-cell>
        </table:table-row>
        <table:table-row table:style-name="ro1">
          <table:table-cell/>
          <table:table-cell office:value-type="float" office:value="31.392494" calcext:value-type="float">
            <text:p>3,14E+01</text:p>
          </table:table-cell>
          <table:table-cell office:value-type="float" office:value="-19.325003" calcext:value-type="float">
            <text:p>-1,93E+01</text:p>
          </table:table-cell>
          <table:table-cell office:value-type="float" office:value="23.964996" calcext:value-type="float">
            <text:p>2,40E+01</text:p>
          </table:table-cell>
        </table:table-row>
        <table:table-row table:style-name="ro1">
          <table:table-cell/>
          <table:table-cell office:value-type="float" office:value="10.447789" calcext:value-type="float">
            <text:p>1,04E+01</text:p>
          </table:table-cell>
          <table:table-cell office:value-type="float" office:value="-19.747623" calcext:value-type="float">
            <text:p>-1,97E+01</text:p>
          </table:table-cell>
          <table:table-cell office:value-type="float" office:value="24.436303" calcext:value-type="float">
            <text:p>2,44E+01</text:p>
          </table:table-cell>
        </table:table-row>
        <table:table-row table:style-name="ro1">
          <table:table-cell/>
          <table:table-cell office:value-type="float" office:value="18.112863" calcext:value-type="float">
            <text:p>1,81E+01</text:p>
          </table:table-cell>
          <table:table-cell office:value-type="float" office:value="-20.322878" calcext:value-type="float">
            <text:p>-2,03E+01</text:p>
          </table:table-cell>
          <table:table-cell office:value-type="float" office:value="22.477112" calcext:value-type="float">
            <text:p>2,25E+01</text:p>
          </table:table-cell>
        </table:table-row>
        <table:table-row table:style-name="ro1">
          <table:table-cell/>
          <table:table-cell office:value-type="float" office:value="-20.588292" calcext:value-type="float">
            <text:p>-2,06E+01</text:p>
          </table:table-cell>
          <table:table-cell office:value-type="float" office:value="-6.6047135" calcext:value-type="float">
            <text:p>-6,60E+00</text:p>
          </table:table-cell>
          <table:table-cell office:value-type="float" office:value="22.303512" calcext:value-type="float">
            <text:p>2,23E+01</text:p>
          </table:table-cell>
        </table:table-row>
        <table:table-row table:style-name="ro1">
          <table:table-cell/>
          <table:table-cell office:value-type="float" office:value="28.033693" calcext:value-type="float">
            <text:p>2,80E+01</text:p>
          </table:table-cell>
          <table:table-cell office:value-type="float" office:value="-2.6282512" calcext:value-type="float">
            <text:p>-2,63E+00</text:p>
          </table:table-cell>
          <table:table-cell office:value-type="float" office:value="21.737847" calcext:value-type="float">
            <text:p>2,17E+01</text:p>
          </table:table-cell>
        </table:table-row>
        <table:table-row table:style-name="ro1">
          <table:table-cell/>
          <table:table-cell office:value-type="float" office:value="-8.5531081" calcext:value-type="float">
            <text:p>-8,55E+00</text:p>
          </table:table-cell>
          <table:table-cell office:value-type="float" office:value="-9.113159" calcext:value-type="float">
            <text:p>-9,11E+00</text:p>
          </table:table-cell>
          <table:table-cell office:value-type="float" office:value="20.627089" calcext:value-type="float">
            <text:p>2,06E+01</text:p>
          </table:table-cell>
        </table:table-row>
        <table:table-row table:style-name="ro1">
          <table:table-cell/>
          <table:table-cell office:value-type="float" office:value="16.052011" calcext:value-type="float">
            <text:p>1,61E+01</text:p>
          </table:table-cell>
          <table:table-cell office:value-type="float" office:value="-9.5116946" calcext:value-type="float">
            <text:p>-9,51E+00</text:p>
          </table:table-cell>
          <table:table-cell office:value-type="float" office:value="19.811005" calcext:value-type="float">
            <text:p>1,98E+01</text:p>
          </table:table-cell>
        </table:table-row>
        <table:table-row table:style-name="ro1">
          <table:table-cell/>
          <table:table-cell office:value-type="float" office:value="41.42587" calcext:value-type="float">
            <text:p>4,14E+01</text:p>
          </table:table-cell>
          <table:table-cell office:value-type="float" office:value="-0.74531634" calcext:value-type="float">
            <text:p>-7,45E-01</text:p>
          </table:table-cell>
          <table:table-cell office:value-type="float" office:value="19.38758" calcext:value-type="float">
            <text:p>1,94E+01</text:p>
          </table:table-cell>
        </table:table-row>
        <table:table-row table:style-name="ro1">
          <table:table-cell/>
          <table:table-cell office:value-type="float" office:value="8.2116716" calcext:value-type="float">
            <text:p>8,21E+00</text:p>
          </table:table-cell>
          <table:table-cell office:value-type="float" office:value="-3.7551292" calcext:value-type="float">
            <text:p>-3,76E+00</text:p>
          </table:table-cell>
          <table:table-cell office:value-type="float" office:value="19.175244" calcext:value-type="float">
            <text:p>1,92E+01</text:p>
          </table:table-cell>
        </table:table-row>
        <table:table-row table:style-name="ro1">
          <table:table-cell/>
          <table:table-cell office:value-type="float" office:value="2.8199441" calcext:value-type="float">
            <text:p>2,82E+00</text:p>
          </table:table-cell>
          <table:table-cell office:value-type="float" office:value="5.634392" calcext:value-type="float">
            <text:p>5,63E+00</text:p>
          </table:table-cell>
          <table:table-cell office:value-type="float" office:value="19.329956" calcext:value-type="float">
            <text:p>1,93E+01</text:p>
          </table:table-cell>
        </table:table-row>
        <table:table-row table:style-name="ro1">
          <table:table-cell/>
          <table:table-cell office:value-type="float" office:value="-26.224139" calcext:value-type="float">
            <text:p>-2,62E+01</text:p>
          </table:table-cell>
          <table:table-cell office:value-type="float" office:value="3.578438" calcext:value-type="float">
            <text:p>3,58E+00</text:p>
          </table:table-cell>
          <table:table-cell office:value-type="float" office:value="20.086842" calcext:value-type="float">
            <text:p>2,01E+01</text:p>
          </table:table-cell>
        </table:table-row>
        <table:table-row table:style-name="ro1">
          <table:table-cell/>
          <table:table-cell office:value-type="float" office:value="-30.395834" calcext:value-type="float">
            <text:p>-3,04E+01</text:p>
          </table:table-cell>
          <table:table-cell office:value-type="float" office:value="-2.867319" calcext:value-type="float">
            <text:p>-2,87E+00</text:p>
          </table:table-cell>
          <table:table-cell office:value-type="float" office:value="22.886855" calcext:value-type="float">
            <text:p>2,29E+01</text:p>
          </table:table-cell>
        </table:table-row>
        <table:table-row table:style-name="ro1">
          <table:table-cell/>
          <table:table-cell office:value-type="float" office:value="6.4665513" calcext:value-type="float">
            <text:p>6,47E+00</text:p>
          </table:table-cell>
          <table:table-cell office:value-type="float" office:value="0.60776679" calcext:value-type="float">
            <text:p>6,08E-01</text:p>
          </table:table-cell>
          <table:table-cell office:value-type="float" office:value="24.292187" calcext:value-type="float">
            <text:p>2,43E+01</text:p>
          </table:table-cell>
        </table:table-row>
        <table:table-row table:style-name="ro1">
          <table:table-cell/>
          <table:table-cell office:value-type="float" office:value="22.800548" calcext:value-type="float">
            <text:p>2,28E+01</text:p>
          </table:table-cell>
          <table:table-cell office:value-type="float" office:value="11.558115" calcext:value-type="float">
            <text:p>1,16E+01</text:p>
          </table:table-cell>
          <table:table-cell office:value-type="float" office:value="26.568753" calcext:value-type="float">
            <text:p>2,66E+01</text:p>
          </table:table-cell>
        </table:table-row>
        <table:table-row table:style-name="ro1">
          <table:table-cell/>
          <table:table-cell office:value-type="float" office:value="23.845993" calcext:value-type="float">
            <text:p>2,38E+01</text:p>
          </table:table-cell>
          <table:table-cell office:value-type="float" office:value="12.41917" calcext:value-type="float">
            <text:p>1,24E+01</text:p>
          </table:table-cell>
          <table:table-cell office:value-type="float" office:value="32.459402" calcext:value-type="float">
            <text:p>3,25E+01</text:p>
          </table:table-cell>
        </table:table-row>
        <table:table-row table:style-name="ro1">
          <table:table-cell/>
          <table:table-cell office:value-type="float" office:value="-3.8809309" calcext:value-type="float">
            <text:p>-3,88E+00</text:p>
          </table:table-cell>
          <table:table-cell office:value-type="float" office:value="22.906389" calcext:value-type="float">
            <text:p>2,29E+01</text:p>
          </table:table-cell>
          <table:table-cell office:value-type="float" office:value="39.100338" calcext:value-type="float">
            <text:p>3,91E+01</text:p>
          </table:table-cell>
        </table:table-row>
        <table:table-row table:style-name="ro1">
          <table:table-cell/>
          <table:table-cell office:value-type="float" office:value="4.8158299" calcext:value-type="float">
            <text:p>4,82E+00</text:p>
          </table:table-cell>
          <table:table-cell office:value-type="float" office:value="31.044457" calcext:value-type="float">
            <text:p>3,10E+01</text:p>
          </table:table-cell>
          <table:table-cell office:value-type="float" office:value="48.137222" calcext:value-type="float">
            <text:p>4,81E+01</text:p>
          </table:table-cell>
        </table:table-row>
        <table:table-row table:style-name="ro1">
          <table:table-cell/>
          <table:table-cell office:value-type="float" office:value="12.01234" calcext:value-type="float">
            <text:p>1,20E+01</text:p>
          </table:table-cell>
          <table:table-cell office:value-type="float" office:value="34.314205" calcext:value-type="float">
            <text:p>3,43E+01</text:p>
          </table:table-cell>
          <table:table-cell office:value-type="float" office:value="56.380245" calcext:value-type="float">
            <text:p>5,64E+01</text:p>
          </table:table-cell>
        </table:table-row>
        <table:table-row table:style-name="ro1">
          <table:table-cell/>
          <table:table-cell office:value-type="float" office:value="-2.4004355" calcext:value-type="float">
            <text:p>-2,40E+00</text:p>
          </table:table-cell>
          <table:table-cell office:value-type="float" office:value="25.863008" calcext:value-type="float">
            <text:p>2,59E+01</text:p>
          </table:table-cell>
          <table:table-cell office:value-type="float" office:value="59.207962" calcext:value-type="float">
            <text:p>5,92E+01</text:p>
          </table:table-cell>
        </table:table-row>
        <table:table-row table:style-name="ro1">
          <table:table-cell/>
          <table:table-cell office:value-type="float" office:value="-4.5873934" calcext:value-type="float">
            <text:p>-4,59E+00</text:p>
          </table:table-cell>
          <table:table-cell office:value-type="float" office:value="28.67375" calcext:value-type="float">
            <text:p>2,87E+01</text:p>
          </table:table-cell>
          <table:table-cell office:value-type="float" office:value="62.667928" calcext:value-type="float">
            <text:p>6,27E+01</text:p>
          </table:table-cell>
        </table:table-row>
        <table:table-row table:style-name="ro1">
          <table:table-cell/>
          <table:table-cell office:value-type="float" office:value="8.4408764" calcext:value-type="float">
            <text:p>8,44E+00</text:p>
          </table:table-cell>
          <table:table-cell office:value-type="float" office:value="28.207252" calcext:value-type="float">
            <text:p>2,82E+01</text:p>
          </table:table-cell>
          <table:table-cell office:value-type="float" office:value="61.558487" calcext:value-type="float">
            <text:p>6,16E+01</text:p>
          </table:table-cell>
        </table:table-row>
        <table:table-row table:style-name="ro1">
          <table:table-cell/>
          <table:table-cell office:value-type="float" office:value="6.1136804" calcext:value-type="float">
            <text:p>6,11E+00</text:p>
          </table:table-cell>
          <table:table-cell office:value-type="float" office:value="30.338382" calcext:value-type="float">
            <text:p>3,03E+01</text:p>
          </table:table-cell>
          <table:table-cell office:value-type="float" office:value="68.070626" calcext:value-type="float">
            <text:p>6,81E+01</text:p>
          </table:table-cell>
        </table:table-row>
        <table:table-row table:style-name="ro1">
          <table:table-cell/>
          <table:table-cell office:value-type="float" office:value="-8.7379941" calcext:value-type="float">
            <text:p>-8,74E+00</text:p>
          </table:table-cell>
          <table:table-cell office:value-type="float" office:value="23.323514" calcext:value-type="float">
            <text:p>2,33E+01</text:p>
          </table:table-cell>
          <table:table-cell office:value-type="float" office:value="73.654395" calcext:value-type="float">
            <text:p>7,37E+01</text:p>
          </table:table-cell>
        </table:table-row>
        <table:table-row table:style-name="ro1">
          <table:table-cell/>
          <table:table-cell office:value-type="float" office:value="-21.780771" calcext:value-type="float">
            <text:p>-2,18E+01</text:p>
          </table:table-cell>
          <table:table-cell office:value-type="float" office:value="22.420749" calcext:value-type="float">
            <text:p>2,24E+01</text:p>
          </table:table-cell>
          <table:table-cell office:value-type="float" office:value="78.404344" calcext:value-type="float">
            <text:p>7,84E+01</text:p>
          </table:table-cell>
        </table:table-row>
        <table:table-row table:style-name="ro1">
          <table:table-cell/>
          <table:table-cell office:value-type="float" office:value="7.0571434" calcext:value-type="float">
            <text:p>7,06E+00</text:p>
          </table:table-cell>
          <table:table-cell office:value-type="float" office:value="24.446882" calcext:value-type="float">
            <text:p>2,44E+01</text:p>
          </table:table-cell>
          <table:table-cell office:value-type="float" office:value="82.357284" calcext:value-type="float">
            <text:p>8,24E+01</text:p>
          </table:table-cell>
        </table:table-row>
        <table:table-row table:style-name="ro1">
          <table:table-cell/>
          <table:table-cell office:value-type="float" office:value="-20.616173" calcext:value-type="float">
            <text:p>-2,06E+01</text:p>
          </table:table-cell>
          <table:table-cell office:value-type="float" office:value="24.766725" calcext:value-type="float">
            <text:p>2,48E+01</text:p>
          </table:table-cell>
          <table:table-cell office:value-type="float" office:value="84.074094" calcext:value-type="float">
            <text:p>8,41E+01</text:p>
          </table:table-cell>
        </table:table-row>
        <table:table-row table:style-name="ro1">
          <table:table-cell/>
          <table:table-cell office:value-type="float" office:value="-24.703838" calcext:value-type="float">
            <text:p>-2,47E+01</text:p>
          </table:table-cell>
          <table:table-cell office:value-type="float" office:value="32.496314" calcext:value-type="float">
            <text:p>3,25E+01</text:p>
          </table:table-cell>
          <table:table-cell office:value-type="float" office:value="83.43872" calcext:value-type="float">
            <text:p>8,34E+01</text:p>
          </table:table-cell>
        </table:table-row>
        <table:table-row table:style-name="ro1">
          <table:table-cell/>
          <table:table-cell office:value-type="float" office:value="-12.23432" calcext:value-type="float">
            <text:p>-1,22E+01</text:p>
          </table:table-cell>
          <table:table-cell office:value-type="float" office:value="33.401415" calcext:value-type="float">
            <text:p>3,34E+01</text:p>
          </table:table-cell>
          <table:table-cell office:value-type="float" office:value="84.782788" calcext:value-type="float">
            <text:p>8,48E+01</text:p>
          </table:table-cell>
        </table:table-row>
        <table:table-row table:style-name="ro1">
          <table:table-cell/>
          <table:table-cell office:value-type="float" office:value="4.6050039" calcext:value-type="float">
            <text:p>4,61E+00</text:p>
          </table:table-cell>
          <table:table-cell office:value-type="float" office:value="30.112581" calcext:value-type="float">
            <text:p>3,01E+01</text:p>
          </table:table-cell>
          <table:table-cell office:value-type="float" office:value="84.244343" calcext:value-type="float">
            <text:p>8,42E+01</text:p>
          </table:table-cell>
        </table:table-row>
        <table:table-row table:style-name="ro1">
          <table:table-cell/>
          <table:table-cell office:value-type="float" office:value="-8.0200923" calcext:value-type="float">
            <text:p>-8,02E+00</text:p>
          </table:table-cell>
          <table:table-cell office:value-type="float" office:value="24.837727" calcext:value-type="float">
            <text:p>2,48E+01</text:p>
          </table:table-cell>
          <table:table-cell office:value-type="float" office:value="84.210173" calcext:value-type="float">
            <text:p>8,42E+01</text:p>
          </table:table-cell>
        </table:table-row>
        <table:table-row table:style-name="ro1">
          <table:table-cell/>
          <table:table-cell office:value-type="float" office:value="-3.2836028" calcext:value-type="float">
            <text:p>-3,28E+00</text:p>
          </table:table-cell>
          <table:table-cell office:value-type="float" office:value="28.457773" calcext:value-type="float">
            <text:p>2,85E+01</text:p>
          </table:table-cell>
          <table:table-cell office:value-type="float" office:value="83.28336" calcext:value-type="float">
            <text:p>8,33E+01</text:p>
          </table:table-cell>
        </table:table-row>
        <table:table-row table:style-name="ro1">
          <table:table-cell/>
          <table:table-cell office:value-type="float" office:value="-23.404957" calcext:value-type="float">
            <text:p>-2,34E+01</text:p>
          </table:table-cell>
          <table:table-cell office:value-type="float" office:value="28.662219" calcext:value-type="float">
            <text:p>2,87E+01</text:p>
          </table:table-cell>
          <table:table-cell office:value-type="float" office:value="82.503589" calcext:value-type="float">
            <text:p>8,25E+01</text:p>
          </table:table-cell>
        </table:table-row>
        <table:table-row table:style-name="ro1">
          <table:table-cell/>
          <table:table-cell office:value-type="float" office:value="-51.635102" calcext:value-type="float">
            <text:p>-5,16E+01</text:p>
          </table:table-cell>
          <table:table-cell office:value-type="float" office:value="28.211172" calcext:value-type="float">
            <text:p>2,82E+01</text:p>
          </table:table-cell>
          <table:table-cell office:value-type="float" office:value="82.046703" calcext:value-type="float">
            <text:p>8,20E+01</text:p>
          </table:table-cell>
        </table:table-row>
        <table:table-row table:style-name="ro1">
          <table:table-cell/>
          <table:table-cell office:value-type="float" office:value="17.629034" calcext:value-type="float">
            <text:p>1,76E+01</text:p>
          </table:table-cell>
          <table:table-cell office:value-type="float" office:value="31.870118" calcext:value-type="float">
            <text:p>3,19E+01</text:p>
          </table:table-cell>
          <table:table-cell office:value-type="float" office:value="82.309318" calcext:value-type="float">
            <text:p>8,23E+01</text:p>
          </table:table-cell>
        </table:table-row>
        <table:table-row table:style-name="ro1">
          <table:table-cell/>
          <table:table-cell office:value-type="float" office:value="28.852567" calcext:value-type="float">
            <text:p>2,89E+01</text:p>
          </table:table-cell>
          <table:table-cell office:value-type="float" office:value="32.943743" calcext:value-type="float">
            <text:p>3,29E+01</text:p>
          </table:table-cell>
          <table:table-cell office:value-type="float" office:value="82.906258" calcext:value-type="float">
            <text:p>8,29E+01</text:p>
          </table:table-cell>
        </table:table-row>
        <table:table-row table:style-name="ro1">
          <table:table-cell/>
          <table:table-cell office:value-type="float" office:value="-3.233447" calcext:value-type="float">
            <text:p>-3,23E+00</text:p>
          </table:table-cell>
          <table:table-cell office:value-type="float" office:value="30.787362" calcext:value-type="float">
            <text:p>3,08E+01</text:p>
          </table:table-cell>
          <table:table-cell office:value-type="float" office:value="90.636602" calcext:value-type="float">
            <text:p>9,06E+01</text:p>
          </table:table-cell>
        </table:table-row>
        <table:table-row table:style-name="ro1">
          <table:table-cell/>
          <table:table-cell office:value-type="float" office:value="5.477916" calcext:value-type="float">
            <text:p>5,48E+00</text:p>
          </table:table-cell>
          <table:table-cell office:value-type="float" office:value="29.492062" calcext:value-type="float">
            <text:p>2,95E+01</text:p>
          </table:table-cell>
          <table:table-cell office:value-type="float" office:value="90.10871" calcext:value-type="float">
            <text:p>9,01E+01</text:p>
          </table:table-cell>
        </table:table-row>
        <table:table-row table:style-name="ro1">
          <table:table-cell/>
          <table:table-cell office:value-type="float" office:value="13.392606" calcext:value-type="float">
            <text:p>1,34E+01</text:p>
          </table:table-cell>
          <table:table-cell office:value-type="float" office:value="24.379898" calcext:value-type="float">
            <text:p>2,44E+01</text:p>
          </table:table-cell>
          <table:table-cell office:value-type="float" office:value="87.644137" calcext:value-type="float">
            <text:p>8,76E+01</text:p>
          </table:table-cell>
        </table:table-row>
        <table:table-row table:style-name="ro1">
          <table:table-cell/>
          <table:table-cell office:value-type="float" office:value="-20.695131" calcext:value-type="float">
            <text:p>-2,07E+01</text:p>
          </table:table-cell>
          <table:table-cell office:value-type="float" office:value="22.305826" calcext:value-type="float">
            <text:p>2,23E+01</text:p>
          </table:table-cell>
          <table:table-cell office:value-type="float" office:value="87.342078" calcext:value-type="float">
            <text:p>8,73E+01</text:p>
          </table:table-cell>
        </table:table-row>
        <table:table-row table:style-name="ro1">
          <table:table-cell/>
          <table:table-cell office:value-type="float" office:value="-16.926428" calcext:value-type="float">
            <text:p>-1,69E+01</text:p>
          </table:table-cell>
          <table:table-cell office:value-type="float" office:value="17.553846" calcext:value-type="float">
            <text:p>1,76E+01</text:p>
          </table:table-cell>
          <table:table-cell office:value-type="float" office:value="85.175825" calcext:value-type="float">
            <text:p>8,52E+01</text:p>
          </table:table-cell>
        </table:table-row>
        <table:table-row table:style-name="ro1">
          <table:table-cell/>
          <table:table-cell office:value-type="float" office:value="-14.48172" calcext:value-type="float">
            <text:p>-1,45E+01</text:p>
          </table:table-cell>
          <table:table-cell office:value-type="float" office:value="19.579528" calcext:value-type="float">
            <text:p>1,96E+01</text:p>
          </table:table-cell>
          <table:table-cell office:value-type="float" office:value="82.124082" calcext:value-type="float">
            <text:p>8,21E+01</text:p>
          </table:table-cell>
        </table:table-row>
        <table:table-row table:style-name="ro1">
          <table:table-cell/>
          <table:table-cell office:value-type="float" office:value="-27.905974" calcext:value-type="float">
            <text:p>-2,79E+01</text:p>
          </table:table-cell>
          <table:table-cell office:value-type="float" office:value="15.325625" calcext:value-type="float">
            <text:p>1,53E+01</text:p>
          </table:table-cell>
          <table:table-cell office:value-type="float" office:value="79.802494" calcext:value-type="float">
            <text:p>7,98E+01</text:p>
          </table:table-cell>
        </table:table-row>
        <table:table-row table:style-name="ro1">
          <table:table-cell/>
          <table:table-cell office:value-type="float" office:value="-20.603923" calcext:value-type="float">
            <text:p>-2,06E+01</text:p>
          </table:table-cell>
          <table:table-cell office:value-type="float" office:value="6.6050133" calcext:value-type="float">
            <text:p>6,61E+00</text:p>
          </table:table-cell>
          <table:table-cell office:value-type="float" office:value="76.940854" calcext:value-type="float">
            <text:p>7,69E+01</text:p>
          </table:table-cell>
        </table:table-row>
        <table:table-row table:style-name="ro1">
          <table:table-cell/>
          <table:table-cell office:value-type="float" office:value="2.4593617" calcext:value-type="float">
            <text:p>2,46E+00</text:p>
          </table:table-cell>
          <table:table-cell office:value-type="float" office:value="5.2064363" calcext:value-type="float">
            <text:p>5,21E+00</text:p>
          </table:table-cell>
          <table:table-cell office:value-type="float" office:value="74.902921" calcext:value-type="float">
            <text:p>7,49E+01</text:p>
          </table:table-cell>
        </table:table-row>
        <table:table-row table:style-name="ro1">
          <table:table-cell/>
          <table:table-cell office:value-type="float" office:value="8.0737094" calcext:value-type="float">
            <text:p>8,07E+00</text:p>
          </table:table-cell>
          <table:table-cell office:value-type="float" office:value="6.4408016" calcext:value-type="float">
            <text:p>6,44E+00</text:p>
          </table:table-cell>
          <table:table-cell office:value-type="float" office:value="74.552985" calcext:value-type="float">
            <text:p>7,46E+01</text:p>
          </table:table-cell>
        </table:table-row>
        <table:table-row table:style-name="ro1">
          <table:table-cell/>
          <table:table-cell office:value-type="float" office:value="-12.686365" calcext:value-type="float">
            <text:p>-1,27E+01</text:p>
          </table:table-cell>
          <table:table-cell office:value-type="float" office:value="5.8717881" calcext:value-type="float">
            <text:p>5,87E+00</text:p>
          </table:table-cell>
          <table:table-cell office:value-type="float" office:value="76.303274" calcext:value-type="float">
            <text:p>7,63E+01</text:p>
          </table:table-cell>
        </table:table-row>
        <table:table-row table:style-name="ro1">
          <table:table-cell/>
          <table:table-cell office:value-type="float" office:value="21.295614" calcext:value-type="float">
            <text:p>2,13E+01</text:p>
          </table:table-cell>
          <table:table-cell office:value-type="float" office:value="2.3152379" calcext:value-type="float">
            <text:p>2,32E+00</text:p>
          </table:table-cell>
          <table:table-cell office:value-type="float" office:value="75.263331" calcext:value-type="float">
            <text:p>7,53E+01</text:p>
          </table:table-cell>
        </table:table-row>
        <table:table-row table:style-name="ro1">
          <table:table-cell/>
          <table:table-cell office:value-type="float" office:value="-5.5340049" calcext:value-type="float">
            <text:p>-5,53E+00</text:p>
          </table:table-cell>
          <table:table-cell office:value-type="float" office:value="-0.10420402" calcext:value-type="float">
            <text:p>-1,04E-01</text:p>
          </table:table-cell>
          <table:table-cell office:value-type="float" office:value="73.798002" calcext:value-type="float">
            <text:p>7,38E+01</text:p>
          </table:table-cell>
        </table:table-row>
        <table:table-row table:style-name="ro1">
          <table:table-cell/>
          <table:table-cell office:value-type="float" office:value="-14.094586" calcext:value-type="float">
            <text:p>-1,41E+01</text:p>
          </table:table-cell>
          <table:table-cell office:value-type="float" office:value="-5.1907858" calcext:value-type="float">
            <text:p>-5,19E+00</text:p>
          </table:table-cell>
          <table:table-cell office:value-type="float" office:value="73.311743" calcext:value-type="float">
            <text:p>7,33E+01</text:p>
          </table:table-cell>
        </table:table-row>
        <table:table-row table:style-name="ro1">
          <table:table-cell/>
          <table:table-cell office:value-type="float" office:value="-41.144816" calcext:value-type="float">
            <text:p>-4,11E+01</text:p>
          </table:table-cell>
          <table:table-cell office:value-type="float" office:value="-0.070250454" calcext:value-type="float">
            <text:p>-7,03E-02</text:p>
          </table:table-cell>
          <table:table-cell office:value-type="float" office:value="69.25655" calcext:value-type="float">
            <text:p>6,93E+01</text:p>
          </table:table-cell>
        </table:table-row>
        <table:table-row table:style-name="ro1">
          <table:table-cell/>
          <table:table-cell office:value-type="float" office:value="-30.203598" calcext:value-type="float">
            <text:p>-3,02E+01</text:p>
          </table:table-cell>
          <table:table-cell office:value-type="float" office:value="4.0168636" calcext:value-type="float">
            <text:p>4,02E+00</text:p>
          </table:table-cell>
          <table:table-cell office:value-type="float" office:value="65.202347" calcext:value-type="float">
            <text:p>6,52E+01</text:p>
          </table:table-cell>
        </table:table-row>
        <table:table-row table:style-name="ro1">
          <table:table-cell/>
          <table:table-cell office:value-type="float" office:value="19.756817" calcext:value-type="float">
            <text:p>1,98E+01</text:p>
          </table:table-cell>
          <table:table-cell office:value-type="float" office:value="2.0747382" calcext:value-type="float">
            <text:p>2,07E+00</text:p>
          </table:table-cell>
          <table:table-cell office:value-type="float" office:value="64.137486" calcext:value-type="float">
            <text:p>6,41E+01</text:p>
          </table:table-cell>
        </table:table-row>
        <table:table-row table:style-name="ro1">
          <table:table-cell/>
          <table:table-cell office:value-type="float" office:value="44.158066" calcext:value-type="float">
            <text:p>4,42E+01</text:p>
          </table:table-cell>
          <table:table-cell office:value-type="float" office:value="-11.635205" calcext:value-type="float">
            <text:p>-1,16E+01</text:p>
          </table:table-cell>
          <table:table-cell office:value-type="float" office:value="66.031619" calcext:value-type="float">
            <text:p>6,60E+01</text:p>
          </table:table-cell>
        </table:table-row>
        <table:table-row table:style-name="ro1">
          <table:table-cell/>
          <table:table-cell office:value-type="float" office:value="-9.4134027" calcext:value-type="float">
            <text:p>-9,41E+00</text:p>
          </table:table-cell>
          <table:table-cell office:value-type="float" office:value="-26.989275" calcext:value-type="float">
            <text:p>-2,70E+01</text:p>
          </table:table-cell>
          <table:table-cell office:value-type="float" office:value="64.476268" calcext:value-type="float">
            <text:p>6,45E+01</text:p>
          </table:table-cell>
        </table:table-row>
        <table:table-row table:style-name="ro1">
          <table:table-cell/>
          <table:table-cell office:value-type="float" office:value="-1.7563488" calcext:value-type="float">
            <text:p>-1,76E+00</text:p>
          </table:table-cell>
          <table:table-cell office:value-type="float" office:value="-28.56019" calcext:value-type="float">
            <text:p>-2,86E+01</text:p>
          </table:table-cell>
          <table:table-cell office:value-type="float" office:value="62.795197" calcext:value-type="float">
            <text:p>6,28E+01</text:p>
          </table:table-cell>
        </table:table-row>
        <table:table-row table:style-name="ro1">
          <table:table-cell/>
          <table:table-cell office:value-type="float" office:value="-3.2718849" calcext:value-type="float">
            <text:p>-3,27E+00</text:p>
          </table:table-cell>
          <table:table-cell office:value-type="float" office:value="-18.118631" calcext:value-type="float">
            <text:p>-1,81E+01</text:p>
          </table:table-cell>
          <table:table-cell office:value-type="float" office:value="63.037695" calcext:value-type="float">
            <text:p>6,30E+01</text:p>
          </table:table-cell>
        </table:table-row>
        <table:table-row table:style-name="ro1">
          <table:table-cell/>
          <table:table-cell office:value-type="float" office:value="38.182463" calcext:value-type="float">
            <text:p>3,82E+01</text:p>
          </table:table-cell>
          <table:table-cell office:value-type="float" office:value="-17.815095" calcext:value-type="float">
            <text:p>-1,78E+01</text:p>
          </table:table-cell>
          <table:table-cell office:value-type="float" office:value="63.383152" calcext:value-type="float">
            <text:p>6,34E+01</text:p>
          </table:table-cell>
        </table:table-row>
        <table:table-row table:style-name="ro1">
          <table:table-cell/>
          <table:table-cell office:value-type="float" office:value="12.823165" calcext:value-type="float">
            <text:p>1,28E+01</text:p>
          </table:table-cell>
          <table:table-cell office:value-type="float" office:value="-16.074045" calcext:value-type="float">
            <text:p>-1,61E+01</text:p>
          </table:table-cell>
          <table:table-cell office:value-type="float" office:value="62.912592" calcext:value-type="float">
            <text:p>6,29E+01</text:p>
          </table:table-cell>
        </table:table-row>
        <table:table-row table:style-name="ro1">
          <table:table-cell/>
          <table:table-cell office:value-type="float" office:value="-24.833825" calcext:value-type="float">
            <text:p>-2,48E+01</text:p>
          </table:table-cell>
          <table:table-cell office:value-type="float" office:value="-12.980612" calcext:value-type="float">
            <text:p>-1,30E+01</text:p>
          </table:table-cell>
          <table:table-cell office:value-type="float" office:value="62.491246" calcext:value-type="float">
            <text:p>6,25E+01</text:p>
          </table:table-cell>
        </table:table-row>
        <table:table-row table:style-name="ro1">
          <table:table-cell/>
          <table:table-cell office:value-type="float" office:value="-33.239484" calcext:value-type="float">
            <text:p>-3,32E+01</text:p>
          </table:table-cell>
          <table:table-cell office:value-type="float" office:value="-11.752929" calcext:value-type="float">
            <text:p>-1,18E+01</text:p>
          </table:table-cell>
          <table:table-cell office:value-type="float" office:value="57.772362" calcext:value-type="float">
            <text:p>5,78E+01</text:p>
          </table:table-cell>
        </table:table-row>
        <table:table-row table:style-name="ro1">
          <table:table-cell/>
          <table:table-cell office:value-type="float" office:value="-69.05838" calcext:value-type="float">
            <text:p>-6,91E+01</text:p>
          </table:table-cell>
          <table:table-cell office:value-type="float" office:value="-8.8587205" calcext:value-type="float">
            <text:p>-8,86E+00</text:p>
          </table:table-cell>
          <table:table-cell office:value-type="float" office:value="55.610994" calcext:value-type="float">
            <text:p>5,56E+01</text:p>
          </table:table-cell>
        </table:table-row>
        <table:table-row table:style-name="ro1">
          <table:table-cell/>
          <table:table-cell office:value-type="float" office:value="22.053562" calcext:value-type="float">
            <text:p>2,21E+01</text:p>
          </table:table-cell>
          <table:table-cell office:value-type="float" office:value="-7.1496591" calcext:value-type="float">
            <text:p>-7,15E+00</text:p>
          </table:table-cell>
          <table:table-cell office:value-type="float" office:value="47.631983" calcext:value-type="float">
            <text:p>4,76E+01</text:p>
          </table:table-cell>
        </table:table-row>
        <table:table-row table:style-name="ro1">
          <table:table-cell/>
          <table:table-cell office:value-type="float" office:value="5.2622851" calcext:value-type="float">
            <text:p>5,26E+00</text:p>
          </table:table-cell>
          <table:table-cell office:value-type="float" office:value="-5.8493926" calcext:value-type="float">
            <text:p>-5,85E+00</text:p>
          </table:table-cell>
          <table:table-cell office:value-type="float" office:value="45.218187" calcext:value-type="float">
            <text:p>4,52E+01</text:p>
          </table:table-cell>
        </table:table-row>
        <table:table-row table:style-name="ro1">
          <table:table-cell/>
          <table:table-cell office:value-type="float" office:value="39.375126" calcext:value-type="float">
            <text:p>3,94E+01</text:p>
          </table:table-cell>
          <table:table-cell office:value-type="float" office:value="-6.0256147" calcext:value-type="float">
            <text:p>-6,03E+00</text:p>
          </table:table-cell>
          <table:table-cell office:value-type="float" office:value="46.868042" calcext:value-type="float">
            <text:p>4,69E+01</text:p>
          </table:table-cell>
        </table:table-row>
        <table:table-row table:style-name="ro1">
          <table:table-cell/>
          <table:table-cell office:value-type="float" office:value="4.775544" calcext:value-type="float">
            <text:p>4,78E+00</text:p>
          </table:table-cell>
          <table:table-cell office:value-type="float" office:value="-14.599633" calcext:value-type="float">
            <text:p>-1,46E+01</text:p>
          </table:table-cell>
          <table:table-cell office:value-type="float" office:value="49.090574" calcext:value-type="float">
            <text:p>4,91E+01</text:p>
          </table:table-cell>
        </table:table-row>
        <table:table-row table:style-name="ro1">
          <table:table-cell/>
          <table:table-cell office:value-type="float" office:value="39.798695" calcext:value-type="float">
            <text:p>3,98E+01</text:p>
          </table:table-cell>
          <table:table-cell office:value-type="float" office:value="-21.648058" calcext:value-type="float">
            <text:p>-2,16E+01</text:p>
          </table:table-cell>
          <table:table-cell office:value-type="float" office:value="47.067962" calcext:value-type="float">
            <text:p>4,71E+01</text:p>
          </table:table-cell>
        </table:table-row>
        <table:table-row table:style-name="ro1">
          <table:table-cell/>
          <table:table-cell office:value-type="float" office:value="-3.3638374" calcext:value-type="float">
            <text:p>-3,36E+00</text:p>
          </table:table-cell>
          <table:table-cell office:value-type="float" office:value="-22.325852" calcext:value-type="float">
            <text:p>-2,23E+01</text:p>
          </table:table-cell>
          <table:table-cell office:value-type="float" office:value="49.308285" calcext:value-type="float">
            <text:p>4,93E+01</text:p>
          </table:table-cell>
        </table:table-row>
        <table:table-row table:style-name="ro1">
          <table:table-cell/>
          <table:table-cell office:value-type="float" office:value="14.313223" calcext:value-type="float">
            <text:p>1,43E+01</text:p>
          </table:table-cell>
          <table:table-cell office:value-type="float" office:value="-20.394489" calcext:value-type="float">
            <text:p>-2,04E+01</text:p>
          </table:table-cell>
          <table:table-cell office:value-type="float" office:value="49.144534" calcext:value-type="float">
            <text:p>4,91E+01</text:p>
          </table:table-cell>
        </table:table-row>
        <table:table-row table:style-name="ro1">
          <table:table-cell/>
          <table:table-cell office:value-type="float" office:value="-5.6917081" calcext:value-type="float">
            <text:p>-5,69E+00</text:p>
          </table:table-cell>
          <table:table-cell office:value-type="float" office:value="-18.57067" calcext:value-type="float">
            <text:p>-1,86E+01</text:p>
          </table:table-cell>
          <table:table-cell office:value-type="float" office:value="49.186035" calcext:value-type="float">
            <text:p>4,92E+01</text:p>
          </table:table-cell>
        </table:table-row>
        <table:table-row table:style-name="ro1">
          <table:table-cell/>
          <table:table-cell office:value-type="float" office:value="8.0173133" calcext:value-type="float">
            <text:p>8,02E+00</text:p>
          </table:table-cell>
          <table:table-cell office:value-type="float" office:value="-14.091428" calcext:value-type="float">
            <text:p>-1,41E+01</text:p>
          </table:table-cell>
          <table:table-cell office:value-type="float" office:value="46.914662" calcext:value-type="float">
            <text:p>4,69E+01</text:p>
          </table:table-cell>
        </table:table-row>
        <table:table-row table:style-name="ro1">
          <table:table-cell/>
          <table:table-cell office:value-type="float" office:value="-17.607974" calcext:value-type="float">
            <text:p>-1,76E+01</text:p>
          </table:table-cell>
          <table:table-cell office:value-type="float" office:value="-20.428498" calcext:value-type="float">
            <text:p>-2,04E+01</text:p>
          </table:table-cell>
          <table:table-cell office:value-type="float" office:value="47.33767" calcext:value-type="float">
            <text:p>4,73E+01</text:p>
          </table:table-cell>
        </table:table-row>
        <table:table-row table:style-name="ro1">
          <table:table-cell/>
          <table:table-cell office:value-type="float" office:value="2.5346595" calcext:value-type="float">
            <text:p>2,53E+00</text:p>
          </table:table-cell>
          <table:table-cell office:value-type="float" office:value="-19.406725" calcext:value-type="float">
            <text:p>-1,94E+01</text:p>
          </table:table-cell>
          <table:table-cell office:value-type="float" office:value="44.928493" calcext:value-type="float">
            <text:p>4,49E+01</text:p>
          </table:table-cell>
        </table:table-row>
        <table:table-row table:style-name="ro1">
          <table:table-cell/>
          <table:table-cell office:value-type="float" office:value="7.6943842" calcext:value-type="float">
            <text:p>7,69E+00</text:p>
          </table:table-cell>
          <table:table-cell office:value-type="float" office:value="-15.441912" calcext:value-type="float">
            <text:p>-1,54E+01</text:p>
          </table:table-cell>
          <table:table-cell office:value-type="float" office:value="44.82119" calcext:value-type="float">
            <text:p>4,48E+01</text:p>
          </table:table-cell>
        </table:table-row>
        <table:table-row table:style-name="ro1">
          <table:table-cell/>
          <table:table-cell office:value-type="float" office:value="-6.0900669" calcext:value-type="float">
            <text:p>-6,09E+00</text:p>
          </table:table-cell>
          <table:table-cell office:value-type="float" office:value="-12.943613" calcext:value-type="float">
            <text:p>-1,29E+01</text:p>
          </table:table-cell>
          <table:table-cell office:value-type="float" office:value="44.667483" calcext:value-type="float">
            <text:p>4,47E+01</text:p>
          </table:table-cell>
        </table:table-row>
        <table:table-row table:style-name="ro1">
          <table:table-cell/>
          <table:table-cell office:value-type="float" office:value="4.3625695" calcext:value-type="float">
            <text:p>4,36E+00</text:p>
          </table:table-cell>
          <table:table-cell office:value-type="float" office:value="-10.709081" calcext:value-type="float">
            <text:p>-1,07E+01</text:p>
          </table:table-cell>
          <table:table-cell office:value-type="float" office:value="44.830665" calcext:value-type="float">
            <text:p>4,48E+01</text:p>
          </table:table-cell>
        </table:table-row>
        <table:table-row table:style-name="ro1">
          <table:table-cell/>
          <table:table-cell office:value-type="float" office:value="-8.3663759" calcext:value-type="float">
            <text:p>-8,37E+00</text:p>
          </table:table-cell>
          <table:table-cell office:value-type="float" office:value="-11.038437" calcext:value-type="float">
            <text:p>-1,10E+01</text:p>
          </table:table-cell>
          <table:table-cell office:value-type="float" office:value="45.151206" calcext:value-type="float">
            <text:p>4,52E+01</text:p>
          </table:table-cell>
        </table:table-row>
        <table:table-row table:style-name="ro1">
          <table:table-cell/>
          <table:table-cell office:value-type="float" office:value="27.81477" calcext:value-type="float">
            <text:p>2,78E+01</text:p>
          </table:table-cell>
          <table:table-cell office:value-type="float" office:value="-16.187144" calcext:value-type="float">
            <text:p>-1,62E+01</text:p>
          </table:table-cell>
          <table:table-cell office:value-type="float" office:value="44.718634" calcext:value-type="float">
            <text:p>4,47E+01</text:p>
          </table:table-cell>
        </table:table-row>
        <table:table-row table:style-name="ro1">
          <table:table-cell/>
          <table:table-cell office:value-type="float" office:value="-15.603203" calcext:value-type="float">
            <text:p>-1,56E+01</text:p>
          </table:table-cell>
          <table:table-cell office:value-type="float" office:value="-19.207493" calcext:value-type="float">
            <text:p>-1,92E+01</text:p>
          </table:table-cell>
          <table:table-cell office:value-type="float" office:value="43.680613" calcext:value-type="float">
            <text:p>4,37E+01</text:p>
          </table:table-cell>
        </table:table-row>
        <table:table-row table:style-name="ro1">
          <table:table-cell/>
          <table:table-cell office:value-type="float" office:value="-37.171427" calcext:value-type="float">
            <text:p>-3,72E+01</text:p>
          </table:table-cell>
          <table:table-cell office:value-type="float" office:value="-18.687426" calcext:value-type="float">
            <text:p>-1,87E+01</text:p>
          </table:table-cell>
          <table:table-cell office:value-type="float" office:value="43.116599" calcext:value-type="float">
            <text:p>4,31E+01</text:p>
          </table:table-cell>
        </table:table-row>
        <table:table-row table:style-name="ro1">
          <table:table-cell/>
          <table:table-cell office:value-type="float" office:value="10.282813" calcext:value-type="float">
            <text:p>1,03E+01</text:p>
          </table:table-cell>
          <table:table-cell office:value-type="float" office:value="-16.778861" calcext:value-type="float">
            <text:p>-1,68E+01</text:p>
          </table:table-cell>
          <table:table-cell office:value-type="float" office:value="42.066028" calcext:value-type="float">
            <text:p>4,21E+01</text:p>
          </table:table-cell>
        </table:table-row>
        <table:table-row table:style-name="ro1">
          <table:table-cell/>
          <table:table-cell office:value-type="float" office:value="9.1332902" calcext:value-type="float">
            <text:p>9,13E+00</text:p>
          </table:table-cell>
          <table:table-cell office:value-type="float" office:value="-16.058733" calcext:value-type="float">
            <text:p>-1,61E+01</text:p>
          </table:table-cell>
          <table:table-cell office:value-type="float" office:value="41.99781" calcext:value-type="float">
            <text:p>4,20E+01</text:p>
          </table:table-cell>
        </table:table-row>
        <table:table-row table:style-name="ro1">
          <table:table-cell/>
          <table:table-cell office:value-type="float" office:value="0.37627615" calcext:value-type="float">
            <text:p>3,76E-01</text:p>
          </table:table-cell>
          <table:table-cell office:value-type="float" office:value="-11.620012" calcext:value-type="float">
            <text:p>-1,16E+01</text:p>
          </table:table-cell>
          <table:table-cell office:value-type="float" office:value="41.633873" calcext:value-type="float">
            <text:p>4,16E+01</text:p>
          </table:table-cell>
        </table:table-row>
        <table:table-row table:style-name="ro1">
          <table:table-cell/>
          <table:table-cell office:value-type="float" office:value="-0.88554222" calcext:value-type="float">
            <text:p>-8,86E-01</text:p>
          </table:table-cell>
          <table:table-cell office:value-type="float" office:value="-13.406032" calcext:value-type="float">
            <text:p>-1,34E+01</text:p>
          </table:table-cell>
          <table:table-cell office:value-type="float" office:value="38.906986" calcext:value-type="float">
            <text:p>3,89E+01</text:p>
          </table:table-cell>
        </table:table-row>
        <table:table-row table:style-name="ro1">
          <table:table-cell/>
          <table:table-cell office:value-type="float" office:value="-27.678762" calcext:value-type="float">
            <text:p>-2,77E+01</text:p>
          </table:table-cell>
          <table:table-cell office:value-type="float" office:value="-15.460787" calcext:value-type="float">
            <text:p>-1,55E+01</text:p>
          </table:table-cell>
          <table:table-cell office:value-type="float" office:value="36.807968" calcext:value-type="float">
            <text:p>3,68E+01</text:p>
          </table:table-cell>
        </table:table-row>
        <table:table-row table:style-name="ro1">
          <table:table-cell/>
          <table:table-cell office:value-type="float" office:value="32.84694" calcext:value-type="float">
            <text:p>3,28E+01</text:p>
          </table:table-cell>
          <table:table-cell office:value-type="float" office:value="-17.063529" calcext:value-type="float">
            <text:p>-1,71E+01</text:p>
          </table:table-cell>
          <table:table-cell office:value-type="float" office:value="34.406341" calcext:value-type="float">
            <text:p>3,44E+01</text:p>
          </table:table-cell>
        </table:table-row>
        <table:table-row table:style-name="ro1">
          <table:table-cell/>
          <table:table-cell office:value-type="float" office:value="4.8174606" calcext:value-type="float">
            <text:p>4,82E+00</text:p>
          </table:table-cell>
          <table:table-cell office:value-type="float" office:value="-15.149842" calcext:value-type="float">
            <text:p>-1,51E+01</text:p>
          </table:table-cell>
          <table:table-cell office:value-type="float" office:value="34.712132" calcext:value-type="float">
            <text:p>3,47E+01</text:p>
          </table:table-cell>
        </table:table-row>
        <table:table-row table:style-name="ro1">
          <table:table-cell/>
          <table:table-cell office:value-type="float" office:value="-9.3888162" calcext:value-type="float">
            <text:p>-9,39E+00</text:p>
          </table:table-cell>
          <table:table-cell office:value-type="float" office:value="-11.88597" calcext:value-type="float">
            <text:p>-1,19E+01</text:p>
          </table:table-cell>
          <table:table-cell office:value-type="float" office:value="35.948683" calcext:value-type="float">
            <text:p>3,59E+01</text:p>
          </table:table-cell>
        </table:table-row>
        <table:table-row table:style-name="ro1">
          <table:table-cell/>
          <table:table-cell office:value-type="float" office:value="-32.223765" calcext:value-type="float">
            <text:p>-3,22E+01</text:p>
          </table:table-cell>
          <table:table-cell office:value-type="float" office:value="-12.206272" calcext:value-type="float">
            <text:p>-1,22E+01</text:p>
          </table:table-cell>
          <table:table-cell office:value-type="float" office:value="35.79818" calcext:value-type="float">
            <text:p>3,58E+01</text:p>
          </table:table-cell>
        </table:table-row>
        <table:table-row table:style-name="ro1">
          <table:table-cell/>
          <table:table-cell office:value-type="float" office:value="-33.627147" calcext:value-type="float">
            <text:p>-3,36E+01</text:p>
          </table:table-cell>
          <table:table-cell office:value-type="float" office:value="-18.064192" calcext:value-type="float">
            <text:p>-1,81E+01</text:p>
          </table:table-cell>
          <table:table-cell office:value-type="float" office:value="34.242495" calcext:value-type="float">
            <text:p>3,42E+01</text:p>
          </table:table-cell>
        </table:table-row>
        <table:table-row table:style-name="ro1">
          <table:table-cell/>
          <table:table-cell office:value-type="float" office:value="23.814017" calcext:value-type="float">
            <text:p>2,38E+01</text:p>
          </table:table-cell>
          <table:table-cell office:value-type="float" office:value="-30.415359" calcext:value-type="float">
            <text:p>-3,04E+01</text:p>
          </table:table-cell>
          <table:table-cell office:value-type="float" office:value="31.529545" calcext:value-type="float">
            <text:p>3,15E+01</text:p>
          </table:table-cell>
        </table:table-row>
        <table:table-row table:style-name="ro1">
          <table:table-cell/>
          <table:table-cell office:value-type="float" office:value="-3.1434254" calcext:value-type="float">
            <text:p>-3,14E+00</text:p>
          </table:table-cell>
          <table:table-cell office:value-type="float" office:value="-34.78657" calcext:value-type="float">
            <text:p>-3,48E+01</text:p>
          </table:table-cell>
          <table:table-cell office:value-type="float" office:value="31.494449" calcext:value-type="float">
            <text:p>3,15E+01</text:p>
          </table:table-cell>
        </table:table-row>
        <table:table-row table:style-name="ro1">
          <table:table-cell/>
          <table:table-cell office:value-type="float" office:value="42.433561" calcext:value-type="float">
            <text:p>4,24E+01</text:p>
          </table:table-cell>
          <table:table-cell office:value-type="float" office:value="-28.283794" calcext:value-type="float">
            <text:p>-2,83E+01</text:p>
          </table:table-cell>
          <table:table-cell office:value-type="float" office:value="31.121187" calcext:value-type="float">
            <text:p>3,11E+01</text:p>
          </table:table-cell>
        </table:table-row>
        <table:table-row table:style-name="ro1">
          <table:table-cell/>
          <table:table-cell office:value-type="float" office:value="36.776132" calcext:value-type="float">
            <text:p>3,68E+01</text:p>
          </table:table-cell>
          <table:table-cell office:value-type="float" office:value="-20.513981" calcext:value-type="float">
            <text:p>-2,05E+01</text:p>
          </table:table-cell>
          <table:table-cell office:value-type="float" office:value="31.614078" calcext:value-type="float">
            <text:p>3,16E+01</text:p>
          </table:table-cell>
        </table:table-row>
        <table:table-row table:style-name="ro1">
          <table:table-cell/>
          <table:table-cell office:value-type="float" office:value="10.236695" calcext:value-type="float">
            <text:p>1,02E+01</text:p>
          </table:table-cell>
          <table:table-cell office:value-type="float" office:value="-20.129152" calcext:value-type="float">
            <text:p>-2,01E+01</text:p>
          </table:table-cell>
          <table:table-cell office:value-type="float" office:value="32.378585" calcext:value-type="float">
            <text:p>3,24E+01</text:p>
          </table:table-cell>
        </table:table-row>
        <table:table-row table:style-name="ro1">
          <table:table-cell/>
          <table:table-cell office:value-type="float" office:value="6.6985244" calcext:value-type="float">
            <text:p>6,70E+00</text:p>
          </table:table-cell>
          <table:table-cell office:value-type="float" office:value="-20.655566" calcext:value-type="float">
            <text:p>-2,07E+01</text:p>
          </table:table-cell>
          <table:table-cell office:value-type="float" office:value="28.507874" calcext:value-type="float">
            <text:p>2,85E+01</text:p>
          </table:table-cell>
        </table:table-row>
        <table:table-row table:style-name="ro1">
          <table:table-cell/>
          <table:table-cell office:value-type="float" office:value="-22.438595" calcext:value-type="float">
            <text:p>-2,24E+01</text:p>
          </table:table-cell>
          <table:table-cell office:value-type="float" office:value="-21.707229" calcext:value-type="float">
            <text:p>-2,17E+01</text:p>
          </table:table-cell>
          <table:table-cell office:value-type="float" office:value="23.136331" calcext:value-type="float">
            <text:p>2,31E+01</text:p>
          </table:table-cell>
        </table:table-row>
        <table:table-row table:style-name="ro1">
          <table:table-cell/>
          <table:table-cell office:value-type="float" office:value="0.21597024" calcext:value-type="float">
            <text:p>2,16E-01</text:p>
          </table:table-cell>
          <table:table-cell office:value-type="float" office:value="-29.906067" calcext:value-type="float">
            <text:p>-2,99E+01</text:p>
          </table:table-cell>
          <table:table-cell office:value-type="float" office:value="-8.6422823" calcext:value-type="float">
            <text:p>-8,64E+00</text:p>
          </table:table-cell>
        </table:table-row>
        <table:table-row table:style-name="ro1">
          <table:table-cell/>
          <table:table-cell office:value-type="float" office:value="-10.782047" calcext:value-type="float">
            <text:p>-1,08E+01</text:p>
          </table:table-cell>
          <table:table-cell office:value-type="float" office:value="-33.742532" calcext:value-type="float">
            <text:p>-3,37E+01</text:p>
          </table:table-cell>
          <table:table-cell office:value-type="float" office:value="-32.27532" calcext:value-type="float">
            <text:p>-3,23E+01</text:p>
          </table:table-cell>
        </table:table-row>
        <table:table-row table:style-name="ro1">
          <table:table-cell/>
          <table:table-cell office:value-type="float" office:value="2.2642261" calcext:value-type="float">
            <text:p>2,26E+00</text:p>
          </table:table-cell>
          <table:table-cell office:value-type="float" office:value="-39.107835" calcext:value-type="float">
            <text:p>-3,91E+01</text:p>
          </table:table-cell>
          <table:table-cell office:value-type="float" office:value="-39.730776" calcext:value-type="float">
            <text:p>-3,97E+01</text:p>
          </table:table-cell>
        </table:table-row>
        <table:table-row table:style-name="ro1">
          <table:table-cell/>
          <table:table-cell office:value-type="float" office:value="25.374219" calcext:value-type="float">
            <text:p>2,54E+01</text:p>
          </table:table-cell>
          <table:table-cell office:value-type="float" office:value="-41.637208" calcext:value-type="float">
            <text:p>-4,16E+01</text:p>
          </table:table-cell>
          <table:table-cell office:value-type="float" office:value="-39.854409" calcext:value-type="float">
            <text:p>-3,99E+01</text:p>
          </table:table-cell>
        </table:table-row>
        <table:table-row table:style-name="ro1">
          <table:table-cell/>
          <table:table-cell office:value-type="float" office:value="16.307774" calcext:value-type="float">
            <text:p>1,63E+01</text:p>
          </table:table-cell>
          <table:table-cell office:value-type="float" office:value="-42.217344" calcext:value-type="float">
            <text:p>-4,22E+01</text:p>
          </table:table-cell>
          <table:table-cell office:value-type="float" office:value="-47.462268" calcext:value-type="float">
            <text:p>-4,75E+01</text:p>
          </table:table-cell>
        </table:table-row>
        <table:table-row table:style-name="ro1">
          <table:table-cell/>
          <table:table-cell office:value-type="float" office:value="23.651939" calcext:value-type="float">
            <text:p>2,37E+01</text:p>
          </table:table-cell>
          <table:table-cell office:value-type="float" office:value="-47.388655" calcext:value-type="float">
            <text:p>-4,74E+01</text:p>
          </table:table-cell>
          <table:table-cell office:value-type="float" office:value="-59.138248" calcext:value-type="float">
            <text:p>-5,91E+01</text:p>
          </table:table-cell>
        </table:table-row>
        <table:table-row table:style-name="ro1">
          <table:table-cell/>
          <table:table-cell office:value-type="float" office:value="13.37591" calcext:value-type="float">
            <text:p>1,34E+01</text:p>
          </table:table-cell>
          <table:table-cell office:value-type="float" office:value="-43.61041" calcext:value-type="float">
            <text:p>-4,36E+01</text:p>
          </table:table-cell>
          <table:table-cell office:value-type="float" office:value="-50.796089" calcext:value-type="float">
            <text:p>-5,08E+01</text:p>
          </table:table-cell>
        </table:table-row>
        <table:table-row table:style-name="ro1">
          <table:table-cell/>
          <table:table-cell office:value-type="float" office:value="-84.990519" calcext:value-type="float">
            <text:p>-8,50E+01</text:p>
          </table:table-cell>
          <table:table-cell office:value-type="float" office:value="-28.522284" calcext:value-type="float">
            <text:p>-2,85E+01</text:p>
          </table:table-cell>
          <table:table-cell office:value-type="float" office:value="-43.227428" calcext:value-type="float">
            <text:p>-4,32E+01</text:p>
          </table:table-cell>
        </table:table-row>
        <table:table-row table:style-name="ro1">
          <table:table-cell/>
          <table:table-cell office:value-type="float" office:value="7.7588405" calcext:value-type="float">
            <text:p>7,76E+00</text:p>
          </table:table-cell>
          <table:table-cell office:value-type="float" office:value="-28.179743" calcext:value-type="float">
            <text:p>-2,82E+01</text:p>
          </table:table-cell>
          <table:table-cell office:value-type="float" office:value="-43.955318" calcext:value-type="float">
            <text:p>-4,40E+01</text:p>
          </table:table-cell>
        </table:table-row>
        <table:table-row table:style-name="ro1">
          <table:table-cell/>
          <table:table-cell office:value-type="float" office:value="19.992559" calcext:value-type="float">
            <text:p>2,00E+01</text:p>
          </table:table-cell>
          <table:table-cell office:value-type="float" office:value="-29.791726" calcext:value-type="float">
            <text:p>-2,98E+01</text:p>
          </table:table-cell>
          <table:table-cell office:value-type="float" office:value="-38.952554" calcext:value-type="float">
            <text:p>-3,90E+01</text:p>
          </table:table-cell>
        </table:table-row>
        <table:table-row table:style-name="ro1">
          <table:table-cell/>
          <table:table-cell office:value-type="float" office:value="3.6266063" calcext:value-type="float">
            <text:p>3,63E+00</text:p>
          </table:table-cell>
          <table:table-cell office:value-type="float" office:value="-29.464658" calcext:value-type="float">
            <text:p>-2,95E+01</text:p>
          </table:table-cell>
          <table:table-cell office:value-type="float" office:value="-34.173745" calcext:value-type="float">
            <text:p>-3,42E+01</text:p>
          </table:table-cell>
        </table:table-row>
        <table:table-row table:style-name="ro1">
          <table:table-cell/>
          <table:table-cell office:value-type="float" office:value="-14.913496" calcext:value-type="float">
            <text:p>-1,49E+01</text:p>
          </table:table-cell>
          <table:table-cell office:value-type="float" office:value="-24.412579" calcext:value-type="float">
            <text:p>-2,44E+01</text:p>
          </table:table-cell>
          <table:table-cell office:value-type="float" office:value="-19.793958" calcext:value-type="float">
            <text:p>-1,98E+01</text:p>
          </table:table-cell>
        </table:table-row>
        <table:table-row table:style-name="ro1">
          <table:table-cell/>
          <table:table-cell office:value-type="float" office:value="-15.119945" calcext:value-type="float">
            <text:p>-1,51E+01</text:p>
          </table:table-cell>
          <table:table-cell office:value-type="float" office:value="-23.846409" calcext:value-type="float">
            <text:p>-2,38E+01</text:p>
          </table:table-cell>
          <table:table-cell office:value-type="float" office:value="-16.981311" calcext:value-type="float">
            <text:p>-1,70E+01</text:p>
          </table:table-cell>
        </table:table-row>
        <table:table-row table:style-name="ro1">
          <table:table-cell/>
          <table:table-cell office:value-type="float" office:value="-16.309721" calcext:value-type="float">
            <text:p>-1,63E+01</text:p>
          </table:table-cell>
          <table:table-cell office:value-type="float" office:value="-19.287239" calcext:value-type="float">
            <text:p>-1,93E+01</text:p>
          </table:table-cell>
          <table:table-cell office:value-type="float" office:value="-15.702903" calcext:value-type="float">
            <text:p>-1,57E+01</text:p>
          </table:table-cell>
        </table:table-row>
        <table:table-row table:style-name="ro1">
          <table:table-cell/>
          <table:table-cell office:value-type="float" office:value="14.822209" calcext:value-type="float">
            <text:p>1,48E+01</text:p>
          </table:table-cell>
          <table:table-cell office:value-type="float" office:value="-13.734028" calcext:value-type="float">
            <text:p>-1,37E+01</text:p>
          </table:table-cell>
          <table:table-cell office:value-type="float" office:value="-12.562525" calcext:value-type="float">
            <text:p>-1,26E+01</text:p>
          </table:table-cell>
        </table:table-row>
        <table:table-row table:style-name="ro1">
          <table:table-cell/>
          <table:table-cell office:value-type="float" office:value="17.470658" calcext:value-type="float">
            <text:p>1,75E+01</text:p>
          </table:table-cell>
          <table:table-cell office:value-type="float" office:value="-7.3184914" calcext:value-type="float">
            <text:p>-7,32E+00</text:p>
          </table:table-cell>
          <table:table-cell office:value-type="float" office:value="-10.836047" calcext:value-type="float">
            <text:p>-1,08E+01</text:p>
          </table:table-cell>
        </table:table-row>
        <table:table-row table:style-name="ro1">
          <table:table-cell/>
          <table:table-cell office:value-type="float" office:value="-6.4674892" calcext:value-type="float">
            <text:p>-6,47E+00</text:p>
          </table:table-cell>
          <table:table-cell office:value-type="float" office:value="-13.196537" calcext:value-type="float">
            <text:p>-1,32E+01</text:p>
          </table:table-cell>
          <table:table-cell office:value-type="float" office:value="-8.7882424" calcext:value-type="float">
            <text:p>-8,79E+00</text:p>
          </table:table-cell>
        </table:table-row>
        <table:table-row table:style-name="ro1">
          <table:table-cell/>
          <table:table-cell office:value-type="float" office:value="54.318648" calcext:value-type="float">
            <text:p>5,43E+01</text:p>
          </table:table-cell>
          <table:table-cell office:value-type="float" office:value="-14.912229" calcext:value-type="float">
            <text:p>-1,49E+01</text:p>
          </table:table-cell>
          <table:table-cell office:value-type="float" office:value="-6.1549843" calcext:value-type="float">
            <text:p>-6,15E+00</text:p>
          </table:table-cell>
        </table:table-row>
        <table:table-row table:style-name="ro1">
          <table:table-cell/>
          <table:table-cell office:value-type="float" office:value="16.408299" calcext:value-type="float">
            <text:p>1,64E+01</text:p>
          </table:table-cell>
          <table:table-cell office:value-type="float" office:value="-4.6836299" calcext:value-type="float">
            <text:p>-4,68E+00</text:p>
          </table:table-cell>
          <table:table-cell office:value-type="float" office:value="-6.2823469" calcext:value-type="float">
            <text:p>-6,28E+00</text:p>
          </table:table-cell>
        </table:table-row>
        <table:table-row table:style-name="ro1">
          <table:table-cell/>
          <table:table-cell office:value-type="float" office:value="-12.476234" calcext:value-type="float">
            <text:p>-1,25E+01</text:p>
          </table:table-cell>
          <table:table-cell office:value-type="float" office:value="-5.5048995" calcext:value-type="float">
            <text:p>-5,50E+00</text:p>
          </table:table-cell>
          <table:table-cell office:value-type="float" office:value="-10.591038" calcext:value-type="float">
            <text:p>-1,06E+01</text:p>
          </table:table-cell>
        </table:table-row>
        <table:table-row table:style-name="ro1">
          <table:table-cell/>
          <table:table-cell office:value-type="float" office:value="4.0221815" calcext:value-type="float">
            <text:p>4,02E+00</text:p>
          </table:table-cell>
          <table:table-cell office:value-type="float" office:value="-1.4225609" calcext:value-type="float">
            <text:p>-1,42E+00</text:p>
          </table:table-cell>
          <table:table-cell office:value-type="float" office:value="-11.067882" calcext:value-type="float">
            <text:p>-1,11E+01</text:p>
          </table:table-cell>
        </table:table-row>
        <table:table-row table:style-name="ro1">
          <table:table-cell/>
          <table:table-cell office:value-type="float" office:value="-9.5514251" calcext:value-type="float">
            <text:p>-9,55E+00</text:p>
          </table:table-cell>
          <table:table-cell office:value-type="float" office:value="0.5631624" calcext:value-type="float">
            <text:p>5,63E-01</text:p>
          </table:table-cell>
          <table:table-cell office:value-type="float" office:value="-13.542264" calcext:value-type="float">
            <text:p>-1,35E+01</text:p>
          </table:table-cell>
        </table:table-row>
        <table:table-row table:style-name="ro1">
          <table:table-cell/>
          <table:table-cell office:value-type="float" office:value="1.534998" calcext:value-type="float">
            <text:p>1,53E+00</text:p>
          </table:table-cell>
          <table:table-cell office:value-type="float" office:value="2.585384" calcext:value-type="float">
            <text:p>2,59E+00</text:p>
          </table:table-cell>
          <table:table-cell office:value-type="float" office:value="-19.03643" calcext:value-type="float">
            <text:p>-1,90E+01</text:p>
          </table:table-cell>
        </table:table-row>
        <table:table-row table:style-name="ro1">
          <table:table-cell/>
          <table:table-cell office:value-type="float" office:value="-16.277676" calcext:value-type="float">
            <text:p>-1,63E+01</text:p>
          </table:table-cell>
          <table:table-cell office:value-type="float" office:value="4.2153765" calcext:value-type="float">
            <text:p>4,22E+00</text:p>
          </table:table-cell>
          <table:table-cell office:value-type="float" office:value="-30.111892" calcext:value-type="float">
            <text:p>-3,01E+01</text:p>
          </table:table-cell>
        </table:table-row>
        <table:table-row table:style-name="ro1">
          <table:table-cell/>
          <table:table-cell office:value-type="float" office:value="1.6799597" calcext:value-type="float">
            <text:p>1,68E+00</text:p>
          </table:table-cell>
          <table:table-cell office:value-type="float" office:value="8.3586955" calcext:value-type="float">
            <text:p>8,36E+00</text:p>
          </table:table-cell>
          <table:table-cell office:value-type="float" office:value="-30.413691" calcext:value-type="float">
            <text:p>-3,04E+01</text:p>
          </table:table-cell>
        </table:table-row>
        <table:table-row table:style-name="ro1">
          <table:table-cell/>
          <table:table-cell office:value-type="float" office:value="7.5517335" calcext:value-type="float">
            <text:p>7,55E+00</text:p>
          </table:table-cell>
          <table:table-cell office:value-type="float" office:value="9.9951385" calcext:value-type="float">
            <text:p>1,00E+01</text:p>
          </table:table-cell>
          <table:table-cell office:value-type="float" office:value="-35.314277" calcext:value-type="float">
            <text:p>-3,53E+01</text:p>
          </table:table-cell>
        </table:table-row>
        <table:table-row table:style-name="ro1">
          <table:table-cell/>
          <table:table-cell office:value-type="float" office:value="6.4679014" calcext:value-type="float">
            <text:p>6,47E+00</text:p>
          </table:table-cell>
          <table:table-cell office:value-type="float" office:value="8.0458397" calcext:value-type="float">
            <text:p>8,05E+00</text:p>
          </table:table-cell>
          <table:table-cell office:value-type="float" office:value="-30.046746" calcext:value-type="float">
            <text:p>-3,00E+01</text:p>
          </table:table-cell>
        </table:table-row>
        <table:table-row table:style-name="ro1">
          <table:table-cell/>
          <table:table-cell office:value-type="float" office:value="-5.8841549" calcext:value-type="float">
            <text:p>-5,88E+00</text:p>
          </table:table-cell>
          <table:table-cell office:value-type="float" office:value="6.7866224" calcext:value-type="float">
            <text:p>6,79E+00</text:p>
          </table:table-cell>
          <table:table-cell office:value-type="float" office:value="-28.337194" calcext:value-type="float">
            <text:p>-2,83E+01</text:p>
          </table:table-cell>
        </table:table-row>
        <table:table-row table:style-name="ro1">
          <table:table-cell/>
          <table:table-cell office:value-type="float" office:value="-7.0028353" calcext:value-type="float">
            <text:p>-7,00E+00</text:p>
          </table:table-cell>
          <table:table-cell office:value-type="float" office:value="-1.4706064" calcext:value-type="float">
            <text:p>-1,47E+00</text:p>
          </table:table-cell>
          <table:table-cell office:value-type="float" office:value="-31.498233" calcext:value-type="float">
            <text:p>-3,15E+01</text:p>
          </table:table-cell>
        </table:table-row>
        <table:table-row table:style-name="ro1">
          <table:table-cell/>
          <table:table-cell office:value-type="float" office:value="8.8564418" calcext:value-type="float">
            <text:p>8,86E+00</text:p>
          </table:table-cell>
          <table:table-cell office:value-type="float" office:value="-2.8061936" calcext:value-type="float">
            <text:p>-2,81E+00</text:p>
          </table:table-cell>
          <table:table-cell office:value-type="float" office:value="-36.474806" calcext:value-type="float">
            <text:p>-3,65E+01</text:p>
          </table:table-cell>
        </table:table-row>
        <table:table-row table:style-name="ro1">
          <table:table-cell/>
          <table:table-cell office:value-type="float" office:value="23.819467" calcext:value-type="float">
            <text:p>2,38E+01</text:p>
          </table:table-cell>
          <table:table-cell office:value-type="float" office:value="-1.0495323" calcext:value-type="float">
            <text:p>-1,05E+00</text:p>
          </table:table-cell>
          <table:table-cell office:value-type="float" office:value="-40.260406" calcext:value-type="float">
            <text:p>-4,03E+01</text:p>
          </table:table-cell>
        </table:table-row>
        <table:table-row table:style-name="ro1">
          <table:table-cell/>
          <table:table-cell office:value-type="float" office:value="7.2006221" calcext:value-type="float">
            <text:p>7,20E+00</text:p>
          </table:table-cell>
          <table:table-cell office:value-type="float" office:value="0.14341779" calcext:value-type="float">
            <text:p>1,43E-01</text:p>
          </table:table-cell>
          <table:table-cell office:value-type="float" office:value="-44.089115" calcext:value-type="float">
            <text:p>-4,41E+01</text:p>
          </table:table-cell>
        </table:table-row>
        <table:table-row table:style-name="ro1">
          <table:table-cell/>
          <table:table-cell office:value-type="float" office:value="33.654643" calcext:value-type="float">
            <text:p>3,37E+01</text:p>
          </table:table-cell>
          <table:table-cell office:value-type="float" office:value="4.1204807" calcext:value-type="float">
            <text:p>4,12E+00</text:p>
          </table:table-cell>
          <table:table-cell office:value-type="float" office:value="-50.300766" calcext:value-type="float">
            <text:p>-5,03E+01</text:p>
          </table:table-cell>
        </table:table-row>
        <table:table-row table:style-name="ro1">
          <table:table-cell/>
          <table:table-cell office:value-type="float" office:value="9.0170516" calcext:value-type="float">
            <text:p>9,02E+00</text:p>
          </table:table-cell>
          <table:table-cell office:value-type="float" office:value="8.2012024" calcext:value-type="float">
            <text:p>8,20E+00</text:p>
          </table:table-cell>
          <table:table-cell office:value-type="float" office:value="-53.667893" calcext:value-type="float">
            <text:p>-5,37E+01</text:p>
          </table:table-cell>
        </table:table-row>
        <table:table-row table:style-name="ro1">
          <table:table-cell/>
          <table:table-cell office:value-type="float" office:value="4.8244307" calcext:value-type="float">
            <text:p>4,82E+00</text:p>
          </table:table-cell>
          <table:table-cell office:value-type="float" office:value="7.8077636" calcext:value-type="float">
            <text:p>7,81E+00</text:p>
          </table:table-cell>
          <table:table-cell office:value-type="float" office:value="-43.156209" calcext:value-type="float">
            <text:p>-4,32E+01</text:p>
          </table:table-cell>
        </table:table-row>
        <table:table-row table:style-name="ro1">
          <table:table-cell/>
          <table:table-cell office:value-type="float" office:value="-57.784646" calcext:value-type="float">
            <text:p>-5,78E+01</text:p>
          </table:table-cell>
          <table:table-cell office:value-type="float" office:value="10.732402" calcext:value-type="float">
            <text:p>1,07E+01</text:p>
          </table:table-cell>
          <table:table-cell office:value-type="float" office:value="-30.74942" calcext:value-type="float">
            <text:p>-3,07E+01</text:p>
          </table:table-cell>
        </table:table-row>
        <table:table-row table:style-name="ro1">
          <table:table-cell/>
          <table:table-cell office:value-type="float" office:value="-9.8360289" calcext:value-type="float">
            <text:p>-9,84E+00</text:p>
          </table:table-cell>
          <table:table-cell office:value-type="float" office:value="6.9149882" calcext:value-type="float">
            <text:p>6,91E+00</text:p>
          </table:table-cell>
          <table:table-cell office:value-type="float" office:value="-27.586977" calcext:value-type="float">
            <text:p>-2,76E+01</text:p>
          </table:table-cell>
        </table:table-row>
        <table:table-row table:style-name="ro1">
          <table:table-cell/>
          <table:table-cell office:value-type="float" office:value="8.2603026" calcext:value-type="float">
            <text:p>8,26E+00</text:p>
          </table:table-cell>
          <table:table-cell office:value-type="float" office:value="10.754091" calcext:value-type="float">
            <text:p>1,08E+01</text:p>
          </table:table-cell>
          <table:table-cell office:value-type="float" office:value="-21.328513" calcext:value-type="float">
            <text:p>-2,13E+01</text:p>
          </table:table-cell>
        </table:table-row>
        <table:table-row table:style-name="ro1">
          <table:table-cell/>
          <table:table-cell office:value-type="float" office:value="8.7731623" calcext:value-type="float">
            <text:p>8,77E+00</text:p>
          </table:table-cell>
          <table:table-cell office:value-type="float" office:value="10.720149" calcext:value-type="float">
            <text:p>1,07E+01</text:p>
          </table:table-cell>
          <table:table-cell office:value-type="float" office:value="-12.311553" calcext:value-type="float">
            <text:p>-1,23E+01</text:p>
          </table:table-cell>
        </table:table-row>
        <table:table-row table:style-name="ro1">
          <table:table-cell/>
          <table:table-cell office:value-type="float" office:value="-1.6070155" calcext:value-type="float">
            <text:p>-1,61E+00</text:p>
          </table:table-cell>
          <table:table-cell office:value-type="float" office:value="11.512004" calcext:value-type="float">
            <text:p>1,15E+01</text:p>
          </table:table-cell>
          <table:table-cell office:value-type="float" office:value="-15.592991" calcext:value-type="float">
            <text:p>-1,56E+01</text:p>
          </table:table-cell>
        </table:table-row>
        <table:table-row table:style-name="ro1">
          <table:table-cell/>
          <table:table-cell office:value-type="float" office:value="0.75292669" calcext:value-type="float">
            <text:p>7,53E-01</text:p>
          </table:table-cell>
          <table:table-cell office:value-type="float" office:value="4.750811" calcext:value-type="float">
            <text:p>4,75E+00</text:p>
          </table:table-cell>
          <table:table-cell office:value-type="float" office:value="-20.096505" calcext:value-type="float">
            <text:p>-2,01E+01</text:p>
          </table:table-cell>
        </table:table-row>
        <table:table-row table:style-name="ro1">
          <table:table-cell/>
          <table:table-cell office:value-type="float" office:value="10.491548" calcext:value-type="float">
            <text:p>1,05E+01</text:p>
          </table:table-cell>
          <table:table-cell office:value-type="float" office:value="2.8586272" calcext:value-type="float">
            <text:p>2,86E+00</text:p>
          </table:table-cell>
          <table:table-cell office:value-type="float" office:value="-21.96274" calcext:value-type="float">
            <text:p>-2,20E+01</text:p>
          </table:table-cell>
        </table:table-row>
        <table:table-row table:style-name="ro1">
          <table:table-cell/>
          <table:table-cell office:value-type="float" office:value="17.854315" calcext:value-type="float">
            <text:p>1,79E+01</text:p>
          </table:table-cell>
          <table:table-cell office:value-type="float" office:value="6.7366479" calcext:value-type="float">
            <text:p>6,74E+00</text:p>
          </table:table-cell>
          <table:table-cell office:value-type="float" office:value="-26.279139" calcext:value-type="float">
            <text:p>-2,63E+01</text:p>
          </table:table-cell>
        </table:table-row>
        <table:table-row table:style-name="ro1">
          <table:table-cell/>
          <table:table-cell office:value-type="float" office:value="1.6479207" calcext:value-type="float">
            <text:p>1,65E+00</text:p>
          </table:table-cell>
          <table:table-cell office:value-type="float" office:value="6.7918846" calcext:value-type="float">
            <text:p>6,79E+00</text:p>
          </table:table-cell>
          <table:table-cell office:value-type="float" office:value="-24.281556" calcext:value-type="float">
            <text:p>-2,43E+01</text:p>
          </table:table-cell>
        </table:table-row>
        <table:table-row table:style-name="ro1">
          <table:table-cell/>
          <table:table-cell office:value-type="float" office:value="11.256173" calcext:value-type="float">
            <text:p>1,13E+01</text:p>
          </table:table-cell>
          <table:table-cell office:value-type="float" office:value="8.3143384" calcext:value-type="float">
            <text:p>8,31E+00</text:p>
          </table:table-cell>
          <table:table-cell office:value-type="float" office:value="-21.029189" calcext:value-type="float">
            <text:p>-2,10E+01</text:p>
          </table:table-cell>
        </table:table-row>
        <table:table-row table:style-name="ro1">
          <table:table-cell/>
          <table:table-cell office:value-type="float" office:value="14.845881" calcext:value-type="float">
            <text:p>1,48E+01</text:p>
          </table:table-cell>
          <table:table-cell office:value-type="float" office:value="12.152016" calcext:value-type="float">
            <text:p>1,22E+01</text:p>
          </table:table-cell>
          <table:table-cell office:value-type="float" office:value="-21.263231" calcext:value-type="float">
            <text:p>-2,13E+01</text:p>
          </table:table-cell>
        </table:table-row>
        <table:table-row table:style-name="ro1">
          <table:table-cell/>
          <table:table-cell office:value-type="float" office:value="-6.9507835" calcext:value-type="float">
            <text:p>-6,95E+00</text:p>
          </table:table-cell>
          <table:table-cell office:value-type="float" office:value="10.884845" calcext:value-type="float">
            <text:p>1,09E+01</text:p>
          </table:table-cell>
          <table:table-cell office:value-type="float" office:value="-12.55686" calcext:value-type="float">
            <text:p>-1,26E+01</text:p>
          </table:table-cell>
        </table:table-row>
        <table:table-row table:style-name="ro1">
          <table:table-cell/>
          <table:table-cell office:value-type="float" office:value="-10.942252" calcext:value-type="float">
            <text:p>-1,09E+01</text:p>
          </table:table-cell>
          <table:table-cell office:value-type="float" office:value="12.045029" calcext:value-type="float">
            <text:p>1,20E+01</text:p>
          </table:table-cell>
          <table:table-cell office:value-type="float" office:value="-11.234152" calcext:value-type="float">
            <text:p>-1,12E+01</text:p>
          </table:table-cell>
        </table:table-row>
        <table:table-row table:style-name="ro1">
          <table:table-cell/>
          <table:table-cell office:value-type="float" office:value="5.0612951" calcext:value-type="float">
            <text:p>5,06E+00</text:p>
          </table:table-cell>
          <table:table-cell office:value-type="float" office:value="9.7307477" calcext:value-type="float">
            <text:p>9,73E+00</text:p>
          </table:table-cell>
          <table:table-cell office:value-type="float" office:value="-15.249667" calcext:value-type="float">
            <text:p>-1,52E+01</text:p>
          </table:table-cell>
        </table:table-row>
        <table:table-row table:style-name="ro1">
          <table:table-cell/>
          <table:table-cell office:value-type="float" office:value="17.593023" calcext:value-type="float">
            <text:p>1,76E+01</text:p>
          </table:table-cell>
          <table:table-cell office:value-type="float" office:value="9.5003898" calcext:value-type="float">
            <text:p>9,50E+00</text:p>
          </table:table-cell>
          <table:table-cell office:value-type="float" office:value="-20.056845" calcext:value-type="float">
            <text:p>-2,01E+01</text:p>
          </table:table-cell>
        </table:table-row>
        <table:table-row table:style-name="ro1">
          <table:table-cell/>
          <table:table-cell office:value-type="float" office:value="-5.3562539" calcext:value-type="float">
            <text:p>-5,36E+00</text:p>
          </table:table-cell>
          <table:table-cell office:value-type="float" office:value="4.8876619" calcext:value-type="float">
            <text:p>4,89E+00</text:p>
          </table:table-cell>
          <table:table-cell office:value-type="float" office:value="-33.1164" calcext:value-type="float">
            <text:p>-3,31E+01</text:p>
          </table:table-cell>
        </table:table-row>
        <table:table-row table:style-name="ro1">
          <table:table-cell/>
          <table:table-cell office:value-type="float" office:value="-11.069698" calcext:value-type="float">
            <text:p>-1,11E+01</text:p>
          </table:table-cell>
          <table:table-cell office:value-type="float" office:value="-1.1988665" calcext:value-type="float">
            <text:p>-1,20E+00</text:p>
          </table:table-cell>
          <table:table-cell office:value-type="float" office:value="-36.877085" calcext:value-type="float">
            <text:p>-3,69E+01</text:p>
          </table:table-cell>
        </table:table-row>
        <table:table-row table:style-name="ro1">
          <table:table-cell/>
          <table:table-cell office:value-type="float" office:value="-16.356467" calcext:value-type="float">
            <text:p>-1,64E+01</text:p>
          </table:table-cell>
          <table:table-cell office:value-type="float" office:value="-5.7500851" calcext:value-type="float">
            <text:p>-5,75E+00</text:p>
          </table:table-cell>
          <table:table-cell office:value-type="float" office:value="-43.390212" calcext:value-type="float">
            <text:p>-4,34E+01</text:p>
          </table:table-cell>
        </table:table-row>
        <table:table-row table:style-name="ro1">
          <table:table-cell/>
          <table:table-cell office:value-type="float" office:value="2.0726901" calcext:value-type="float">
            <text:p>2,07E+00</text:p>
          </table:table-cell>
          <table:table-cell office:value-type="float" office:value="-12.471856" calcext:value-type="float">
            <text:p>-1,25E+01</text:p>
          </table:table-cell>
          <table:table-cell office:value-type="float" office:value="-35.072926" calcext:value-type="float">
            <text:p>-3,51E+01</text:p>
          </table:table-cell>
        </table:table-row>
        <table:table-row table:style-name="ro1">
          <table:table-cell/>
          <table:table-cell office:value-type="float" office:value="-72.507984" calcext:value-type="float">
            <text:p>-7,25E+01</text:p>
          </table:table-cell>
          <table:table-cell office:value-type="float" office:value="-12.294257" calcext:value-type="float">
            <text:p>-1,23E+01</text:p>
          </table:table-cell>
          <table:table-cell office:value-type="float" office:value="2.3924157" calcext:value-type="float">
            <text:p>2,39E+00</text:p>
          </table:table-cell>
        </table:table-row>
        <table:table-row table:style-name="ro1">
          <table:table-cell/>
          <table:table-cell office:value-type="float" office:value="52.515634" calcext:value-type="float">
            <text:p>5,25E+01</text:p>
          </table:table-cell>
          <table:table-cell office:value-type="float" office:value="-14.240912" calcext:value-type="float">
            <text:p>-1,42E+01</text:p>
          </table:table-cell>
          <table:table-cell office:value-type="float" office:value="22.546899" calcext:value-type="float">
            <text:p>2,25E+01</text:p>
          </table:table-cell>
        </table:table-row>
        <table:table-row table:style-name="ro1">
          <table:table-cell/>
          <table:table-cell office:value-type="float" office:value="6.8410866" calcext:value-type="float">
            <text:p>6,84E+00</text:p>
          </table:table-cell>
          <table:table-cell office:value-type="float" office:value="-11.721" calcext:value-type="float">
            <text:p>-1,17E+01</text:p>
          </table:table-cell>
          <table:table-cell office:value-type="float" office:value="31.437471" calcext:value-type="float">
            <text:p>3,14E+01</text:p>
          </table:table-cell>
        </table:table-row>
        <table:table-row table:style-name="ro1">
          <table:table-cell/>
          <table:table-cell office:value-type="float" office:value="16.291965" calcext:value-type="float">
            <text:p>1,63E+01</text:p>
          </table:table-cell>
          <table:table-cell office:value-type="float" office:value="-9.4645709" calcext:value-type="float">
            <text:p>-9,46E+00</text:p>
          </table:table-cell>
          <table:table-cell office:value-type="float" office:value="22.677453" calcext:value-type="float">
            <text:p>2,27E+01</text:p>
          </table:table-cell>
        </table:table-row>
        <table:table-row table:style-name="ro1">
          <table:table-cell/>
          <table:table-cell office:value-type="float" office:value="4.1772023" calcext:value-type="float">
            <text:p>4,18E+00</text:p>
          </table:table-cell>
          <table:table-cell office:value-type="float" office:value="-4.1621354" calcext:value-type="float">
            <text:p>-4,16E+00</text:p>
          </table:table-cell>
          <table:table-cell office:value-type="float" office:value="5.6559678" calcext:value-type="float">
            <text:p>5,66E+00</text:p>
          </table:table-cell>
        </table:table-row>
        <table:table-row table:style-name="ro1">
          <table:table-cell/>
          <table:table-cell office:value-type="float" office:value="-3.574973" calcext:value-type="float">
            <text:p>-3,57E+00</text:p>
          </table:table-cell>
          <table:table-cell office:value-type="float" office:value="-2.6372904" calcext:value-type="float">
            <text:p>-2,64E+00</text:p>
          </table:table-cell>
          <table:table-cell office:value-type="float" office:value="-8.3601132" calcext:value-type="float">
            <text:p>-8,36E+00</text:p>
          </table:table-cell>
        </table:table-row>
        <table:table-row table:style-name="ro1">
          <table:table-cell/>
          <table:table-cell office:value-type="float" office:value="-6.1641239" calcext:value-type="float">
            <text:p>-6,16E+00</text:p>
          </table:table-cell>
          <table:table-cell office:value-type="float" office:value="0.58864481" calcext:value-type="float">
            <text:p>5,89E-01</text:p>
          </table:table-cell>
          <table:table-cell office:value-type="float" office:value="-28.202887" calcext:value-type="float">
            <text:p>-2,82E+01</text:p>
          </table:table-cell>
        </table:table-row>
        <table:table-row table:style-name="ro1">
          <table:table-cell/>
          <table:table-cell office:value-type="float" office:value="5.0640867" calcext:value-type="float">
            <text:p>5,06E+00</text:p>
          </table:table-cell>
          <table:table-cell office:value-type="float" office:value="0.986006" calcext:value-type="float">
            <text:p>9,86E-01</text:p>
          </table:table-cell>
          <table:table-cell office:value-type="float" office:value="-32.216803" calcext:value-type="float">
            <text:p>-3,22E+01</text:p>
          </table:table-cell>
        </table:table-row>
        <table:table-row table:style-name="ro1">
          <table:table-cell/>
          <table:table-cell office:value-type="float" office:value="-28.023398" calcext:value-type="float">
            <text:p>-2,80E+01</text:p>
          </table:table-cell>
          <table:table-cell office:value-type="float" office:value="-1.5247888" calcext:value-type="float">
            <text:p>-1,52E+00</text:p>
          </table:table-cell>
          <table:table-cell office:value-type="float" office:value="-28.315961" calcext:value-type="float">
            <text:p>-2,83E+01</text:p>
          </table:table-cell>
        </table:table-row>
        <table:table-row table:style-name="ro1">
          <table:table-cell/>
          <table:table-cell office:value-type="float" office:value="-3.5936037" calcext:value-type="float">
            <text:p>-3,59E+00</text:p>
          </table:table-cell>
          <table:table-cell office:value-type="float" office:value="-1.0572129" calcext:value-type="float">
            <text:p>-1,06E+00</text:p>
          </table:table-cell>
          <table:table-cell office:value-type="float" office:value="-28.467272" calcext:value-type="float">
            <text:p>-2,85E+01</text:p>
          </table:table-cell>
        </table:table-row>
        <table:table-row table:style-name="ro1">
          <table:table-cell/>
          <table:table-cell office:value-type="float" office:value="3.90939" calcext:value-type="float">
            <text:p>3,91E+00</text:p>
          </table:table-cell>
          <table:table-cell office:value-type="float" office:value="-0.60032006" calcext:value-type="float">
            <text:p>-6,00E-01</text:p>
          </table:table-cell>
          <table:table-cell office:value-type="float" office:value="-31.971838" calcext:value-type="float">
            <text:p>-3,20E+01</text:p>
          </table:table-cell>
        </table:table-row>
        <table:table-row table:style-name="ro1">
          <table:table-cell/>
          <table:table-cell office:value-type="float" office:value="19.955982" calcext:value-type="float">
            <text:p>2,00E+01</text:p>
          </table:table-cell>
          <table:table-cell office:value-type="float" office:value="-4.609778" calcext:value-type="float">
            <text:p>-4,61E+00</text:p>
          </table:table-cell>
          <table:table-cell office:value-type="float" office:value="-30.114268" calcext:value-type="float">
            <text:p>-3,01E+01</text:p>
          </table:table-cell>
        </table:table-row>
        <table:table-row table:style-name="ro1">
          <table:table-cell/>
          <table:table-cell office:value-type="float" office:value="-13.962024" calcext:value-type="float">
            <text:p>-1,40E+01</text:p>
          </table:table-cell>
          <table:table-cell office:value-type="float" office:value="-7.1340883" calcext:value-type="float">
            <text:p>-7,13E+00</text:p>
          </table:table-cell>
          <table:table-cell office:value-type="float" office:value="-27.313653" calcext:value-type="float">
            <text:p>-2,73E+01</text:p>
          </table:table-cell>
        </table:table-row>
        <table:table-row table:style-name="ro1">
          <table:table-cell/>
          <table:table-cell office:value-type="float" office:value="20.76972" calcext:value-type="float">
            <text:p>2,08E+01</text:p>
          </table:table-cell>
          <table:table-cell office:value-type="float" office:value="-5.2870823" calcext:value-type="float">
            <text:p>-5,29E+00</text:p>
          </table:table-cell>
          <table:table-cell office:value-type="float" office:value="-26.067967" calcext:value-type="float">
            <text:p>-2,61E+01</text:p>
          </table:table-cell>
        </table:table-row>
        <table:table-row table:style-name="ro1">
          <table:table-cell/>
          <table:table-cell office:value-type="float" office:value="-0.884585" calcext:value-type="float">
            <text:p>-8,85E-01</text:p>
          </table:table-cell>
          <table:table-cell office:value-type="float" office:value="-4.6701283" calcext:value-type="float">
            <text:p>-4,67E+00</text:p>
          </table:table-cell>
          <table:table-cell office:value-type="float" office:value="-21.786978" calcext:value-type="float">
            <text:p>-2,18E+01</text:p>
          </table:table-cell>
        </table:table-row>
        <table:table-row table:style-name="ro1">
          <table:table-cell/>
          <table:table-cell office:value-type="float" office:value="4.8657244" calcext:value-type="float">
            <text:p>4,87E+00</text:p>
          </table:table-cell>
          <table:table-cell office:value-type="float" office:value="-2.0734209" calcext:value-type="float">
            <text:p>-2,07E+00</text:p>
          </table:table-cell>
          <table:table-cell office:value-type="float" office:value="-24.824867" calcext:value-type="float">
            <text:p>-2,48E+01</text:p>
          </table:table-cell>
        </table:table-row>
        <table:table-row table:style-name="ro1">
          <table:table-cell/>
          <table:table-cell office:value-type="float" office:value="8.035831" calcext:value-type="float">
            <text:p>8,04E+00</text:p>
          </table:table-cell>
          <table:table-cell office:value-type="float" office:value="-5.7673103" calcext:value-type="float">
            <text:p>-5,77E+00</text:p>
          </table:table-cell>
          <table:table-cell office:value-type="float" office:value="-37.067596" calcext:value-type="float">
            <text:p>-3,71E+01</text:p>
          </table:table-cell>
        </table:table-row>
        <table:table-row table:style-name="ro1">
          <table:table-cell/>
          <table:table-cell office:value-type="float" office:value="1.3348299" calcext:value-type="float">
            <text:p>1,33E+00</text:p>
          </table:table-cell>
          <table:table-cell office:value-type="float" office:value="-10.216153" calcext:value-type="float">
            <text:p>-1,02E+01</text:p>
          </table:table-cell>
          <table:table-cell office:value-type="float" office:value="-43.574369" calcext:value-type="float">
            <text:p>-4,36E+01</text:p>
          </table:table-cell>
        </table:table-row>
        <table:table-row table:style-name="ro1">
          <table:table-cell/>
          <table:table-cell office:value-type="float" office:value="-16.511711" calcext:value-type="float">
            <text:p>-1,65E+01</text:p>
          </table:table-cell>
          <table:table-cell office:value-type="float" office:value="-14.998768" calcext:value-type="float">
            <text:p>-1,50E+01</text:p>
          </table:table-cell>
          <table:table-cell office:value-type="float" office:value="-44.414109" calcext:value-type="float">
            <text:p>-4,44E+01</text:p>
          </table:table-cell>
        </table:table-row>
        <table:table-row table:style-name="ro1">
          <table:table-cell/>
          <table:table-cell office:value-type="float" office:value="-12.964772" calcext:value-type="float">
            <text:p>-1,30E+01</text:p>
          </table:table-cell>
          <table:table-cell office:value-type="float" office:value="-18.049531" calcext:value-type="float">
            <text:p>-1,80E+01</text:p>
          </table:table-cell>
          <table:table-cell office:value-type="float" office:value="-42.54915" calcext:value-type="float">
            <text:p>-4,25E+01</text:p>
          </table:table-cell>
        </table:table-row>
        <table:table-row table:style-name="ro1">
          <table:table-cell/>
          <table:table-cell office:value-type="float" office:value="7.2050396" calcext:value-type="float">
            <text:p>7,21E+00</text:p>
          </table:table-cell>
          <table:table-cell office:value-type="float" office:value="-20.243147" calcext:value-type="float">
            <text:p>-2,02E+01</text:p>
          </table:table-cell>
          <table:table-cell office:value-type="float" office:value="-36.774065" calcext:value-type="float">
            <text:p>-3,68E+01</text:p>
          </table:table-cell>
        </table:table-row>
        <table:table-row table:style-name="ro1">
          <table:table-cell/>
          <table:table-cell office:value-type="float" office:value="-22.725925" calcext:value-type="float">
            <text:p>-2,27E+01</text:p>
          </table:table-cell>
          <table:table-cell office:value-type="float" office:value="-17.067111" calcext:value-type="float">
            <text:p>-1,71E+01</text:p>
          </table:table-cell>
          <table:table-cell office:value-type="float" office:value="-29.131018" calcext:value-type="float">
            <text:p>-2,91E+01</text:p>
          </table:table-cell>
        </table:table-row>
        <table:table-row table:style-name="ro1">
          <table:table-cell/>
          <table:table-cell office:value-type="float" office:value="4.9217814" calcext:value-type="float">
            <text:p>4,92E+00</text:p>
          </table:table-cell>
          <table:table-cell office:value-type="float" office:value="-20.494498" calcext:value-type="float">
            <text:p>-2,05E+01</text:p>
          </table:table-cell>
          <table:table-cell office:value-type="float" office:value="-24.029824" calcext:value-type="float">
            <text:p>-2,40E+01</text:p>
          </table:table-cell>
        </table:table-row>
        <table:table-row table:style-name="ro1">
          <table:table-cell/>
          <table:table-cell office:value-type="float" office:value="9.3790881" calcext:value-type="float">
            <text:p>9,38E+00</text:p>
          </table:table-cell>
          <table:table-cell office:value-type="float" office:value="-23.657601" calcext:value-type="float">
            <text:p>-2,37E+01</text:p>
          </table:table-cell>
          <table:table-cell office:value-type="float" office:value="-24.769818" calcext:value-type="float">
            <text:p>-2,48E+01</text:p>
          </table:table-cell>
        </table:table-row>
        <table:table-row table:style-name="ro1">
          <table:table-cell/>
          <table:table-cell office:value-type="float" office:value="-0.26620982" calcext:value-type="float">
            <text:p>-2,66E-01</text:p>
          </table:table-cell>
          <table:table-cell office:value-type="float" office:value="-24.209374" calcext:value-type="float">
            <text:p>-2,42E+01</text:p>
          </table:table-cell>
          <table:table-cell office:value-type="float" office:value="-27.496711" calcext:value-type="float">
            <text:p>-2,75E+01</text:p>
          </table:table-cell>
        </table:table-row>
        <table:table-row table:style-name="ro1">
          <table:table-cell/>
          <table:table-cell office:value-type="float" office:value="5.2456798" calcext:value-type="float">
            <text:p>5,25E+00</text:p>
          </table:table-cell>
          <table:table-cell office:value-type="float" office:value="-21.814152" calcext:value-type="float">
            <text:p>-2,18E+01</text:p>
          </table:table-cell>
          <table:table-cell office:value-type="float" office:value="-27.657618" calcext:value-type="float">
            <text:p>-2,77E+01</text:p>
          </table:table-cell>
        </table:table-row>
        <table:table-row table:style-name="ro1">
          <table:table-cell/>
          <table:table-cell office:value-type="float" office:value="15.860117" calcext:value-type="float">
            <text:p>1,59E+01</text:p>
          </table:table-cell>
          <table:table-cell office:value-type="float" office:value="-20.471188" calcext:value-type="float">
            <text:p>-2,05E+01</text:p>
          </table:table-cell>
          <table:table-cell office:value-type="float" office:value="-27.667438" calcext:value-type="float">
            <text:p>-2,77E+01</text:p>
          </table:table-cell>
        </table:table-row>
        <table:table-row table:style-name="ro1">
          <table:table-cell/>
          <table:table-cell office:value-type="float" office:value="-5.7212752" calcext:value-type="float">
            <text:p>-5,72E+00</text:p>
          </table:table-cell>
          <table:table-cell office:value-type="float" office:value="-16.234587" calcext:value-type="float">
            <text:p>-1,62E+01</text:p>
          </table:table-cell>
          <table:table-cell office:value-type="float" office:value="-32.93181" calcext:value-type="float">
            <text:p>-3,29E+01</text:p>
          </table:table-cell>
        </table:table-row>
        <table:table-row table:style-name="ro1">
          <table:table-cell/>
          <table:table-cell office:value-type="float" office:value="6.3474415" calcext:value-type="float">
            <text:p>6,35E+00</text:p>
          </table:table-cell>
          <table:table-cell office:value-type="float" office:value="-10.305029" calcext:value-type="float">
            <text:p>-1,03E+01</text:p>
          </table:table-cell>
          <table:table-cell office:value-type="float" office:value="-41.339754" calcext:value-type="float">
            <text:p>-4,13E+01</text:p>
          </table:table-cell>
        </table:table-row>
        <table:table-row table:style-name="ro1">
          <table:table-cell/>
          <table:table-cell office:value-type="float" office:value="-3.6506293" calcext:value-type="float">
            <text:p>-3,65E+00</text:p>
          </table:table-cell>
          <table:table-cell office:value-type="float" office:value="-10.696206" calcext:value-type="float">
            <text:p>-1,07E+01</text:p>
          </table:table-cell>
          <table:table-cell office:value-type="float" office:value="-42.520389" calcext:value-type="float">
            <text:p>-4,25E+01</text:p>
          </table:table-cell>
        </table:table-row>
        <table:table-row table:style-name="ro1">
          <table:table-cell/>
          <table:table-cell office:value-type="float" office:value="7.0129176" calcext:value-type="float">
            <text:p>7,01E+00</text:p>
          </table:table-cell>
          <table:table-cell office:value-type="float" office:value="-10.944981" calcext:value-type="float">
            <text:p>-1,09E+01</text:p>
          </table:table-cell>
          <table:table-cell office:value-type="float" office:value="-39.163666" calcext:value-type="float">
            <text:p>-3,92E+01</text:p>
          </table:table-cell>
        </table:table-row>
        <table:table-row table:style-name="ro1">
          <table:table-cell/>
          <table:table-cell office:value-type="float" office:value="-14.153565" calcext:value-type="float">
            <text:p>-1,42E+01</text:p>
          </table:table-cell>
          <table:table-cell office:value-type="float" office:value="-8.7624762" calcext:value-type="float">
            <text:p>-8,76E+00</text:p>
          </table:table-cell>
          <table:table-cell office:value-type="float" office:value="-36.975664" calcext:value-type="float">
            <text:p>-3,70E+01</text:p>
          </table:table-cell>
        </table:table-row>
        <table:table-row table:style-name="ro1">
          <table:table-cell/>
          <table:table-cell office:value-type="float" office:value="-14.087793" calcext:value-type="float">
            <text:p>-1,41E+01</text:p>
          </table:table-cell>
          <table:table-cell office:value-type="float" office:value="-8.3426734" calcext:value-type="float">
            <text:p>-8,34E+00</text:p>
          </table:table-cell>
          <table:table-cell office:value-type="float" office:value="-34.39316" calcext:value-type="float">
            <text:p>-3,44E+01</text:p>
          </table:table-cell>
        </table:table-row>
        <table:table-row table:style-name="ro1">
          <table:table-cell/>
          <table:table-cell office:value-type="float" office:value="3.7493294" calcext:value-type="float">
            <text:p>3,75E+00</text:p>
          </table:table-cell>
          <table:table-cell office:value-type="float" office:value="-6.9405013" calcext:value-type="float">
            <text:p>-6,94E+00</text:p>
          </table:table-cell>
          <table:table-cell office:value-type="float" office:value="-37.209705" calcext:value-type="float">
            <text:p>-3,72E+01</text:p>
          </table:table-cell>
        </table:table-row>
        <table:table-row table:style-name="ro1">
          <table:table-cell/>
          <table:table-cell office:value-type="float" office:value="-5.7215348" calcext:value-type="float">
            <text:p>-5,72E+00</text:p>
          </table:table-cell>
          <table:table-cell office:value-type="float" office:value="-9.6211533" calcext:value-type="float">
            <text:p>-9,62E+00</text:p>
          </table:table-cell>
          <table:table-cell office:value-type="float" office:value="-43.565331" calcext:value-type="float">
            <text:p>-4,36E+01</text:p>
          </table:table-cell>
        </table:table-row>
        <table:table-row table:style-name="ro1">
          <table:table-cell/>
          <table:table-cell office:value-type="float" office:value="12.172075" calcext:value-type="float">
            <text:p>1,22E+01</text:p>
          </table:table-cell>
          <table:table-cell office:value-type="float" office:value="-13.51666" calcext:value-type="float">
            <text:p>-1,35E+01</text:p>
          </table:table-cell>
          <table:table-cell office:value-type="float" office:value="-49.777458" calcext:value-type="float">
            <text:p>-4,98E+01</text:p>
          </table:table-cell>
        </table:table-row>
        <table:table-row table:style-name="ro1">
          <table:table-cell/>
          <table:table-cell office:value-type="float" office:value="-3.5550544" calcext:value-type="float">
            <text:p>-3,56E+00</text:p>
          </table:table-cell>
          <table:table-cell office:value-type="float" office:value="-16.305239" calcext:value-type="float">
            <text:p>-1,63E+01</text:p>
          </table:table-cell>
          <table:table-cell office:value-type="float" office:value="-51.065947" calcext:value-type="float">
            <text:p>-5,11E+01</text:p>
          </table:table-cell>
        </table:table-row>
        <table:table-row table:style-name="ro1">
          <table:table-cell/>
          <table:table-cell office:value-type="float" office:value="0.2267495" calcext:value-type="float">
            <text:p>2,27E-01</text:p>
          </table:table-cell>
          <table:table-cell office:value-type="float" office:value="-12.900191" calcext:value-type="float">
            <text:p>-1,29E+01</text:p>
          </table:table-cell>
          <table:table-cell office:value-type="float" office:value="-53.271231" calcext:value-type="float">
            <text:p>-5,33E+01</text:p>
          </table:table-cell>
        </table:table-row>
        <table:table-row table:style-name="ro1">
          <table:table-cell/>
          <table:table-cell office:value-type="float" office:value="9.2547625" calcext:value-type="float">
            <text:p>9,25E+00</text:p>
          </table:table-cell>
          <table:table-cell office:value-type="float" office:value="-14.770019" calcext:value-type="float">
            <text:p>-1,48E+01</text:p>
          </table:table-cell>
          <table:table-cell office:value-type="float" office:value="-51.937118" calcext:value-type="float">
            <text:p>-5,19E+01</text:p>
          </table:table-cell>
        </table:table-row>
        <table:table-row table:style-name="ro1">
          <table:table-cell/>
          <table:table-cell office:value-type="float" office:value="1.2684528" calcext:value-type="float">
            <text:p>1,27E+00</text:p>
          </table:table-cell>
          <table:table-cell office:value-type="float" office:value="-16.642444" calcext:value-type="float">
            <text:p>-1,66E+01</text:p>
          </table:table-cell>
          <table:table-cell office:value-type="float" office:value="-62.612195" calcext:value-type="float">
            <text:p>-6,26E+01</text:p>
          </table:table-cell>
        </table:table-row>
        <table:table-row table:style-name="ro1">
          <table:table-cell/>
          <table:table-cell office:value-type="float" office:value="7.6712915" calcext:value-type="float">
            <text:p>7,67E+00</text:p>
          </table:table-cell>
          <table:table-cell office:value-type="float" office:value="-18.613468" calcext:value-type="float">
            <text:p>-1,86E+01</text:p>
          </table:table-cell>
          <table:table-cell office:value-type="float" office:value="-74.027987" calcext:value-type="float">
            <text:p>-7,40E+01</text:p>
          </table:table-cell>
        </table:table-row>
        <table:table-row table:style-name="ro1">
          <table:table-cell/>
          <table:table-cell office:value-type="float" office:value="3.823687" calcext:value-type="float">
            <text:p>3,82E+00</text:p>
          </table:table-cell>
          <table:table-cell office:value-type="float" office:value="-21.281366" calcext:value-type="float">
            <text:p>-2,13E+01</text:p>
          </table:table-cell>
          <table:table-cell office:value-type="float" office:value="-71.124684" calcext:value-type="float">
            <text:p>-7,11E+01</text:p>
          </table:table-cell>
        </table:table-row>
        <table:table-row table:style-name="ro1">
          <table:table-cell/>
          <table:table-cell office:value-type="float" office:value="-3.533768" calcext:value-type="float">
            <text:p>-3,53E+00</text:p>
          </table:table-cell>
          <table:table-cell office:value-type="float" office:value="-24.09437" calcext:value-type="float">
            <text:p>-2,41E+01</text:p>
          </table:table-cell>
          <table:table-cell office:value-type="float" office:value="-71.63001" calcext:value-type="float">
            <text:p>-7,16E+01</text:p>
          </table:table-cell>
        </table:table-row>
        <table:table-row table:style-name="ro1">
          <table:table-cell/>
          <table:table-cell office:value-type="float" office:value="-1.7991262" calcext:value-type="float">
            <text:p>-1,80E+00</text:p>
          </table:table-cell>
          <table:table-cell office:value-type="float" office:value="-21.990202" calcext:value-type="float">
            <text:p>-2,20E+01</text:p>
          </table:table-cell>
          <table:table-cell office:value-type="float" office:value="-69.754983" calcext:value-type="float">
            <text:p>-6,98E+01</text:p>
          </table:table-cell>
        </table:table-row>
        <table:table-row table:style-name="ro1">
          <table:table-cell/>
          <table:table-cell office:value-type="float" office:value="-9.1477598" calcext:value-type="float">
            <text:p>-9,15E+00</text:p>
          </table:table-cell>
          <table:table-cell office:value-type="float" office:value="-19.470124" calcext:value-type="float">
            <text:p>-1,95E+01</text:p>
          </table:table-cell>
          <table:table-cell office:value-type="float" office:value="-60.002646" calcext:value-type="float">
            <text:p>-6,00E+01</text:p>
          </table:table-cell>
        </table:table-row>
        <table:table-row table:style-name="ro1">
          <table:table-cell/>
          <table:table-cell office:value-type="float" office:value="8.7955872" calcext:value-type="float">
            <text:p>8,80E+00</text:p>
          </table:table-cell>
          <table:table-cell office:value-type="float" office:value="-14.025083" calcext:value-type="float">
            <text:p>-1,40E+01</text:p>
          </table:table-cell>
          <table:table-cell office:value-type="float" office:value="-52.276066" calcext:value-type="float">
            <text:p>-5,23E+01</text:p>
          </table:table-cell>
        </table:table-row>
        <table:table-row table:style-name="ro1">
          <table:table-cell/>
          <table:table-cell office:value-type="float" office:value="6.2147821" calcext:value-type="float">
            <text:p>6,21E+00</text:p>
          </table:table-cell>
          <table:table-cell office:value-type="float" office:value="-16.990867" calcext:value-type="float">
            <text:p>-1,70E+01</text:p>
          </table:table-cell>
          <table:table-cell office:value-type="float" office:value="-44.611058" calcext:value-type="float">
            <text:p>-4,46E+01</text:p>
          </table:table-cell>
        </table:table-row>
        <table:table-row table:style-name="ro1">
          <table:table-cell/>
          <table:table-cell office:value-type="float" office:value="-7.8782584" calcext:value-type="float">
            <text:p>-7,88E+00</text:p>
          </table:table-cell>
          <table:table-cell office:value-type="float" office:value="-16.569835" calcext:value-type="float">
            <text:p>-1,66E+01</text:p>
          </table:table-cell>
          <table:table-cell office:value-type="float" office:value="-42.170597" calcext:value-type="float">
            <text:p>-4,22E+01</text:p>
          </table:table-cell>
        </table:table-row>
        <table:table-row table:style-name="ro1">
          <table:table-cell/>
          <table:table-cell office:value-type="float" office:value="-2.1331934" calcext:value-type="float">
            <text:p>-2,13E+00</text:p>
          </table:table-cell>
          <table:table-cell office:value-type="float" office:value="-12.353901" calcext:value-type="float">
            <text:p>-1,24E+01</text:p>
          </table:table-cell>
          <table:table-cell office:value-type="float" office:value="-47.60734" calcext:value-type="float">
            <text:p>-4,76E+01</text:p>
          </table:table-cell>
        </table:table-row>
        <table:table-row table:style-name="ro1">
          <table:table-cell/>
          <table:table-cell office:value-type="float" office:value="11.997414" calcext:value-type="float">
            <text:p>1,20E+01</text:p>
          </table:table-cell>
          <table:table-cell office:value-type="float" office:value="-7.3546099" calcext:value-type="float">
            <text:p>-7,35E+00</text:p>
          </table:table-cell>
          <table:table-cell office:value-type="float" office:value="-52.414759" calcext:value-type="float">
            <text:p>-5,24E+01</text:p>
          </table:table-cell>
        </table:table-row>
        <table:table-row table:style-name="ro1">
          <table:table-cell/>
          <table:table-cell office:value-type="float" office:value="9.7272744" calcext:value-type="float">
            <text:p>9,73E+00</text:p>
          </table:table-cell>
          <table:table-cell office:value-type="float" office:value="-2.0997415" calcext:value-type="float">
            <text:p>-2,10E+00</text:p>
          </table:table-cell>
          <table:table-cell office:value-type="float" office:value="-50.244208" calcext:value-type="float">
            <text:p>-5,02E+01</text:p>
          </table:table-cell>
        </table:table-row>
        <table:table-row table:style-name="ro1">
          <table:table-cell/>
          <table:table-cell office:value-type="float" office:value="3.3912665" calcext:value-type="float">
            <text:p>3,39E+00</text:p>
          </table:table-cell>
          <table:table-cell office:value-type="float" office:value="-0.082773315" calcext:value-type="float">
            <text:p>-8,28E-02</text:p>
          </table:table-cell>
          <table:table-cell office:value-type="float" office:value="-49.35056" calcext:value-type="float">
            <text:p>-4,94E+01</text:p>
          </table:table-cell>
        </table:table-row>
        <table:table-row table:style-name="ro1">
          <table:table-cell/>
          <table:table-cell office:value-type="float" office:value="6.2254395" calcext:value-type="float">
            <text:p>6,23E+00</text:p>
          </table:table-cell>
          <table:table-cell office:value-type="float" office:value="2.5233823" calcext:value-type="float">
            <text:p>2,52E+00</text:p>
          </table:table-cell>
          <table:table-cell office:value-type="float" office:value="-53.769615" calcext:value-type="float">
            <text:p>-5,38E+01</text:p>
          </table:table-cell>
        </table:table-row>
        <table:table-row table:style-name="ro1">
          <table:table-cell/>
          <table:table-cell office:value-type="float" office:value="-7.6480942" calcext:value-type="float">
            <text:p>-7,65E+00</text:p>
          </table:table-cell>
          <table:table-cell office:value-type="float" office:value="-0.66503952" calcext:value-type="float">
            <text:p>-6,65E-01</text:p>
          </table:table-cell>
          <table:table-cell office:value-type="float" office:value="-49.211066" calcext:value-type="float">
            <text:p>-4,92E+01</text:p>
          </table:table-cell>
        </table:table-row>
        <table:table-row table:style-name="ro1">
          <table:table-cell/>
          <table:table-cell office:value-type="float" office:value="10.058884" calcext:value-type="float">
            <text:p>1,01E+01</text:p>
          </table:table-cell>
          <table:table-cell office:value-type="float" office:value="-2.7307567" calcext:value-type="float">
            <text:p>-2,73E+00</text:p>
          </table:table-cell>
          <table:table-cell office:value-type="float" office:value="-45.626448" calcext:value-type="float">
            <text:p>-4,56E+01</text:p>
          </table:table-cell>
        </table:table-row>
        <table:table-row table:style-name="ro1">
          <table:table-cell/>
          <table:table-cell office:value-type="float" office:value="-14.504209" calcext:value-type="float">
            <text:p>-1,45E+01</text:p>
          </table:table-cell>
          <table:table-cell office:value-type="float" office:value="3.3605937" calcext:value-type="float">
            <text:p>3,36E+00</text:p>
          </table:table-cell>
          <table:table-cell office:value-type="float" office:value="-45.825058" calcext:value-type="float">
            <text:p>-4,58E+01</text:p>
          </table:table-cell>
        </table:table-row>
        <table:table-row table:style-name="ro1">
          <table:table-cell/>
          <table:table-cell office:value-type="float" office:value="15.538163" calcext:value-type="float">
            <text:p>1,55E+01</text:p>
          </table:table-cell>
          <table:table-cell office:value-type="float" office:value="1.3825972" calcext:value-type="float">
            <text:p>1,38E+00</text:p>
          </table:table-cell>
          <table:table-cell office:value-type="float" office:value="-37.917807" calcext:value-type="float">
            <text:p>-3,79E+01</text:p>
          </table:table-cell>
        </table:table-row>
        <table:table-row table:style-name="ro1">
          <table:table-cell/>
          <table:table-cell office:value-type="float" office:value="0.091344829" calcext:value-type="float">
            <text:p>9,13E-02</text:p>
          </table:table-cell>
          <table:table-cell office:value-type="float" office:value="0.17853593" calcext:value-type="float">
            <text:p>1,79E-01</text:p>
          </table:table-cell>
          <table:table-cell office:value-type="float" office:value="-38.86672" calcext:value-type="float">
            <text:p>-3,89E+01</text:p>
          </table:table-cell>
        </table:table-row>
        <table:table-row table:style-name="ro1">
          <table:table-cell/>
          <table:table-cell office:value-type="float" office:value="-16.652925" calcext:value-type="float">
            <text:p>-1,67E+01</text:p>
          </table:table-cell>
          <table:table-cell office:value-type="float" office:value="-5.8984103" calcext:value-type="float">
            <text:p>-5,90E+00</text:p>
          </table:table-cell>
          <table:table-cell office:value-type="float" office:value="-45.345351" calcext:value-type="float">
            <text:p>-4,53E+01</text:p>
          </table:table-cell>
        </table:table-row>
        <table:table-row table:style-name="ro1">
          <table:table-cell/>
          <table:table-cell office:value-type="float" office:value="18.455807" calcext:value-type="float">
            <text:p>1,85E+01</text:p>
          </table:table-cell>
          <table:table-cell office:value-type="float" office:value="-4.7486586" calcext:value-type="float">
            <text:p>-4,75E+00</text:p>
          </table:table-cell>
          <table:table-cell office:value-type="float" office:value="-50.959747" calcext:value-type="float">
            <text:p>-5,10E+01</text:p>
          </table:table-cell>
        </table:table-row>
        <table:table-row table:style-name="ro1">
          <table:table-cell/>
          <table:table-cell office:value-type="float" office:value="2.5209171" calcext:value-type="float">
            <text:p>2,52E+00</text:p>
          </table:table-cell>
          <table:table-cell office:value-type="float" office:value="-4.3823616" calcext:value-type="float">
            <text:p>-4,38E+00</text:p>
          </table:table-cell>
          <table:table-cell office:value-type="float" office:value="-50.914015" calcext:value-type="float">
            <text:p>-5,09E+01</text:p>
          </table:table-cell>
        </table:table-row>
        <table:table-row table:style-name="ro1">
          <table:table-cell/>
          <table:table-cell office:value-type="float" office:value="7.5542994" calcext:value-type="float">
            <text:p>7,55E+00</text:p>
          </table:table-cell>
          <table:table-cell office:value-type="float" office:value="-5.9865743" calcext:value-type="float">
            <text:p>-5,99E+00</text:p>
          </table:table-cell>
          <table:table-cell office:value-type="float" office:value="-50.022169" calcext:value-type="float">
            <text:p>-5,00E+01</text:p>
          </table:table-cell>
        </table:table-row>
        <table:table-row table:style-name="ro1">
          <table:table-cell/>
          <table:table-cell office:value-type="float" office:value="-6.5196785" calcext:value-type="float">
            <text:p>-6,52E+00</text:p>
          </table:table-cell>
          <table:table-cell office:value-type="float" office:value="-10.130735" calcext:value-type="float">
            <text:p>-1,01E+01</text:p>
          </table:table-cell>
          <table:table-cell office:value-type="float" office:value="-52.828687" calcext:value-type="float">
            <text:p>-5,28E+01</text:p>
          </table:table-cell>
        </table:table-row>
        <table:table-row table:style-name="ro1">
          <table:table-cell/>
          <table:table-cell office:value-type="float" office:value="3.7967626" calcext:value-type="float">
            <text:p>3,80E+00</text:p>
          </table:table-cell>
          <table:table-cell office:value-type="float" office:value="-11.057327" calcext:value-type="float">
            <text:p>-1,11E+01</text:p>
          </table:table-cell>
          <table:table-cell office:value-type="float" office:value="-51.556861" calcext:value-type="float">
            <text:p>-5,16E+01</text:p>
          </table:table-cell>
        </table:table-row>
        <table:table-row table:style-name="ro1">
          <table:table-cell/>
          <table:table-cell office:value-type="float" office:value="7.4353624" calcext:value-type="float">
            <text:p>7,44E+00</text:p>
          </table:table-cell>
          <table:table-cell office:value-type="float" office:value="-12.532061" calcext:value-type="float">
            <text:p>-1,25E+01</text:p>
          </table:table-cell>
          <table:table-cell office:value-type="float" office:value="-45.752707" calcext:value-type="float">
            <text:p>-4,58E+01</text:p>
          </table:table-cell>
        </table:table-row>
        <table:table-row table:style-name="ro1">
          <table:table-cell/>
          <table:table-cell office:value-type="float" office:value="-1.3763331" calcext:value-type="float">
            <text:p>-1,38E+00</text:p>
          </table:table-cell>
          <table:table-cell office:value-type="float" office:value="-14.613237" calcext:value-type="float">
            <text:p>-1,46E+01</text:p>
          </table:table-cell>
          <table:table-cell office:value-type="float" office:value="-46.556811" calcext:value-type="float">
            <text:p>-4,66E+01</text:p>
          </table:table-cell>
        </table:table-row>
        <table:table-row table:style-name="ro1">
          <table:table-cell/>
          <table:table-cell office:value-type="float" office:value="7.5297459" calcext:value-type="float">
            <text:p>7,53E+00</text:p>
          </table:table-cell>
          <table:table-cell office:value-type="float" office:value="-16.68015" calcext:value-type="float">
            <text:p>-1,67E+01</text:p>
          </table:table-cell>
          <table:table-cell office:value-type="float" office:value="-45.10512" calcext:value-type="float">
            <text:p>-4,51E+01</text:p>
          </table:table-cell>
        </table:table-row>
        <table:table-row table:style-name="ro1">
          <table:table-cell/>
          <table:table-cell office:value-type="float" office:value="-2.8169654" calcext:value-type="float">
            <text:p>-2,82E+00</text:p>
          </table:table-cell>
          <table:table-cell office:value-type="float" office:value="-13.756424" calcext:value-type="float">
            <text:p>-1,38E+01</text:p>
          </table:table-cell>
          <table:table-cell office:value-type="float" office:value="-34.106373" calcext:value-type="float">
            <text:p>-3,41E+01</text:p>
          </table:table-cell>
        </table:table-row>
        <table:table-row table:style-name="ro1">
          <table:table-cell/>
          <table:table-cell office:value-type="float" office:value="-2.7985899" calcext:value-type="float">
            <text:p>-2,80E+00</text:p>
          </table:table-cell>
          <table:table-cell office:value-type="float" office:value="-14.202325" calcext:value-type="float">
            <text:p>-1,42E+01</text:p>
          </table:table-cell>
          <table:table-cell office:value-type="float" office:value="-27.552002" calcext:value-type="float">
            <text:p>-2,76E+01</text:p>
          </table:table-cell>
        </table:table-row>
        <table:table-row table:style-name="ro1">
          <table:table-cell/>
          <table:table-cell office:value-type="float" office:value="0.0048222329" calcext:value-type="float">
            <text:p>4,82E-03</text:p>
          </table:table-cell>
          <table:table-cell office:value-type="float" office:value="-15.530526" calcext:value-type="float">
            <text:p>-1,55E+01</text:p>
          </table:table-cell>
          <table:table-cell office:value-type="float" office:value="-33.584021" calcext:value-type="float">
            <text:p>-3,36E+01</text:p>
          </table:table-cell>
        </table:table-row>
        <table:table-row table:style-name="ro1">
          <table:table-cell/>
          <table:table-cell office:value-type="float" office:value="6.0518681" calcext:value-type="float">
            <text:p>6,05E+00</text:p>
          </table:table-cell>
          <table:table-cell office:value-type="float" office:value="-21.817754" calcext:value-type="float">
            <text:p>-2,18E+01</text:p>
          </table:table-cell>
          <table:table-cell office:value-type="float" office:value="-37.833005" calcext:value-type="float">
            <text:p>-3,78E+01</text:p>
          </table:table-cell>
        </table:table-row>
        <table:table-row table:style-name="ro1">
          <table:table-cell/>
          <table:table-cell office:value-type="float" office:value="1.6291061" calcext:value-type="float">
            <text:p>1,63E+00</text:p>
          </table:table-cell>
          <table:table-cell office:value-type="float" office:value="-28.534732" calcext:value-type="float">
            <text:p>-2,85E+01</text:p>
          </table:table-cell>
          <table:table-cell office:value-type="float" office:value="-36.585397" calcext:value-type="float">
            <text:p>-3,66E+01</text:p>
          </table:table-cell>
        </table:table-row>
        <table:table-row table:style-name="ro1">
          <table:table-cell/>
          <table:table-cell office:value-type="float" office:value="-6.2116656" calcext:value-type="float">
            <text:p>-6,21E+00</text:p>
          </table:table-cell>
          <table:table-cell office:value-type="float" office:value="-25.777197" calcext:value-type="float">
            <text:p>-2,58E+01</text:p>
          </table:table-cell>
          <table:table-cell office:value-type="float" office:value="-32.076938" calcext:value-type="float">
            <text:p>-3,21E+01</text:p>
          </table:table-cell>
        </table:table-row>
        <table:table-row table:style-name="ro1">
          <table:table-cell/>
          <table:table-cell office:value-type="float" office:value="8.89277" calcext:value-type="float">
            <text:p>8,89E+00</text:p>
          </table:table-cell>
          <table:table-cell office:value-type="float" office:value="-25.340876" calcext:value-type="float">
            <text:p>-2,53E+01</text:p>
          </table:table-cell>
          <table:table-cell office:value-type="float" office:value="-25.297324" calcext:value-type="float">
            <text:p>-2,53E+01</text:p>
          </table:table-cell>
        </table:table-row>
        <table:table-row table:style-name="ro1">
          <table:table-cell/>
          <table:table-cell office:value-type="float" office:value="6.7032393" calcext:value-type="float">
            <text:p>6,70E+00</text:p>
          </table:table-cell>
          <table:table-cell office:value-type="float" office:value="-23.46868" calcext:value-type="float">
            <text:p>-2,35E+01</text:p>
          </table:table-cell>
          <table:table-cell office:value-type="float" office:value="-20.398381" calcext:value-type="float">
            <text:p>-2,04E+01</text:p>
          </table:table-cell>
        </table:table-row>
        <table:table-row table:style-name="ro1">
          <table:table-cell/>
          <table:table-cell office:value-type="float" office:value="8.3749442" calcext:value-type="float">
            <text:p>8,37E+00</text:p>
          </table:table-cell>
          <table:table-cell office:value-type="float" office:value="-12.778005" calcext:value-type="float">
            <text:p>-1,28E+01</text:p>
          </table:table-cell>
          <table:table-cell office:value-type="float" office:value="-23.15521" calcext:value-type="float">
            <text:p>-2,32E+01</text:p>
          </table:table-cell>
        </table:table-row>
        <table:table-row table:style-name="ro1">
          <table:table-cell/>
          <table:table-cell office:value-type="float" office:value="10.604421" calcext:value-type="float">
            <text:p>1,06E+01</text:p>
          </table:table-cell>
          <table:table-cell office:value-type="float" office:value="-11.111114" calcext:value-type="float">
            <text:p>-1,11E+01</text:p>
          </table:table-cell>
          <table:table-cell office:value-type="float" office:value="-20.965669" calcext:value-type="float">
            <text:p>-2,10E+01</text:p>
          </table:table-cell>
        </table:table-row>
        <table:table-row table:style-name="ro1">
          <table:table-cell/>
          <table:table-cell office:value-type="float" office:value="-1.2363091" calcext:value-type="float">
            <text:p>-1,24E+00</text:p>
          </table:table-cell>
          <table:table-cell office:value-type="float" office:value="-10.156435" calcext:value-type="float">
            <text:p>-1,02E+01</text:p>
          </table:table-cell>
          <table:table-cell office:value-type="float" office:value="-22.019109" calcext:value-type="float">
            <text:p>-2,20E+01</text:p>
          </table:table-cell>
        </table:table-row>
        <table:table-row table:style-name="ro1">
          <table:table-cell/>
          <table:table-cell office:value-type="float" office:value="6.5637735" calcext:value-type="float">
            <text:p>6,56E+00</text:p>
          </table:table-cell>
          <table:table-cell office:value-type="float" office:value="-13.183241" calcext:value-type="float">
            <text:p>-1,32E+01</text:p>
          </table:table-cell>
          <table:table-cell office:value-type="float" office:value="-31.964302" calcext:value-type="float">
            <text:p>-3,20E+01</text:p>
          </table:table-cell>
        </table:table-row>
        <table:table-row table:style-name="ro1">
          <table:table-cell/>
          <table:table-cell office:value-type="float" office:value="-0.25862805" calcext:value-type="float">
            <text:p>-2,59E-01</text:p>
          </table:table-cell>
          <table:table-cell office:value-type="float" office:value="-11.919527" calcext:value-type="float">
            <text:p>-1,19E+01</text:p>
          </table:table-cell>
          <table:table-cell office:value-type="float" office:value="-40.623599" calcext:value-type="float">
            <text:p>-4,06E+01</text:p>
          </table:table-cell>
        </table:table-row>
        <table:table-row table:style-name="ro1">
          <table:table-cell/>
          <table:table-cell office:value-type="float" office:value="9.605272" calcext:value-type="float">
            <text:p>9,61E+00</text:p>
          </table:table-cell>
          <table:table-cell office:value-type="float" office:value="-13.09084" calcext:value-type="float">
            <text:p>-1,31E+01</text:p>
          </table:table-cell>
          <table:table-cell office:value-type="float" office:value="-47.880392" calcext:value-type="float">
            <text:p>-4,79E+01</text:p>
          </table:table-cell>
        </table:table-row>
        <table:table-row table:style-name="ro1">
          <table:table-cell/>
          <table:table-cell office:value-type="float" office:value="-11.955693" calcext:value-type="float">
            <text:p>-1,20E+01</text:p>
          </table:table-cell>
          <table:table-cell office:value-type="float" office:value="-12.665023" calcext:value-type="float">
            <text:p>-1,27E+01</text:p>
          </table:table-cell>
          <table:table-cell office:value-type="float" office:value="-43.921656" calcext:value-type="float">
            <text:p>-4,39E+01</text:p>
          </table:table-cell>
        </table:table-row>
        <table:table-row table:style-name="ro1">
          <table:table-cell/>
          <table:table-cell office:value-type="float" office:value="-14.246198" calcext:value-type="float">
            <text:p>-1,42E+01</text:p>
          </table:table-cell>
          <table:table-cell office:value-type="float" office:value="-12.860628" calcext:value-type="float">
            <text:p>-1,29E+01</text:p>
          </table:table-cell>
          <table:table-cell office:value-type="float" office:value="-50.796826" calcext:value-type="float">
            <text:p>-5,08E+01</text:p>
          </table:table-cell>
        </table:table-row>
        <table:table-row table:style-name="ro1">
          <table:table-cell/>
          <table:table-cell office:value-type="float" office:value="8.2447311" calcext:value-type="float">
            <text:p>8,24E+00</text:p>
          </table:table-cell>
          <table:table-cell office:value-type="float" office:value="-9.5199197" calcext:value-type="float">
            <text:p>-9,52E+00</text:p>
          </table:table-cell>
          <table:table-cell office:value-type="float" office:value="-50.117913" calcext:value-type="float">
            <text:p>-5,01E+01</text:p>
          </table:table-cell>
        </table:table-row>
        <table:table-row table:style-name="ro1">
          <table:table-cell/>
          <table:table-cell office:value-type="float" office:value="16.151273" calcext:value-type="float">
            <text:p>1,62E+01</text:p>
          </table:table-cell>
          <table:table-cell office:value-type="float" office:value="-8.6151958" calcext:value-type="float">
            <text:p>-8,62E+00</text:p>
          </table:table-cell>
          <table:table-cell office:value-type="float" office:value="-47.715202" calcext:value-type="float">
            <text:p>-4,77E+01</text:p>
          </table:table-cell>
        </table:table-row>
        <table:table-row table:style-name="ro1">
          <table:table-cell/>
          <table:table-cell office:value-type="float" office:value="6.3740103" calcext:value-type="float">
            <text:p>6,37E+00</text:p>
          </table:table-cell>
          <table:table-cell office:value-type="float" office:value="-6.3377072" calcext:value-type="float">
            <text:p>-6,34E+00</text:p>
          </table:table-cell>
          <table:table-cell office:value-type="float" office:value="-48.578005" calcext:value-type="float">
            <text:p>-4,86E+01</text:p>
          </table:table-cell>
        </table:table-row>
        <table:table-row table:style-name="ro1">
          <table:table-cell/>
          <table:table-cell office:value-type="float" office:value="9.3537761" calcext:value-type="float">
            <text:p>9,35E+00</text:p>
          </table:table-cell>
          <table:table-cell office:value-type="float" office:value="-7.4419559" calcext:value-type="float">
            <text:p>-7,44E+00</text:p>
          </table:table-cell>
          <table:table-cell office:value-type="float" office:value="-43.951635" calcext:value-type="float">
            <text:p>-4,40E+01</text:p>
          </table:table-cell>
        </table:table-row>
        <table:table-row table:style-name="ro1">
          <table:table-cell/>
          <table:table-cell office:value-type="float" office:value="-2.6285718" calcext:value-type="float">
            <text:p>-2,63E+00</text:p>
          </table:table-cell>
          <table:table-cell office:value-type="float" office:value="-8.0683749" calcext:value-type="float">
            <text:p>-8,07E+00</text:p>
          </table:table-cell>
          <table:table-cell office:value-type="float" office:value="-48.719772" calcext:value-type="float">
            <text:p>-4,87E+01</text:p>
          </table:table-cell>
        </table:table-row>
        <table:table-row table:style-name="ro1">
          <table:table-cell/>
          <table:table-cell office:value-type="float" office:value="-3.376323" calcext:value-type="float">
            <text:p>-3,38E+00</text:p>
          </table:table-cell>
          <table:table-cell office:value-type="float" office:value="-9.4863921" calcext:value-type="float">
            <text:p>-9,49E+00</text:p>
          </table:table-cell>
          <table:table-cell office:value-type="float" office:value="-60.20399" calcext:value-type="float">
            <text:p>-6,02E+01</text:p>
          </table:table-cell>
        </table:table-row>
        <table:table-row table:style-name="ro1">
          <table:table-cell/>
          <table:table-cell office:value-type="float" office:value="21.968859" calcext:value-type="float">
            <text:p>2,20E+01</text:p>
          </table:table-cell>
          <table:table-cell office:value-type="float" office:value="-12.552162" calcext:value-type="float">
            <text:p>-1,26E+01</text:p>
          </table:table-cell>
          <table:table-cell office:value-type="float" office:value="-71.037882" calcext:value-type="float">
            <text:p>-7,10E+01</text:p>
          </table:table-cell>
        </table:table-row>
        <table:table-row table:style-name="ro1">
          <table:table-cell/>
          <table:table-cell office:value-type="float" office:value="6.5099573" calcext:value-type="float">
            <text:p>6,51E+00</text:p>
          </table:table-cell>
          <table:table-cell office:value-type="float" office:value="-21.312447" calcext:value-type="float">
            <text:p>-2,13E+01</text:p>
          </table:table-cell>
          <table:table-cell office:value-type="float" office:value="-78.34674" calcext:value-type="float">
            <text:p>-7,83E+01</text:p>
          </table:table-cell>
        </table:table-row>
        <table:table-row table:style-name="ro1">
          <table:table-cell/>
          <table:table-cell office:value-type="float" office:value="-2.076963" calcext:value-type="float">
            <text:p>-2,08E+00</text:p>
          </table:table-cell>
          <table:table-cell office:value-type="float" office:value="-22.245072" calcext:value-type="float">
            <text:p>-2,22E+01</text:p>
          </table:table-cell>
          <table:table-cell office:value-type="float" office:value="-85.988804" calcext:value-type="float">
            <text:p>-8,60E+01</text:p>
          </table:table-cell>
        </table:table-row>
        <table:table-row table:style-name="ro1">
          <table:table-cell/>
          <table:table-cell office:value-type="float" office:value="-2.4402555" calcext:value-type="float">
            <text:p>-2,44E+00</text:p>
          </table:table-cell>
          <table:table-cell office:value-type="float" office:value="-26.368686" calcext:value-type="float">
            <text:p>-2,64E+01</text:p>
          </table:table-cell>
          <table:table-cell office:value-type="float" office:value="-82.374175" calcext:value-type="float">
            <text:p>-8,24E+01</text:p>
          </table:table-cell>
        </table:table-row>
        <table:table-row table:style-name="ro1">
          <table:table-cell/>
          <table:table-cell office:value-type="float" office:value="-9.5454823" calcext:value-type="float">
            <text:p>-9,55E+00</text:p>
          </table:table-cell>
          <table:table-cell office:value-type="float" office:value="-27.400407" calcext:value-type="float">
            <text:p>-2,74E+01</text:p>
          </table:table-cell>
          <table:table-cell office:value-type="float" office:value="-84.194077" calcext:value-type="float">
            <text:p>-8,42E+01</text:p>
          </table:table-cell>
        </table:table-row>
        <table:table-row table:style-name="ro1">
          <table:table-cell/>
          <table:table-cell office:value-type="float" office:value="-4.9415676" calcext:value-type="float">
            <text:p>-4,94E+00</text:p>
          </table:table-cell>
          <table:table-cell office:value-type="float" office:value="-32.663661" calcext:value-type="float">
            <text:p>-3,27E+01</text:p>
          </table:table-cell>
          <table:table-cell office:value-type="float" office:value="-92.579339" calcext:value-type="float">
            <text:p>-9,26E+01</text:p>
          </table:table-cell>
        </table:table-row>
        <table:table-row table:style-name="ro1">
          <table:table-cell/>
          <table:table-cell office:value-type="float" office:value="-2.3259575" calcext:value-type="float">
            <text:p>-2,33E+00</text:p>
          </table:table-cell>
          <table:table-cell office:value-type="float" office:value="-36.223894" calcext:value-type="float">
            <text:p>-3,62E+01</text:p>
          </table:table-cell>
          <table:table-cell office:value-type="float" office:value="-93.342873" calcext:value-type="float">
            <text:p>-9,33E+01</text:p>
          </table:table-cell>
        </table:table-row>
        <table:table-row table:style-name="ro1">
          <table:table-cell/>
          <table:table-cell office:value-type="float" office:value="-17.927955" calcext:value-type="float">
            <text:p>-1,79E+01</text:p>
          </table:table-cell>
          <table:table-cell office:value-type="float" office:value="-33.715263" calcext:value-type="float">
            <text:p>-3,37E+01</text:p>
          </table:table-cell>
          <table:table-cell office:value-type="float" office:value="-95.300261" calcext:value-type="float">
            <text:p>-9,53E+01</text:p>
          </table:table-cell>
        </table:table-row>
        <table:table-row table:style-name="ro1">
          <table:table-cell/>
          <table:table-cell office:value-type="float" office:value="1.5807087" calcext:value-type="float">
            <text:p>1,58E+00</text:p>
          </table:table-cell>
          <table:table-cell office:value-type="float" office:value="-25.330023" calcext:value-type="float">
            <text:p>-2,53E+01</text:p>
          </table:table-cell>
          <table:table-cell office:value-type="float" office:value="-83.485205" calcext:value-type="float">
            <text:p>-8,35E+01</text:p>
          </table:table-cell>
        </table:table-row>
        <table:table-row table:style-name="ro1">
          <table:table-cell/>
          <table:table-cell office:value-type="float" office:value="2.1614169" calcext:value-type="float">
            <text:p>2,16E+00</text:p>
          </table:table-cell>
          <table:table-cell office:value-type="float" office:value="-22.86042" calcext:value-type="float">
            <text:p>-2,29E+01</text:p>
          </table:table-cell>
          <table:table-cell office:value-type="float" office:value="-89.036266" calcext:value-type="float">
            <text:p>-8,90E+01</text:p>
          </table:table-cell>
        </table:table-row>
        <table:table-row table:style-name="ro1">
          <table:table-cell/>
          <table:table-cell office:value-type="float" office:value="15.236592" calcext:value-type="float">
            <text:p>1,52E+01</text:p>
          </table:table-cell>
          <table:table-cell office:value-type="float" office:value="-26.253009" calcext:value-type="float">
            <text:p>-2,63E+01</text:p>
          </table:table-cell>
          <table:table-cell office:value-type="float" office:value="-98.862796" calcext:value-type="float">
            <text:p>-9,89E+01</text:p>
          </table:table-cell>
        </table:table-row>
        <table:table-row table:style-name="ro1">
          <table:table-cell/>
          <table:table-cell office:value-type="float" office:value="-3.1665546" calcext:value-type="float">
            <text:p>-3,17E+00</text:p>
          </table:table-cell>
          <table:table-cell office:value-type="float" office:value="-25.999661" calcext:value-type="float">
            <text:p>-2,60E+01</text:p>
          </table:table-cell>
          <table:table-cell office:value-type="float" office:value="-114.77949" calcext:value-type="float">
            <text:p>-1,15E+02</text:p>
          </table:table-cell>
        </table:table-row>
        <table:table-row table:style-name="ro1">
          <table:table-cell/>
          <table:table-cell office:value-type="float" office:value="3.8029488" calcext:value-type="float">
            <text:p>3,80E+00</text:p>
          </table:table-cell>
          <table:table-cell office:value-type="float" office:value="-34.603172" calcext:value-type="float">
            <text:p>-3,46E+01</text:p>
          </table:table-cell>
          <table:table-cell office:value-type="float" office:value="-107.08049" calcext:value-type="float">
            <text:p>-1,07E+02</text:p>
          </table:table-cell>
        </table:table-row>
        <table:table-row table:style-name="ro1">
          <table:table-cell/>
          <table:table-cell office:value-type="float" office:value="5.7582262" calcext:value-type="float">
            <text:p>5,76E+00</text:p>
          </table:table-cell>
          <table:table-cell office:value-type="float" office:value="-34.341206" calcext:value-type="float">
            <text:p>-3,43E+01</text:p>
          </table:table-cell>
          <table:table-cell office:value-type="float" office:value="-105.42111" calcext:value-type="float">
            <text:p>-1,05E+02</text:p>
          </table:table-cell>
        </table:table-row>
        <table:table-row table:style-name="ro1">
          <table:table-cell/>
          <table:table-cell office:value-type="float" office:value="-5.7633053" calcext:value-type="float">
            <text:p>-5,76E+00</text:p>
          </table:table-cell>
          <table:table-cell office:value-type="float" office:value="-26.895719" calcext:value-type="float">
            <text:p>-2,69E+01</text:p>
          </table:table-cell>
          <table:table-cell office:value-type="float" office:value="-89.666489" calcext:value-type="float">
            <text:p>-8,97E+01</text:p>
          </table:table-cell>
        </table:table-row>
        <table:table-row table:style-name="ro1">
          <table:table-cell/>
          <table:table-cell office:value-type="float" office:value="-26.146555" calcext:value-type="float">
            <text:p>-2,61E+01</text:p>
          </table:table-cell>
          <table:table-cell office:value-type="float" office:value="-32.064534" calcext:value-type="float">
            <text:p>-3,21E+01</text:p>
          </table:table-cell>
          <table:table-cell office:value-type="float" office:value="-70.05453" calcext:value-type="float">
            <text:p>-7,01E+01</text:p>
          </table:table-cell>
        </table:table-row>
        <table:table-row table:style-name="ro1">
          <table:table-cell/>
          <table:table-cell office:value-type="float" office:value="-3.5336968" calcext:value-type="float">
            <text:p>-3,53E+00</text:p>
          </table:table-cell>
          <table:table-cell office:value-type="float" office:value="-24.698869" calcext:value-type="float">
            <text:p>-2,47E+01</text:p>
          </table:table-cell>
          <table:table-cell office:value-type="float" office:value="-65.177953" calcext:value-type="float">
            <text:p>-6,52E+01</text:p>
          </table:table-cell>
        </table:table-row>
        <table:table-row table:style-name="ro1">
          <table:table-cell/>
          <table:table-cell office:value-type="float" office:value="-19.327957" calcext:value-type="float">
            <text:p>-1,93E+01</text:p>
          </table:table-cell>
          <table:table-cell office:value-type="float" office:value="-30.246217" calcext:value-type="float">
            <text:p>-3,02E+01</text:p>
          </table:table-cell>
          <table:table-cell office:value-type="float" office:value="-63.017767" calcext:value-type="float">
            <text:p>-6,30E+01</text:p>
          </table:table-cell>
        </table:table-row>
        <table:table-row table:style-name="ro1">
          <table:table-cell/>
          <table:table-cell office:value-type="float" office:value="27.963847" calcext:value-type="float">
            <text:p>2,80E+01</text:p>
          </table:table-cell>
          <table:table-cell office:value-type="float" office:value="-27.591052" calcext:value-type="float">
            <text:p>-2,76E+01</text:p>
          </table:table-cell>
          <table:table-cell office:value-type="float" office:value="-50.818783" calcext:value-type="float">
            <text:p>-5,08E+01</text:p>
          </table:table-cell>
        </table:table-row>
        <table:table-row table:style-name="ro1">
          <table:table-cell/>
          <table:table-cell office:value-type="float" office:value="-2.0152298" calcext:value-type="float">
            <text:p>-2,02E+00</text:p>
          </table:table-cell>
          <table:table-cell office:value-type="float" office:value="-23.172957" calcext:value-type="float">
            <text:p>-2,32E+01</text:p>
          </table:table-cell>
          <table:table-cell office:value-type="float" office:value="-43.02435" calcext:value-type="float">
            <text:p>-4,30E+01</text:p>
          </table:table-cell>
        </table:table-row>
        <table:table-row table:style-name="ro1">
          <table:table-cell/>
          <table:table-cell office:value-type="float" office:value="0.80714164" calcext:value-type="float">
            <text:p>8,07E-01</text:p>
          </table:table-cell>
          <table:table-cell office:value-type="float" office:value="-18.583331" calcext:value-type="float">
            <text:p>-1,86E+01</text:p>
          </table:table-cell>
          <table:table-cell office:value-type="float" office:value="-33.336707" calcext:value-type="float">
            <text:p>-3,33E+01</text:p>
          </table:table-cell>
        </table:table-row>
        <table:table-row table:style-name="ro1">
          <table:table-cell/>
          <table:table-cell office:value-type="float" office:value="9.2256637" calcext:value-type="float">
            <text:p>9,23E+00</text:p>
          </table:table-cell>
          <table:table-cell office:value-type="float" office:value="-7.2755195" calcext:value-type="float">
            <text:p>-7,28E+00</text:p>
          </table:table-cell>
          <table:table-cell office:value-type="float" office:value="-33.607796" calcext:value-type="float">
            <text:p>-3,36E+01</text:p>
          </table:table-cell>
        </table:table-row>
        <table:table-row table:style-name="ro1">
          <table:table-cell/>
          <table:table-cell office:value-type="float" office:value="-0.37970419" calcext:value-type="float">
            <text:p>-3,80E-01</text:p>
          </table:table-cell>
          <table:table-cell office:value-type="float" office:value="-7.0621783" calcext:value-type="float">
            <text:p>-7,06E+00</text:p>
          </table:table-cell>
          <table:table-cell office:value-type="float" office:value="-26.991711" calcext:value-type="float">
            <text:p>-2,70E+01</text:p>
          </table:table-cell>
        </table:table-row>
        <table:table-row table:style-name="ro1">
          <table:table-cell/>
          <table:table-cell office:value-type="float" office:value="-14.79314" calcext:value-type="float">
            <text:p>-1,48E+01</text:p>
          </table:table-cell>
          <table:table-cell office:value-type="float" office:value="-5.1203984" calcext:value-type="float">
            <text:p>-5,12E+00</text:p>
          </table:table-cell>
          <table:table-cell office:value-type="float" office:value="-22.132046" calcext:value-type="float">
            <text:p>-2,21E+01</text:p>
          </table:table-cell>
        </table:table-row>
        <table:table-row table:style-name="ro1">
          <table:table-cell/>
          <table:table-cell office:value-type="float" office:value="17.80417" calcext:value-type="float">
            <text:p>1,78E+01</text:p>
          </table:table-cell>
          <table:table-cell office:value-type="float" office:value="-7.863755" calcext:value-type="float">
            <text:p>-7,86E+00</text:p>
          </table:table-cell>
          <table:table-cell office:value-type="float" office:value="-18.640096" calcext:value-type="float">
            <text:p>-1,86E+01</text:p>
          </table:table-cell>
        </table:table-row>
        <table:table-row table:style-name="ro1">
          <table:table-cell/>
          <table:table-cell office:value-type="float" office:value="11.297685" calcext:value-type="float">
            <text:p>1,13E+01</text:p>
          </table:table-cell>
          <table:table-cell office:value-type="float" office:value="-5.1183375" calcext:value-type="float">
            <text:p>-5,12E+00</text:p>
          </table:table-cell>
          <table:table-cell office:value-type="float" office:value="-11.075818" calcext:value-type="float">
            <text:p>-1,11E+01</text:p>
          </table:table-cell>
        </table:table-row>
        <table:table-row table:style-name="ro1">
          <table:table-cell/>
          <table:table-cell office:value-type="float" office:value="0.57752374" calcext:value-type="float">
            <text:p>5,78E-01</text:p>
          </table:table-cell>
          <table:table-cell office:value-type="float" office:value="-0.18724934" calcext:value-type="float">
            <text:p>-1,87E-01</text:p>
          </table:table-cell>
          <table:table-cell office:value-type="float" office:value="-10.536887" calcext:value-type="float">
            <text:p>-1,05E+01</text:p>
          </table:table-cell>
        </table:table-row>
        <table:table-row table:style-name="ro1">
          <table:table-cell/>
          <table:table-cell office:value-type="float" office:value="11.980896" calcext:value-type="float">
            <text:p>1,20E+01</text:p>
          </table:table-cell>
          <table:table-cell office:value-type="float" office:value="0.20434336" calcext:value-type="float">
            <text:p>2,04E-01</text:p>
          </table:table-cell>
          <table:table-cell office:value-type="float" office:value="-23.615157" calcext:value-type="float">
            <text:p>-2,36E+01</text:p>
          </table:table-cell>
        </table:table-row>
        <table:table-row table:style-name="ro1">
          <table:table-cell/>
          <table:table-cell office:value-type="float" office:value="8.9069521" calcext:value-type="float">
            <text:p>8,91E+00</text:p>
          </table:table-cell>
          <table:table-cell office:value-type="float" office:value="-1.8416091" calcext:value-type="float">
            <text:p>-1,84E+00</text:p>
          </table:table-cell>
          <table:table-cell office:value-type="float" office:value="-15.650192" calcext:value-type="float">
            <text:p>-1,57E+01</text:p>
          </table:table-cell>
        </table:table-row>
        <table:table-row table:style-name="ro1">
          <table:table-cell/>
          <table:table-cell office:value-type="float" office:value="-3.6317133" calcext:value-type="float">
            <text:p>-3,63E+00</text:p>
          </table:table-cell>
          <table:table-cell office:value-type="float" office:value="-2.4055674" calcext:value-type="float">
            <text:p>-2,41E+00</text:p>
          </table:table-cell>
          <table:table-cell office:value-type="float" office:value="-6.9606763" calcext:value-type="float">
            <text:p>-6,96E+00</text:p>
          </table:table-cell>
        </table:table-row>
        <table:table-row table:style-name="ro1">
          <table:table-cell/>
          <table:table-cell office:value-type="float" office:value="10.916156" calcext:value-type="float">
            <text:p>1,09E+01</text:p>
          </table:table-cell>
          <table:table-cell office:value-type="float" office:value="-1.1147396" calcext:value-type="float">
            <text:p>-1,11E+00</text:p>
          </table:table-cell>
          <table:table-cell office:value-type="float" office:value="-10.44892" calcext:value-type="float">
            <text:p>-1,04E+01</text:p>
          </table:table-cell>
        </table:table-row>
        <table:table-row table:style-name="ro1">
          <table:table-cell/>
          <table:table-cell office:value-type="float" office:value="14.222967" calcext:value-type="float">
            <text:p>1,42E+01</text:p>
          </table:table-cell>
          <table:table-cell office:value-type="float" office:value="0.19304915" calcext:value-type="float">
            <text:p>1,93E-01</text:p>
          </table:table-cell>
          <table:table-cell office:value-type="float" office:value="-7.6318325" calcext:value-type="float">
            <text:p>-7,63E+00</text:p>
          </table:table-cell>
        </table:table-row>
        <table:table-row table:style-name="ro1">
          <table:table-cell/>
          <table:table-cell office:value-type="float" office:value="0.66054499" calcext:value-type="float">
            <text:p>6,61E-01</text:p>
          </table:table-cell>
          <table:table-cell office:value-type="float" office:value="2.1135652" calcext:value-type="float">
            <text:p>2,11E+00</text:p>
          </table:table-cell>
          <table:table-cell office:value-type="float" office:value="-2.2199565" calcext:value-type="float">
            <text:p>-2,22E+00</text:p>
          </table:table-cell>
        </table:table-row>
        <table:table-row table:style-name="ro1">
          <table:table-cell/>
          <table:table-cell office:value-type="float" office:value="7.5392812" calcext:value-type="float">
            <text:p>7,54E+00</text:p>
          </table:table-cell>
          <table:table-cell office:value-type="float" office:value="3.5724914" calcext:value-type="float">
            <text:p>3,57E+00</text:p>
          </table:table-cell>
          <table:table-cell office:value-type="float" office:value="-5.2134459" calcext:value-type="float">
            <text:p>-5,21E+00</text:p>
          </table:table-cell>
        </table:table-row>
        <table:table-row table:style-name="ro1">
          <table:table-cell/>
          <table:table-cell office:value-type="float" office:value="9.3120848" calcext:value-type="float">
            <text:p>9,31E+00</text:p>
          </table:table-cell>
          <table:table-cell office:value-type="float" office:value="4.3322937" calcext:value-type="float">
            <text:p>4,33E+00</text:p>
          </table:table-cell>
          <table:table-cell office:value-type="float" office:value="-4.414441" calcext:value-type="float">
            <text:p>-4,41E+00</text:p>
          </table:table-cell>
        </table:table-row>
        <table:table-row table:style-name="ro1">
          <table:table-cell/>
          <table:table-cell office:value-type="float" office:value="-21.704285" calcext:value-type="float">
            <text:p>-2,17E+01</text:p>
          </table:table-cell>
          <table:table-cell office:value-type="float" office:value="0.43285663" calcext:value-type="float">
            <text:p>4,33E-01</text:p>
          </table:table-cell>
          <table:table-cell office:value-type="float" office:value="-22.118828" calcext:value-type="float">
            <text:p>-2,21E+01</text:p>
          </table:table-cell>
        </table:table-row>
        <table:table-row table:style-name="ro1">
          <table:table-cell/>
          <table:table-cell office:value-type="float" office:value="-2.1978231" calcext:value-type="float">
            <text:p>-2,20E+00</text:p>
          </table:table-cell>
          <table:table-cell office:value-type="float" office:value="-2.7249228" calcext:value-type="float">
            <text:p>-2,72E+00</text:p>
          </table:table-cell>
          <table:table-cell office:value-type="float" office:value="-25.508154" calcext:value-type="float">
            <text:p>-2,55E+01</text:p>
          </table:table-cell>
        </table:table-row>
        <table:table-row table:style-name="ro1">
          <table:table-cell/>
          <table:table-cell office:value-type="float" office:value="-8.3383314" calcext:value-type="float">
            <text:p>-8,34E+00</text:p>
          </table:table-cell>
          <table:table-cell office:value-type="float" office:value="-6.3317683" calcext:value-type="float">
            <text:p>-6,33E+00</text:p>
          </table:table-cell>
          <table:table-cell office:value-type="float" office:value="-23.794662" calcext:value-type="float">
            <text:p>-2,38E+01</text:p>
          </table:table-cell>
        </table:table-row>
        <table:table-row table:style-name="ro1">
          <table:table-cell/>
          <table:table-cell office:value-type="float" office:value="11.862299" calcext:value-type="float">
            <text:p>1,19E+01</text:p>
          </table:table-cell>
          <table:table-cell office:value-type="float" office:value="-6.6418753" calcext:value-type="float">
            <text:p>-6,64E+00</text:p>
          </table:table-cell>
          <table:table-cell office:value-type="float" office:value="-32.026084" calcext:value-type="float">
            <text:p>-3,20E+01</text:p>
          </table:table-cell>
        </table:table-row>
        <table:table-row table:style-name="ro1">
          <table:table-cell/>
          <table:table-cell office:value-type="float" office:value="-15.579664" calcext:value-type="float">
            <text:p>-1,56E+01</text:p>
          </table:table-cell>
          <table:table-cell office:value-type="float" office:value="-7.8994973" calcext:value-type="float">
            <text:p>-7,90E+00</text:p>
          </table:table-cell>
          <table:table-cell office:value-type="float" office:value="-32.283253" calcext:value-type="float">
            <text:p>-3,23E+01</text:p>
          </table:table-cell>
        </table:table-row>
        <table:table-row table:style-name="ro1">
          <table:table-cell/>
          <table:table-cell office:value-type="float" office:value="-12.351777" calcext:value-type="float">
            <text:p>-1,24E+01</text:p>
          </table:table-cell>
          <table:table-cell office:value-type="float" office:value="-7.0930185" calcext:value-type="float">
            <text:p>-7,09E+00</text:p>
          </table:table-cell>
          <table:table-cell office:value-type="float" office:value="-25.901573" calcext:value-type="float">
            <text:p>-2,59E+01</text:p>
          </table:table-cell>
        </table:table-row>
        <table:table-row table:style-name="ro1">
          <table:table-cell/>
          <table:table-cell office:value-type="float" office:value="-27.63576" calcext:value-type="float">
            <text:p>-2,76E+01</text:p>
          </table:table-cell>
          <table:table-cell office:value-type="float" office:value="-8.469916" calcext:value-type="float">
            <text:p>-8,47E+00</text:p>
          </table:table-cell>
          <table:table-cell office:value-type="float" office:value="-28.926614" calcext:value-type="float">
            <text:p>-2,89E+01</text:p>
          </table:table-cell>
        </table:table-row>
        <table:table-row table:style-name="ro1">
          <table:table-cell/>
          <table:table-cell office:value-type="float" office:value="34.973662" calcext:value-type="float">
            <text:p>3,50E+01</text:p>
          </table:table-cell>
          <table:table-cell office:value-type="float" office:value="-13.592323" calcext:value-type="float">
            <text:p>-1,36E+01</text:p>
          </table:table-cell>
          <table:table-cell office:value-type="float" office:value="-33.854019" calcext:value-type="float">
            <text:p>-3,39E+01</text:p>
          </table:table-cell>
        </table:table-row>
        <table:table-row table:style-name="ro1">
          <table:table-cell/>
          <table:table-cell office:value-type="float" office:value="3.1832442" calcext:value-type="float">
            <text:p>3,18E+00</text:p>
          </table:table-cell>
          <table:table-cell office:value-type="float" office:value="-22.825001" calcext:value-type="float">
            <text:p>-2,28E+01</text:p>
          </table:table-cell>
          <table:table-cell office:value-type="float" office:value="-29.512052" calcext:value-type="float">
            <text:p>-2,95E+01</text:p>
          </table:table-cell>
        </table:table-row>
        <table:table-row table:style-name="ro1">
          <table:table-cell/>
          <table:table-cell office:value-type="float" office:value="-6.6428334" calcext:value-type="float">
            <text:p>-6,64E+00</text:p>
          </table:table-cell>
          <table:table-cell office:value-type="float" office:value="-23.853606" calcext:value-type="float">
            <text:p>-2,39E+01</text:p>
          </table:table-cell>
          <table:table-cell office:value-type="float" office:value="-35.352326" calcext:value-type="float">
            <text:p>-3,54E+01</text:p>
          </table:table-cell>
        </table:table-row>
        <table:table-row table:style-name="ro1">
          <table:table-cell/>
          <table:table-cell office:value-type="float" office:value="-2.0532356" calcext:value-type="float">
            <text:p>-2,05E+00</text:p>
          </table:table-cell>
          <table:table-cell office:value-type="float" office:value="-25.504598" calcext:value-type="float">
            <text:p>-2,55E+01</text:p>
          </table:table-cell>
          <table:table-cell office:value-type="float" office:value="-53.294461" calcext:value-type="float">
            <text:p>-5,33E+01</text:p>
          </table:table-cell>
        </table:table-row>
        <table:table-row table:style-name="ro1">
          <table:table-cell/>
          <table:table-cell office:value-type="float" office:value="4.3699967" calcext:value-type="float">
            <text:p>4,37E+00</text:p>
          </table:table-cell>
          <table:table-cell office:value-type="float" office:value="-27.329112" calcext:value-type="float">
            <text:p>-2,73E+01</text:p>
          </table:table-cell>
          <table:table-cell office:value-type="float" office:value="-68.777663" calcext:value-type="float">
            <text:p>-6,88E+01</text:p>
          </table:table-cell>
        </table:table-row>
        <table:table-row table:style-name="ro1">
          <table:table-cell/>
          <table:table-cell office:value-type="float" office:value="-7.7064767" calcext:value-type="float">
            <text:p>-7,71E+00</text:p>
          </table:table-cell>
          <table:table-cell office:value-type="float" office:value="-27.620139" calcext:value-type="float">
            <text:p>-2,76E+01</text:p>
          </table:table-cell>
          <table:table-cell office:value-type="float" office:value="-69.408597" calcext:value-type="float">
            <text:p>-6,94E+01</text:p>
          </table:table-cell>
        </table:table-row>
        <table:table-row table:style-name="ro1">
          <table:table-cell/>
          <table:table-cell office:value-type="float" office:value="-15.784039" calcext:value-type="float">
            <text:p>-1,58E+01</text:p>
          </table:table-cell>
          <table:table-cell office:value-type="float" office:value="-24.474297" calcext:value-type="float">
            <text:p>-2,45E+01</text:p>
          </table:table-cell>
          <table:table-cell office:value-type="float" office:value="-62.967094" calcext:value-type="float">
            <text:p>-6,30E+01</text:p>
          </table:table-cell>
        </table:table-row>
        <table:table-row table:style-name="ro1">
          <table:table-cell/>
          <table:table-cell office:value-type="float" office:value="1.266237" calcext:value-type="float">
            <text:p>1,27E+00</text:p>
          </table:table-cell>
          <table:table-cell office:value-type="float" office:value="-21.880007" calcext:value-type="float">
            <text:p>-2,19E+01</text:p>
          </table:table-cell>
          <table:table-cell office:value-type="float" office:value="-56.330429" calcext:value-type="float">
            <text:p>-5,63E+01</text:p>
          </table:table-cell>
        </table:table-row>
        <table:table-row table:style-name="ro1">
          <table:table-cell/>
          <table:table-cell office:value-type="float" office:value="-3.3499026" calcext:value-type="float">
            <text:p>-3,35E+00</text:p>
          </table:table-cell>
          <table:table-cell office:value-type="float" office:value="-16.541824" calcext:value-type="float">
            <text:p>-1,65E+01</text:p>
          </table:table-cell>
          <table:table-cell office:value-type="float" office:value="-36.558818" calcext:value-type="float">
            <text:p>-3,66E+01</text:p>
          </table:table-cell>
        </table:table-row>
        <table:table-row table:style-name="ro1">
          <table:table-cell/>
          <table:table-cell office:value-type="float" office:value="-10.344827" calcext:value-type="float">
            <text:p>-1,03E+01</text:p>
          </table:table-cell>
          <table:table-cell office:value-type="float" office:value="-15.577811" calcext:value-type="float">
            <text:p>-1,56E+01</text:p>
          </table:table-cell>
          <table:table-cell office:value-type="float" office:value="-29.697796" calcext:value-type="float">
            <text:p>-2,97E+01</text:p>
          </table:table-cell>
        </table:table-row>
        <table:table-row table:style-name="ro1">
          <table:table-cell/>
          <table:table-cell office:value-type="float" office:value="11.128248" calcext:value-type="float">
            <text:p>1,11E+01</text:p>
          </table:table-cell>
          <table:table-cell office:value-type="float" office:value="-18.926904" calcext:value-type="float">
            <text:p>-1,89E+01</text:p>
          </table:table-cell>
          <table:table-cell office:value-type="float" office:value="-27.90918" calcext:value-type="float">
            <text:p>-2,79E+01</text:p>
          </table:table-cell>
        </table:table-row>
        <table:table-row table:style-name="ro1">
          <table:table-cell/>
          <table:table-cell office:value-type="float" office:value="-2.6839945" calcext:value-type="float">
            <text:p>-2,68E+00</text:p>
          </table:table-cell>
          <table:table-cell office:value-type="float" office:value="-19.30487" calcext:value-type="float">
            <text:p>-1,93E+01</text:p>
          </table:table-cell>
          <table:table-cell office:value-type="float" office:value="-32.099939" calcext:value-type="float">
            <text:p>-3,21E+01</text:p>
          </table:table-cell>
        </table:table-row>
        <table:table-row table:style-name="ro1">
          <table:table-cell/>
          <table:table-cell office:value-type="float" office:value="8.5059538" calcext:value-type="float">
            <text:p>8,51E+00</text:p>
          </table:table-cell>
          <table:table-cell office:value-type="float" office:value="-19.664905" calcext:value-type="float">
            <text:p>-1,97E+01</text:p>
          </table:table-cell>
          <table:table-cell office:value-type="float" office:value="-25.961883" calcext:value-type="float">
            <text:p>-2,60E+01</text:p>
          </table:table-cell>
        </table:table-row>
        <table:table-row table:style-name="ro1">
          <table:table-cell/>
          <table:table-cell office:value-type="float" office:value="-4.8079343" calcext:value-type="float">
            <text:p>-4,81E+00</text:p>
          </table:table-cell>
          <table:table-cell office:value-type="float" office:value="-18.818894" calcext:value-type="float">
            <text:p>-1,88E+01</text:p>
          </table:table-cell>
          <table:table-cell office:value-type="float" office:value="-23.515603" calcext:value-type="float">
            <text:p>-2,35E+01</text:p>
          </table:table-cell>
        </table:table-row>
        <table:table-row table:style-name="ro1">
          <table:table-cell/>
          <table:table-cell office:value-type="float" office:value="10.509678" calcext:value-type="float">
            <text:p>1,05E+01</text:p>
          </table:table-cell>
          <table:table-cell office:value-type="float" office:value="-12.031502" calcext:value-type="float">
            <text:p>-1,20E+01</text:p>
          </table:table-cell>
          <table:table-cell office:value-type="float" office:value="-18.152052" calcext:value-type="float">
            <text:p>-1,82E+01</text:p>
          </table:table-cell>
        </table:table-row>
        <table:table-row table:style-name="ro1">
          <table:table-cell/>
          <table:table-cell office:value-type="float" office:value="23.463036" calcext:value-type="float">
            <text:p>2,35E+01</text:p>
          </table:table-cell>
          <table:table-cell office:value-type="float" office:value="-5.5781478" calcext:value-type="float">
            <text:p>-5,58E+00</text:p>
          </table:table-cell>
          <table:table-cell office:value-type="float" office:value="-22.702727" calcext:value-type="float">
            <text:p>-2,27E+01</text:p>
          </table:table-cell>
        </table:table-row>
        <table:table-row table:style-name="ro1">
          <table:table-cell/>
          <table:table-cell office:value-type="float" office:value="2.1602234" calcext:value-type="float">
            <text:p>2,16E+00</text:p>
          </table:table-cell>
          <table:table-cell office:value-type="float" office:value="-3.3183294" calcext:value-type="float">
            <text:p>-3,32E+00</text:p>
          </table:table-cell>
          <table:table-cell office:value-type="float" office:value="-32.176257" calcext:value-type="float">
            <text:p>-3,22E+01</text:p>
          </table:table-cell>
        </table:table-row>
        <table:table-row table:style-name="ro1">
          <table:table-cell/>
          <table:table-cell office:value-type="float" office:value="-29.527276" calcext:value-type="float">
            <text:p>-2,95E+01</text:p>
          </table:table-cell>
          <table:table-cell office:value-type="float" office:value="1.4640732" calcext:value-type="float">
            <text:p>1,46E+00</text:p>
          </table:table-cell>
          <table:table-cell office:value-type="float" office:value="-20.413069" calcext:value-type="float">
            <text:p>-2,04E+01</text:p>
          </table:table-cell>
        </table:table-row>
        <table:table-row table:style-name="ro1">
          <table:table-cell/>
          <table:table-cell office:value-type="float" office:value="9.6564635" calcext:value-type="float">
            <text:p>9,66E+00</text:p>
          </table:table-cell>
          <table:table-cell office:value-type="float" office:value="3.4229444" calcext:value-type="float">
            <text:p>3,42E+00</text:p>
          </table:table-cell>
          <table:table-cell office:value-type="float" office:value="-8.1287983" calcext:value-type="float">
            <text:p>-8,13E+00</text:p>
          </table:table-cell>
        </table:table-row>
        <table:table-row table:style-name="ro1">
          <table:table-cell/>
          <table:table-cell office:value-type="float" office:value="27.620361" calcext:value-type="float">
            <text:p>2,76E+01</text:p>
          </table:table-cell>
          <table:table-cell office:value-type="float" office:value="3.0665459" calcext:value-type="float">
            <text:p>3,07E+00</text:p>
          </table:table-cell>
          <table:table-cell office:value-type="float" office:value="-2.499951" calcext:value-type="float">
            <text:p>-2,50E+00</text:p>
          </table:table-cell>
        </table:table-row>
        <table:table-row table:style-name="ro1">
          <table:table-cell/>
          <table:table-cell office:value-type="float" office:value="9.0965472" calcext:value-type="float">
            <text:p>9,10E+00</text:p>
          </table:table-cell>
          <table:table-cell office:value-type="float" office:value="6.9081405" calcext:value-type="float">
            <text:p>6,91E+00</text:p>
          </table:table-cell>
          <table:table-cell office:value-type="float" office:value="-12.433428" calcext:value-type="float">
            <text:p>-1,24E+01</text:p>
          </table:table-cell>
        </table:table-row>
        <table:table-row table:style-name="ro1">
          <table:table-cell/>
          <table:table-cell office:value-type="float" office:value="-18.530442" calcext:value-type="float">
            <text:p>-1,85E+01</text:p>
          </table:table-cell>
          <table:table-cell office:value-type="float" office:value="10.495301" calcext:value-type="float">
            <text:p>1,05E+01</text:p>
          </table:table-cell>
          <table:table-cell office:value-type="float" office:value="-29.785972" calcext:value-type="float">
            <text:p>-2,98E+01</text:p>
          </table:table-cell>
        </table:table-row>
        <table:table-row table:style-name="ro1">
          <table:table-cell/>
          <table:table-cell office:value-type="float" office:value="0.22736703" calcext:value-type="float">
            <text:p>2,27E-01</text:p>
          </table:table-cell>
          <table:table-cell office:value-type="float" office:value="13.513622" calcext:value-type="float">
            <text:p>1,35E+01</text:p>
          </table:table-cell>
          <table:table-cell office:value-type="float" office:value="-26.921939" calcext:value-type="float">
            <text:p>-2,69E+01</text:p>
          </table:table-cell>
        </table:table-row>
        <table:table-row table:style-name="ro1">
          <table:table-cell/>
          <table:table-cell office:value-type="float" office:value="-13.919671" calcext:value-type="float">
            <text:p>-1,39E+01</text:p>
          </table:table-cell>
          <table:table-cell office:value-type="float" office:value="12.488285" calcext:value-type="float">
            <text:p>1,25E+01</text:p>
          </table:table-cell>
          <table:table-cell office:value-type="float" office:value="-19.121818" calcext:value-type="float">
            <text:p>-1,91E+01</text:p>
          </table:table-cell>
        </table:table-row>
        <table:table-row table:style-name="ro1">
          <table:table-cell/>
          <table:table-cell office:value-type="float" office:value="10.747082" calcext:value-type="float">
            <text:p>1,07E+01</text:p>
          </table:table-cell>
          <table:table-cell office:value-type="float" office:value="12.45067" calcext:value-type="float">
            <text:p>1,25E+01</text:p>
          </table:table-cell>
          <table:table-cell office:value-type="float" office:value="-16.802452" calcext:value-type="float">
            <text:p>-1,68E+01</text:p>
          </table:table-cell>
        </table:table-row>
        <table:table-row table:style-name="ro1">
          <table:table-cell/>
          <table:table-cell office:value-type="float" office:value="7.9993064" calcext:value-type="float">
            <text:p>8,00E+00</text:p>
          </table:table-cell>
          <table:table-cell office:value-type="float" office:value="14.555844" calcext:value-type="float">
            <text:p>1,46E+01</text:p>
          </table:table-cell>
          <table:table-cell office:value-type="float" office:value="-15.28831" calcext:value-type="float">
            <text:p>-1,53E+01</text:p>
          </table:table-cell>
        </table:table-row>
        <table:table-row table:style-name="ro1">
          <table:table-cell/>
          <table:table-cell office:value-type="float" office:value="12.142171" calcext:value-type="float">
            <text:p>1,21E+01</text:p>
          </table:table-cell>
          <table:table-cell office:value-type="float" office:value="15.804106" calcext:value-type="float">
            <text:p>1,58E+01</text:p>
          </table:table-cell>
          <table:table-cell office:value-type="float" office:value="-26.110059" calcext:value-type="float">
            <text:p>-2,61E+01</text:p>
          </table:table-cell>
        </table:table-row>
        <table:table-row table:style-name="ro1">
          <table:table-cell/>
          <table:table-cell office:value-type="float" office:value="14.776328" calcext:value-type="float">
            <text:p>1,48E+01</text:p>
          </table:table-cell>
          <table:table-cell office:value-type="float" office:value="30.342871" calcext:value-type="float">
            <text:p>3,03E+01</text:p>
          </table:table-cell>
          <table:table-cell office:value-type="float" office:value="-19.733383" calcext:value-type="float">
            <text:p>-1,97E+01</text:p>
          </table:table-cell>
        </table:table-row>
        <table:table-row table:style-name="ro1">
          <table:table-cell/>
          <table:table-cell office:value-type="float" office:value="3.5474879" calcext:value-type="float">
            <text:p>3,55E+00</text:p>
          </table:table-cell>
          <table:table-cell office:value-type="float" office:value="32.796762" calcext:value-type="float">
            <text:p>3,28E+01</text:p>
          </table:table-cell>
          <table:table-cell office:value-type="float" office:value="-19.239905" calcext:value-type="float">
            <text:p>-1,92E+01</text:p>
          </table:table-cell>
        </table:table-row>
        <table:table-row table:style-name="ro1">
          <table:table-cell/>
          <table:table-cell office:value-type="float" office:value="21.364909" calcext:value-type="float">
            <text:p>2,14E+01</text:p>
          </table:table-cell>
          <table:table-cell office:value-type="float" office:value="35.016057" calcext:value-type="float">
            <text:p>3,50E+01</text:p>
          </table:table-cell>
          <table:table-cell office:value-type="float" office:value="-15.373749" calcext:value-type="float">
            <text:p>-1,54E+01</text:p>
          </table:table-cell>
        </table:table-row>
        <table:table-row table:style-name="ro1">
          <table:table-cell/>
          <table:table-cell office:value-type="float" office:value="-5.2978415" calcext:value-type="float">
            <text:p>-5,30E+00</text:p>
          </table:table-cell>
          <table:table-cell office:value-type="float" office:value="39.457998" calcext:value-type="float">
            <text:p>3,95E+01</text:p>
          </table:table-cell>
          <table:table-cell office:value-type="float" office:value="-10.710175" calcext:value-type="float">
            <text:p>-1,07E+01</text:p>
          </table:table-cell>
        </table:table-row>
        <table:table-row table:style-name="ro1">
          <table:table-cell/>
          <table:table-cell office:value-type="float" office:value="-0.60993482" calcext:value-type="float">
            <text:p>-6,10E-01</text:p>
          </table:table-cell>
          <table:table-cell office:value-type="float" office:value="40.576355" calcext:value-type="float">
            <text:p>4,06E+01</text:p>
          </table:table-cell>
          <table:table-cell office:value-type="float" office:value="-9.0703909" calcext:value-type="float">
            <text:p>-9,07E+00</text:p>
          </table:table-cell>
        </table:table-row>
        <table:table-row table:style-name="ro1">
          <table:table-cell/>
          <table:table-cell office:value-type="float" office:value="-0.42848993" calcext:value-type="float">
            <text:p>-4,28E-01</text:p>
          </table:table-cell>
          <table:table-cell office:value-type="float" office:value="37.861192" calcext:value-type="float">
            <text:p>3,79E+01</text:p>
          </table:table-cell>
          <table:table-cell office:value-type="float" office:value="-4.6057516" calcext:value-type="float">
            <text:p>-4,61E+00</text:p>
          </table:table-cell>
        </table:table-row>
        <table:table-row table:style-name="ro1">
          <table:table-cell/>
          <table:table-cell office:value-type="float" office:value="-0.95097318" calcext:value-type="float">
            <text:p>-9,51E-01</text:p>
          </table:table-cell>
          <table:table-cell office:value-type="float" office:value="33.968685" calcext:value-type="float">
            <text:p>3,40E+01</text:p>
          </table:table-cell>
          <table:table-cell office:value-type="float" office:value="-4.2078243" calcext:value-type="float">
            <text:p>-4,21E+00</text:p>
          </table:table-cell>
        </table:table-row>
        <table:table-row table:style-name="ro1">
          <table:table-cell/>
          <table:table-cell office:value-type="float" office:value="-5.2011784" calcext:value-type="float">
            <text:p>-5,20E+00</text:p>
          </table:table-cell>
          <table:table-cell office:value-type="float" office:value="27.68524" calcext:value-type="float">
            <text:p>2,77E+01</text:p>
          </table:table-cell>
          <table:table-cell office:value-type="float" office:value="5.1947353" calcext:value-type="float">
            <text:p>5,19E+00</text:p>
          </table:table-cell>
        </table:table-row>
        <table:table-row table:style-name="ro1">
          <table:table-cell/>
          <table:table-cell office:value-type="float" office:value="26.643549" calcext:value-type="float">
            <text:p>2,66E+01</text:p>
          </table:table-cell>
          <table:table-cell office:value-type="float" office:value="22.303495" calcext:value-type="float">
            <text:p>2,23E+01</text:p>
          </table:table-cell>
          <table:table-cell office:value-type="float" office:value="-1.6303715" calcext:value-type="float">
            <text:p>-1,63E+00</text:p>
          </table:table-cell>
        </table:table-row>
        <table:table-row table:style-name="ro1">
          <table:table-cell/>
          <table:table-cell office:value-type="float" office:value="5.7723136" calcext:value-type="float">
            <text:p>5,77E+00</text:p>
          </table:table-cell>
          <table:table-cell office:value-type="float" office:value="29.108653" calcext:value-type="float">
            <text:p>2,91E+01</text:p>
          </table:table-cell>
          <table:table-cell office:value-type="float" office:value="5.3045002" calcext:value-type="float">
            <text:p>5,30E+00</text:p>
          </table:table-cell>
        </table:table-row>
        <table:table-row table:style-name="ro1">
          <table:table-cell/>
          <table:table-cell office:value-type="float" office:value="-15.282667" calcext:value-type="float">
            <text:p>-1,53E+01</text:p>
          </table:table-cell>
          <table:table-cell office:value-type="float" office:value="32.336099" calcext:value-type="float">
            <text:p>3,23E+01</text:p>
          </table:table-cell>
          <table:table-cell office:value-type="float" office:value="14.628859" calcext:value-type="float">
            <text:p>1,46E+01</text:p>
          </table:table-cell>
        </table:table-row>
        <table:table-row table:style-name="ro1">
          <table:table-cell/>
          <table:table-cell office:value-type="float" office:value="10.227815" calcext:value-type="float">
            <text:p>1,02E+01</text:p>
          </table:table-cell>
          <table:table-cell office:value-type="float" office:value="31.633912" calcext:value-type="float">
            <text:p>3,16E+01</text:p>
          </table:table-cell>
          <table:table-cell office:value-type="float" office:value="16.82161" calcext:value-type="float">
            <text:p>1,68E+01</text:p>
          </table:table-cell>
        </table:table-row>
        <table:table-row table:style-name="ro1">
          <table:table-cell/>
          <table:table-cell office:value-type="float" office:value="8.1693312" calcext:value-type="float">
            <text:p>8,17E+00</text:p>
          </table:table-cell>
          <table:table-cell office:value-type="float" office:value="33.372806" calcext:value-type="float">
            <text:p>3,34E+01</text:p>
          </table:table-cell>
          <table:table-cell office:value-type="float" office:value="27.826717" calcext:value-type="float">
            <text:p>2,78E+01</text:p>
          </table:table-cell>
        </table:table-row>
        <table:table-row table:style-name="ro1">
          <table:table-cell/>
          <table:table-cell office:value-type="float" office:value="-5.7426702" calcext:value-type="float">
            <text:p>-5,74E+00</text:p>
          </table:table-cell>
          <table:table-cell office:value-type="float" office:value="39.162531" calcext:value-type="float">
            <text:p>3,92E+01</text:p>
          </table:table-cell>
          <table:table-cell office:value-type="float" office:value="14.557807" calcext:value-type="float">
            <text:p>1,46E+01</text:p>
          </table:table-cell>
        </table:table-row>
        <table:table-row table:style-name="ro1">
          <table:table-cell/>
          <table:table-cell office:value-type="float" office:value="-6.1610162" calcext:value-type="float">
            <text:p>-6,16E+00</text:p>
          </table:table-cell>
          <table:table-cell office:value-type="float" office:value="40.295981" calcext:value-type="float">
            <text:p>4,03E+01</text:p>
          </table:table-cell>
          <table:table-cell office:value-type="float" office:value="-1.2652146" calcext:value-type="float">
            <text:p>-1,27E+00</text:p>
          </table:table-cell>
        </table:table-row>
        <table:table-row table:style-name="ro1">
          <table:table-cell/>
          <table:table-cell office:value-type="float" office:value="11.203744" calcext:value-type="float">
            <text:p>1,12E+01</text:p>
          </table:table-cell>
          <table:table-cell office:value-type="float" office:value="34.571516" calcext:value-type="float">
            <text:p>3,46E+01</text:p>
          </table:table-cell>
          <table:table-cell office:value-type="float" office:value="8.4870277" calcext:value-type="float">
            <text:p>8,49E+00</text:p>
          </table:table-cell>
        </table:table-row>
        <table:table-row table:style-name="ro1">
          <table:table-cell/>
          <table:table-cell office:value-type="float" office:value="4.6284428" calcext:value-type="float">
            <text:p>4,63E+00</text:p>
          </table:table-cell>
          <table:table-cell office:value-type="float" office:value="35.088299" calcext:value-type="float">
            <text:p>3,51E+01</text:p>
          </table:table-cell>
          <table:table-cell office:value-type="float" office:value="13.766046" calcext:value-type="float">
            <text:p>1,38E+01</text:p>
          </table:table-cell>
        </table:table-row>
        <table:table-row table:style-name="ro1">
          <table:table-cell/>
          <table:table-cell office:value-type="float" office:value="5.3421734" calcext:value-type="float">
            <text:p>5,34E+00</text:p>
          </table:table-cell>
          <table:table-cell office:value-type="float" office:value="35.579781" calcext:value-type="float">
            <text:p>3,56E+01</text:p>
          </table:table-cell>
          <table:table-cell office:value-type="float" office:value="27.544489" calcext:value-type="float">
            <text:p>2,75E+01</text:p>
          </table:table-cell>
        </table:table-row>
        <table:table-row table:style-name="ro1">
          <table:table-cell/>
          <table:table-cell office:value-type="float" office:value="4.8330268" calcext:value-type="float">
            <text:p>4,83E+00</text:p>
          </table:table-cell>
          <table:table-cell office:value-type="float" office:value="35.709126" calcext:value-type="float">
            <text:p>3,57E+01</text:p>
          </table:table-cell>
          <table:table-cell office:value-type="float" office:value="26.023824" calcext:value-type="float">
            <text:p>2,60E+01</text:p>
          </table:table-cell>
        </table:table-row>
        <table:table-row table:style-name="ro1">
          <table:table-cell/>
          <table:table-cell office:value-type="float" office:value="2.5546029" calcext:value-type="float">
            <text:p>2,55E+00</text:p>
          </table:table-cell>
          <table:table-cell office:value-type="float" office:value="31.678585" calcext:value-type="float">
            <text:p>3,17E+01</text:p>
          </table:table-cell>
          <table:table-cell office:value-type="float" office:value="21.519375" calcext:value-type="float">
            <text:p>2,15E+01</text:p>
          </table:table-cell>
        </table:table-row>
        <table:table-row table:style-name="ro1">
          <table:table-cell/>
          <table:table-cell office:value-type="float" office:value="-6.1856642" calcext:value-type="float">
            <text:p>-6,19E+00</text:p>
          </table:table-cell>
          <table:table-cell office:value-type="float" office:value="20.805542" calcext:value-type="float">
            <text:p>2,08E+01</text:p>
          </table:table-cell>
          <table:table-cell office:value-type="float" office:value="34.658642" calcext:value-type="float">
            <text:p>3,47E+01</text:p>
          </table:table-cell>
        </table:table-row>
        <table:table-row table:style-name="ro1">
          <table:table-cell/>
          <table:table-cell office:value-type="float" office:value="-2.5840888" calcext:value-type="float">
            <text:p>-2,58E+00</text:p>
          </table:table-cell>
          <table:table-cell office:value-type="float" office:value="15.329085" calcext:value-type="float">
            <text:p>1,53E+01</text:p>
          </table:table-cell>
          <table:table-cell office:value-type="float" office:value="40.869744" calcext:value-type="float">
            <text:p>4,09E+01</text:p>
          </table:table-cell>
        </table:table-row>
        <table:table-row table:style-name="ro1">
          <table:table-cell/>
          <table:table-cell office:value-type="float" office:value="0.992038" calcext:value-type="float">
            <text:p>9,92E-01</text:p>
          </table:table-cell>
          <table:table-cell office:value-type="float" office:value="13.559321" calcext:value-type="float">
            <text:p>1,36E+01</text:p>
          </table:table-cell>
          <table:table-cell office:value-type="float" office:value="50.765625" calcext:value-type="float">
            <text:p>5,08E+01</text:p>
          </table:table-cell>
        </table:table-row>
        <table:table-row table:style-name="ro1">
          <table:table-cell/>
          <table:table-cell office:value-type="float" office:value="-6.8307513" calcext:value-type="float">
            <text:p>-6,83E+00</text:p>
          </table:table-cell>
          <table:table-cell office:value-type="float" office:value="19.668683" calcext:value-type="float">
            <text:p>1,97E+01</text:p>
          </table:table-cell>
          <table:table-cell office:value-type="float" office:value="49.653475" calcext:value-type="float">
            <text:p>4,97E+01</text:p>
          </table:table-cell>
        </table:table-row>
        <table:table-row table:style-name="ro1">
          <table:table-cell/>
          <table:table-cell office:value-type="float" office:value="1.601133" calcext:value-type="float">
            <text:p>1,60E+00</text:p>
          </table:table-cell>
          <table:table-cell office:value-type="float" office:value="23.688148" calcext:value-type="float">
            <text:p>2,37E+01</text:p>
          </table:table-cell>
          <table:table-cell office:value-type="float" office:value="43.350665" calcext:value-type="float">
            <text:p>4,34E+01</text:p>
          </table:table-cell>
        </table:table-row>
        <table:table-row table:style-name="ro1">
          <table:table-cell/>
          <table:table-cell office:value-type="float" office:value="7.8602368" calcext:value-type="float">
            <text:p>7,86E+00</text:p>
          </table:table-cell>
          <table:table-cell office:value-type="float" office:value="22.364507" calcext:value-type="float">
            <text:p>2,24E+01</text:p>
          </table:table-cell>
          <table:table-cell office:value-type="float" office:value="33.650406" calcext:value-type="float">
            <text:p>3,37E+01</text:p>
          </table:table-cell>
        </table:table-row>
        <table:table-row table:style-name="ro1">
          <table:table-cell/>
          <table:table-cell office:value-type="float" office:value="4.6624634" calcext:value-type="float">
            <text:p>4,66E+00</text:p>
          </table:table-cell>
          <table:table-cell office:value-type="float" office:value="17.539813" calcext:value-type="float">
            <text:p>1,75E+01</text:p>
          </table:table-cell>
          <table:table-cell office:value-type="float" office:value="35.446577" calcext:value-type="float">
            <text:p>3,54E+01</text:p>
          </table:table-cell>
        </table:table-row>
        <table:table-row table:style-name="ro1">
          <table:table-cell/>
          <table:table-cell office:value-type="float" office:value="-8.252581" calcext:value-type="float">
            <text:p>-8,25E+00</text:p>
          </table:table-cell>
          <table:table-cell office:value-type="float" office:value="12.955454" calcext:value-type="float">
            <text:p>1,30E+01</text:p>
          </table:table-cell>
          <table:table-cell office:value-type="float" office:value="44.221894" calcext:value-type="float">
            <text:p>4,42E+01</text:p>
          </table:table-cell>
        </table:table-row>
        <table:table-row table:style-name="ro1">
          <table:table-cell/>
          <table:table-cell office:value-type="float" office:value="-1.8235353" calcext:value-type="float">
            <text:p>-1,82E+00</text:p>
          </table:table-cell>
          <table:table-cell office:value-type="float" office:value="15.534344" calcext:value-type="float">
            <text:p>1,55E+01</text:p>
          </table:table-cell>
          <table:table-cell office:value-type="float" office:value="38.656224" calcext:value-type="float">
            <text:p>3,87E+01</text:p>
          </table:table-cell>
        </table:table-row>
        <table:table-row table:style-name="ro1">
          <table:table-cell/>
          <table:table-cell office:value-type="float" office:value="-2.5772085" calcext:value-type="float">
            <text:p>-2,58E+00</text:p>
          </table:table-cell>
          <table:table-cell office:value-type="float" office:value="18.024581" calcext:value-type="float">
            <text:p>1,80E+01</text:p>
          </table:table-cell>
          <table:table-cell office:value-type="float" office:value="43.150063" calcext:value-type="float">
            <text:p>4,32E+01</text:p>
          </table:table-cell>
        </table:table-row>
        <table:table-row table:style-name="ro1">
          <table:table-cell/>
          <table:table-cell office:value-type="float" office:value="1.6644006" calcext:value-type="float">
            <text:p>1,66E+00</text:p>
          </table:table-cell>
          <table:table-cell office:value-type="float" office:value="15.89522" calcext:value-type="float">
            <text:p>1,59E+01</text:p>
          </table:table-cell>
          <table:table-cell office:value-type="float" office:value="54.727492" calcext:value-type="float">
            <text:p>5,47E+01</text:p>
          </table:table-cell>
        </table:table-row>
        <table:table-row table:style-name="ro1">
          <table:table-cell/>
          <table:table-cell office:value-type="float" office:value="-7.147113" calcext:value-type="float">
            <text:p>-7,15E+00</text:p>
          </table:table-cell>
          <table:table-cell office:value-type="float" office:value="15.075465" calcext:value-type="float">
            <text:p>1,51E+01</text:p>
          </table:table-cell>
          <table:table-cell office:value-type="float" office:value="57.502428" calcext:value-type="float">
            <text:p>5,75E+01</text:p>
          </table:table-cell>
        </table:table-row>
        <table:table-row table:style-name="ro1">
          <table:table-cell/>
          <table:table-cell office:value-type="float" office:value="-1.5265194" calcext:value-type="float">
            <text:p>-1,53E+00</text:p>
          </table:table-cell>
          <table:table-cell office:value-type="float" office:value="17.60279" calcext:value-type="float">
            <text:p>1,76E+01</text:p>
          </table:table-cell>
          <table:table-cell office:value-type="float" office:value="56.268619" calcext:value-type="float">
            <text:p>5,63E+01</text:p>
          </table:table-cell>
        </table:table-row>
        <table:table-row table:style-name="ro1">
          <table:table-cell/>
          <table:table-cell office:value-type="float" office:value="16.556261" calcext:value-type="float">
            <text:p>1,66E+01</text:p>
          </table:table-cell>
          <table:table-cell office:value-type="float" office:value="21.046427" calcext:value-type="float">
            <text:p>2,10E+01</text:p>
          </table:table-cell>
          <table:table-cell office:value-type="float" office:value="62.150966" calcext:value-type="float">
            <text:p>6,22E+01</text:p>
          </table:table-cell>
        </table:table-row>
        <table:table-row table:style-name="ro1">
          <table:table-cell/>
          <table:table-cell office:value-type="float" office:value="-5.2276346" calcext:value-type="float">
            <text:p>-5,23E+00</text:p>
          </table:table-cell>
          <table:table-cell office:value-type="float" office:value="26.976715" calcext:value-type="float">
            <text:p>2,70E+01</text:p>
          </table:table-cell>
          <table:table-cell office:value-type="float" office:value="59.417294" calcext:value-type="float">
            <text:p>5,94E+01</text:p>
          </table:table-cell>
        </table:table-row>
        <table:table-row table:style-name="ro1">
          <table:table-cell/>
          <table:table-cell office:value-type="float" office:value="-4.7113545" calcext:value-type="float">
            <text:p>-4,71E+00</text:p>
          </table:table-cell>
          <table:table-cell office:value-type="float" office:value="29.892896" calcext:value-type="float">
            <text:p>2,99E+01</text:p>
          </table:table-cell>
          <table:table-cell office:value-type="float" office:value="45.027511" calcext:value-type="float">
            <text:p>4,50E+01</text:p>
          </table:table-cell>
        </table:table-row>
        <table:table-row table:style-name="ro1">
          <table:table-cell/>
          <table:table-cell office:value-type="float" office:value="5.6058877" calcext:value-type="float">
            <text:p>5,61E+00</text:p>
          </table:table-cell>
          <table:table-cell office:value-type="float" office:value="31.524392" calcext:value-type="float">
            <text:p>3,15E+01</text:p>
          </table:table-cell>
          <table:table-cell office:value-type="float" office:value="37.17052" calcext:value-type="float">
            <text:p>3,72E+01</text:p>
          </table:table-cell>
        </table:table-row>
        <table:table-row table:style-name="ro1">
          <table:table-cell/>
          <table:table-cell office:value-type="float" office:value="-6.0633355" calcext:value-type="float">
            <text:p>-6,06E+00</text:p>
          </table:table-cell>
          <table:table-cell office:value-type="float" office:value="32.620687" calcext:value-type="float">
            <text:p>3,26E+01</text:p>
          </table:table-cell>
          <table:table-cell office:value-type="float" office:value="37.07151" calcext:value-type="float">
            <text:p>3,71E+01</text:p>
          </table:table-cell>
        </table:table-row>
        <table:table-row table:style-name="ro1">
          <table:table-cell/>
          <table:table-cell office:value-type="float" office:value="-3.5839241" calcext:value-type="float">
            <text:p>-3,58E+00</text:p>
          </table:table-cell>
          <table:table-cell office:value-type="float" office:value="33.443609" calcext:value-type="float">
            <text:p>3,34E+01</text:p>
          </table:table-cell>
          <table:table-cell office:value-type="float" office:value="40.696713" calcext:value-type="float">
            <text:p>4,07E+01</text:p>
          </table:table-cell>
        </table:table-row>
        <table:table-row table:style-name="ro1">
          <table:table-cell/>
          <table:table-cell office:value-type="float" office:value="-1.3939093" calcext:value-type="float">
            <text:p>-1,39E+00</text:p>
          </table:table-cell>
          <table:table-cell office:value-type="float" office:value="34.715997" calcext:value-type="float">
            <text:p>3,47E+01</text:p>
          </table:table-cell>
          <table:table-cell office:value-type="float" office:value="30.111544" calcext:value-type="float">
            <text:p>3,01E+01</text:p>
          </table:table-cell>
        </table:table-row>
        <table:table-row table:style-name="ro1">
          <table:table-cell/>
          <table:table-cell office:value-type="float" office:value="2.9826302" calcext:value-type="float">
            <text:p>2,98E+00</text:p>
          </table:table-cell>
          <table:table-cell office:value-type="float" office:value="34.870975" calcext:value-type="float">
            <text:p>3,49E+01</text:p>
          </table:table-cell>
          <table:table-cell office:value-type="float" office:value="37.938107" calcext:value-type="float">
            <text:p>3,79E+01</text:p>
          </table:table-cell>
        </table:table-row>
        <table:table-row table:style-name="ro1">
          <table:table-cell/>
          <table:table-cell office:value-type="float" office:value="-1.2282079" calcext:value-type="float">
            <text:p>-1,23E+00</text:p>
          </table:table-cell>
          <table:table-cell office:value-type="float" office:value="37.503923" calcext:value-type="float">
            <text:p>3,75E+01</text:p>
          </table:table-cell>
          <table:table-cell office:value-type="float" office:value="42.135816" calcext:value-type="float">
            <text:p>4,21E+01</text:p>
          </table:table-cell>
        </table:table-row>
        <table:table-row table:style-name="ro1">
          <table:table-cell/>
          <table:table-cell office:value-type="float" office:value="4.5789099" calcext:value-type="float">
            <text:p>4,58E+00</text:p>
          </table:table-cell>
          <table:table-cell office:value-type="float" office:value="40.206737" calcext:value-type="float">
            <text:p>4,02E+01</text:p>
          </table:table-cell>
          <table:table-cell office:value-type="float" office:value="48.918468" calcext:value-type="float">
            <text:p>4,89E+01</text:p>
          </table:table-cell>
        </table:table-row>
        <table:table-row table:style-name="ro1">
          <table:table-cell/>
          <table:table-cell office:value-type="float" office:value="-8.764245" calcext:value-type="float">
            <text:p>-8,76E+00</text:p>
          </table:table-cell>
          <table:table-cell office:value-type="float" office:value="43.335624" calcext:value-type="float">
            <text:p>4,33E+01</text:p>
          </table:table-cell>
          <table:table-cell office:value-type="float" office:value="50.165489" calcext:value-type="float">
            <text:p>5,02E+01</text:p>
          </table:table-cell>
        </table:table-row>
        <table:table-row table:style-name="ro1">
          <table:table-cell/>
          <table:table-cell office:value-type="float" office:value="-4.5300167" calcext:value-type="float">
            <text:p>-4,53E+00</text:p>
          </table:table-cell>
          <table:table-cell office:value-type="float" office:value="39.702492" calcext:value-type="float">
            <text:p>3,97E+01</text:p>
          </table:table-cell>
          <table:table-cell office:value-type="float" office:value="55.749458" calcext:value-type="float">
            <text:p>5,57E+01</text:p>
          </table:table-cell>
        </table:table-row>
        <table:table-row table:style-name="ro1">
          <table:table-cell/>
          <table:table-cell office:value-type="float" office:value="7.3054578" calcext:value-type="float">
            <text:p>7,31E+00</text:p>
          </table:table-cell>
          <table:table-cell office:value-type="float" office:value="43.253674" calcext:value-type="float">
            <text:p>4,33E+01</text:p>
          </table:table-cell>
          <table:table-cell office:value-type="float" office:value="63.745744" calcext:value-type="float">
            <text:p>6,37E+01</text:p>
          </table:table-cell>
        </table:table-row>
        <table:table-row table:style-name="ro1">
          <table:table-cell/>
          <table:table-cell office:value-type="float" office:value="-11.455108" calcext:value-type="float">
            <text:p>-1,15E+01</text:p>
          </table:table-cell>
          <table:table-cell office:value-type="float" office:value="47.054656" calcext:value-type="float">
            <text:p>4,71E+01</text:p>
          </table:table-cell>
          <table:table-cell office:value-type="float" office:value="60.214855" calcext:value-type="float">
            <text:p>6,02E+01</text:p>
          </table:table-cell>
        </table:table-row>
        <table:table-row table:style-name="ro1">
          <table:table-cell/>
          <table:table-cell office:value-type="float" office:value="14.142312" calcext:value-type="float">
            <text:p>1,41E+01</text:p>
          </table:table-cell>
          <table:table-cell office:value-type="float" office:value="50.86939" calcext:value-type="float">
            <text:p>5,09E+01</text:p>
          </table:table-cell>
          <table:table-cell office:value-type="float" office:value="65.459708" calcext:value-type="float">
            <text:p>6,55E+01</text:p>
          </table:table-cell>
        </table:table-row>
        <table:table-row table:style-name="ro1">
          <table:table-cell/>
          <table:table-cell office:value-type="float" office:value="10.104911" calcext:value-type="float">
            <text:p>1,01E+01</text:p>
          </table:table-cell>
          <table:table-cell office:value-type="float" office:value="56.806754" calcext:value-type="float">
            <text:p>5,68E+01</text:p>
          </table:table-cell>
          <table:table-cell office:value-type="float" office:value="73.676382" calcext:value-type="float">
            <text:p>7,37E+01</text:p>
          </table:table-cell>
        </table:table-row>
        <table:table-row table:style-name="ro1">
          <table:table-cell/>
          <table:table-cell office:value-type="float" office:value="-3.0388197" calcext:value-type="float">
            <text:p>-3,04E+00</text:p>
          </table:table-cell>
          <table:table-cell office:value-type="float" office:value="57.274224" calcext:value-type="float">
            <text:p>5,73E+01</text:p>
          </table:table-cell>
          <table:table-cell office:value-type="float" office:value="81.208621" calcext:value-type="float">
            <text:p>8,12E+01</text:p>
          </table:table-cell>
        </table:table-row>
        <table:table-row table:style-name="ro1">
          <table:table-cell/>
          <table:table-cell office:value-type="float" office:value="7.3158594" calcext:value-type="float">
            <text:p>7,32E+00</text:p>
          </table:table-cell>
          <table:table-cell office:value-type="float" office:value="56.824304" calcext:value-type="float">
            <text:p>5,68E+01</text:p>
          </table:table-cell>
          <table:table-cell office:value-type="float" office:value="78.115411" calcext:value-type="float">
            <text:p>7,81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onyme</meta:initial-creator>
    <meta:creation-date>2026-05-14T16:31:33.283000000</meta:creation-date>
    <dc:date>2026-05-14T17:05:14.908000000</dc:date>
    <dc:creator>Anonyme</dc:creator>
    <meta:editing-duration>PT1M53S</meta:editing-duration>
    <meta:editing-cycles>1</meta:editing-cycles>
    <meta:document-statistic meta:table-count="1" meta:cell-count="1263" meta:object-count="1"/>
    <meta:generator>LibreOffice/7.3.4.2$Windows_x86 LibreOffice_project/728fec16bd5f605073805c3c9e7c4212a0120dc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75cm" svg:height="13.289cm" xlink:href=".." xlink:type="simple" chart:class="chart:line" chart:style-name="ch1">
        <chart:legend chart:legend-position="end" svg:x="20.58cm" svg:y="5.838cm" style:legend-expansion="high" chart:style-name="ch2"/>
        <chart:plot-area chart:style-name="ch3" table:cell-range-address="Feuille1.B1:Feuille1.D419" svg:x="0.471cm" svg:y="0.265cm" svg:width="19.638cm" svg:height="12.759cm">
          <chart:coordinate-region svg:x="2.352cm" svg:y="0.467cm" svg:width="17.757cm" svg:height="12.3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1:Feuille1.B419" chart:class="chart:line">
            <chart:data-point chart:repeated="419"/>
          </chart:series>
          <chart:series chart:style-name="ch8" chart:values-cell-range-address="Feuille1.C1:Feuille1.C419" chart:class="chart:line">
            <chart:data-point chart:repeated="419"/>
          </chart:series>
          <chart:series chart:style-name="ch9" chart:values-cell-range-address="Feuille1.D1:Feuille1.D419" chart:class="chart:line">
            <chart:data-point chart:repeated="4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877264">
                <text:p>11.877264</text:p>
                <draw:g>
                  <svg:desc>Feuille1.B1:Feuille1.B419</svg:desc>
                </draw:g>
              </table:table-cell>
              <table:table-cell office:value-type="float" office:value="36.064235">
                <text:p>36.064235</text:p>
                <draw:g>
                  <svg:desc>Feuille1.C1:Feuille1.C419</svg:desc>
                </draw:g>
              </table:table-cell>
              <table:table-cell office:value-type="float" office:value="-47.999534">
                <text:p>-47.999534</text:p>
                <draw:g>
                  <svg:desc>Feuille1.D1:Feuille1.D4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191496">
                <text:p>1.4191496</text:p>
              </table:table-cell>
              <table:table-cell office:value-type="float" office:value="41.527016">
                <text:p>41.527016</text:p>
              </table:table-cell>
              <table:table-cell office:value-type="float" office:value="-48.286474">
                <text:p>-48.286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77108">
                <text:p>1.1777108</text:p>
              </table:table-cell>
              <table:table-cell office:value-type="float" office:value="43.99125">
                <text:p>43.99125</text:p>
              </table:table-cell>
              <table:table-cell office:value-type="float" office:value="-47.0825">
                <text:p>-47.0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455136">
                <text:p>27.455136</text:p>
              </table:table-cell>
              <table:table-cell office:value-type="float" office:value="48.105889">
                <text:p>48.105889</text:p>
              </table:table-cell>
              <table:table-cell office:value-type="float" office:value="-43.857651">
                <text:p>-43.857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3.110436">
                <text:p>-13.110436</text:p>
              </table:table-cell>
              <table:table-cell office:value-type="float" office:value="52.033462">
                <text:p>52.033462</text:p>
              </table:table-cell>
              <table:table-cell office:value-type="float" office:value="-41.571063">
                <text:p>-41.571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258073">
                <text:p>36.258073</text:p>
              </table:table-cell>
              <table:table-cell office:value-type="float" office:value="52.942861">
                <text:p>52.942861</text:p>
              </table:table-cell>
              <table:table-cell office:value-type="float" office:value="-40.98796">
                <text:p>-40.98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084422">
                <text:p>-14.084422</text:p>
              </table:table-cell>
              <table:table-cell office:value-type="float" office:value="57.665996">
                <text:p>57.665996</text:p>
              </table:table-cell>
              <table:table-cell office:value-type="float" office:value="-42.78173">
                <text:p>-42.78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83655">
                <text:p>20.83655</text:p>
              </table:table-cell>
              <table:table-cell office:value-type="float" office:value="63.15587">
                <text:p>63.15587</text:p>
              </table:table-cell>
              <table:table-cell office:value-type="float" office:value="-37.573865">
                <text:p>-37.573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.715772">
                <text:p>-23.715772</text:p>
              </table:table-cell>
              <table:table-cell office:value-type="float" office:value="74.403785">
                <text:p>74.403785</text:p>
              </table:table-cell>
              <table:table-cell office:value-type="float" office:value="-38.454928">
                <text:p>-38.454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9.708188">
                <text:p>-59.708188</text:p>
              </table:table-cell>
              <table:table-cell office:value-type="float" office:value="72.90661">
                <text:p>72.90661</text:p>
              </table:table-cell>
              <table:table-cell office:value-type="float" office:value="-34.808854">
                <text:p>-34.8088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1213">
                <text:p>9.1213</text:p>
              </table:table-cell>
              <table:table-cell office:value-type="float" office:value="76.712093">
                <text:p>76.712093</text:p>
              </table:table-cell>
              <table:table-cell office:value-type="float" office:value="-31.048386">
                <text:p>-31.048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176654">
                <text:p>26.176654</text:p>
              </table:table-cell>
              <table:table-cell office:value-type="float" office:value="72.71761">
                <text:p>72.71761</text:p>
              </table:table-cell>
              <table:table-cell office:value-type="float" office:value="12.969996">
                <text:p>12.969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02647">
                <text:p>10.102647</text:p>
              </table:table-cell>
              <table:table-cell office:value-type="float" office:value="64.878445">
                <text:p>64.878445</text:p>
              </table:table-cell>
              <table:table-cell office:value-type="float" office:value="38.00726">
                <text:p>38.00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309791">
                <text:p>9.2309791</text:p>
              </table:table-cell>
              <table:table-cell office:value-type="float" office:value="68.65206">
                <text:p>68.65206</text:p>
              </table:table-cell>
              <table:table-cell office:value-type="float" office:value="39.179805">
                <text:p>39.179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544122">
                <text:p>15.544122</text:p>
              </table:table-cell>
              <table:table-cell office:value-type="float" office:value="63.149657">
                <text:p>63.149657</text:p>
              </table:table-cell>
              <table:table-cell office:value-type="float" office:value="38.475565">
                <text:p>38.47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457981">
                <text:p>3.5457981</text:p>
              </table:table-cell>
              <table:table-cell office:value-type="float" office:value="70.429073">
                <text:p>70.429073</text:p>
              </table:table-cell>
              <table:table-cell office:value-type="float" office:value="39.772538">
                <text:p>39.772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8525595">
                <text:p>-8.8525595</text:p>
              </table:table-cell>
              <table:table-cell office:value-type="float" office:value="60.627158">
                <text:p>60.627158</text:p>
              </table:table-cell>
              <table:table-cell office:value-type="float" office:value="39.25961">
                <text:p>39.25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3.292599">
                <text:p>-23.292599</text:p>
              </table:table-cell>
              <table:table-cell office:value-type="float" office:value="50.688233">
                <text:p>50.688233</text:p>
              </table:table-cell>
              <table:table-cell office:value-type="float" office:value="36.246946">
                <text:p>36.246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1.902449">
                <text:p>-31.902449</text:p>
              </table:table-cell>
              <table:table-cell office:value-type="float" office:value="48.511725">
                <text:p>48.511725</text:p>
              </table:table-cell>
              <table:table-cell office:value-type="float" office:value="34.486722">
                <text:p>34.4867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852437">
                <text:p>11.852437</text:p>
              </table:table-cell>
              <table:table-cell office:value-type="float" office:value="48.834946">
                <text:p>48.834946</text:p>
              </table:table-cell>
              <table:table-cell office:value-type="float" office:value="31.903647">
                <text:p>31.903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577179">
                <text:p>3.7577179</text:p>
              </table:table-cell>
              <table:table-cell office:value-type="float" office:value="49.145886">
                <text:p>49.145886</text:p>
              </table:table-cell>
              <table:table-cell office:value-type="float" office:value="30.395373">
                <text:p>30.395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348628">
                <text:p>1.6348628</text:p>
              </table:table-cell>
              <table:table-cell office:value-type="float" office:value="47.492512">
                <text:p>47.492512</text:p>
              </table:table-cell>
              <table:table-cell office:value-type="float" office:value="30.140623">
                <text:p>30.1406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.765544">
                <text:p>-10.765544</text:p>
              </table:table-cell>
              <table:table-cell office:value-type="float" office:value="26.63957">
                <text:p>26.63957</text:p>
              </table:table-cell>
              <table:table-cell office:value-type="float" office:value="31.654993">
                <text:p>31.6549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8.806907">
                <text:p>-48.806907</text:p>
              </table:table-cell>
              <table:table-cell office:value-type="float" office:value="11.562386">
                <text:p>11.562386</text:p>
              </table:table-cell>
              <table:table-cell office:value-type="float" office:value="30.496457">
                <text:p>30.4964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3.393275">
                <text:p>-23.393275</text:p>
              </table:table-cell>
              <table:table-cell office:value-type="float" office:value="4.9306377">
                <text:p>4.9306377</text:p>
              </table:table-cell>
              <table:table-cell office:value-type="float" office:value="32.093429">
                <text:p>32.0934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9156272">
                <text:p>-1.9156272</text:p>
              </table:table-cell>
              <table:table-cell office:value-type="float" office:value="-8.6688632">
                <text:p>-8.6688632</text:p>
              </table:table-cell>
              <table:table-cell office:value-type="float" office:value="33.461023">
                <text:p>33.4610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.9174378">
                <text:p>-8.9174378</text:p>
              </table:table-cell>
              <table:table-cell office:value-type="float" office:value="-22.303538">
                <text:p>-22.303538</text:p>
              </table:table-cell>
              <table:table-cell office:value-type="float" office:value="32.932234">
                <text:p>32.932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225454">
                <text:p>5.5225454</text:p>
              </table:table-cell>
              <table:table-cell office:value-type="float" office:value="-24.93713">
                <text:p>-24.93713</text:p>
              </table:table-cell>
              <table:table-cell office:value-type="float" office:value="32.819119">
                <text:p>32.819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962196">
                <text:p>29.962196</text:p>
              </table:table-cell>
              <table:table-cell office:value-type="float" office:value="-17.903098">
                <text:p>-17.903098</text:p>
              </table:table-cell>
              <table:table-cell office:value-type="float" office:value="38.489524">
                <text:p>38.489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172343">
                <text:p>31.172343</text:p>
              </table:table-cell>
              <table:table-cell office:value-type="float" office:value="-22.687221">
                <text:p>-22.687221</text:p>
              </table:table-cell>
              <table:table-cell office:value-type="float" office:value="36.707612">
                <text:p>36.707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594092">
                <text:p>25.594092</text:p>
              </table:table-cell>
              <table:table-cell office:value-type="float" office:value="-26.356646">
                <text:p>-26.356646</text:p>
              </table:table-cell>
              <table:table-cell office:value-type="float" office:value="37.893827">
                <text:p>37.8938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02579">
                <text:p>37.02579</text:p>
              </table:table-cell>
              <table:table-cell office:value-type="float" office:value="-15.557235">
                <text:p>-15.557235</text:p>
              </table:table-cell>
              <table:table-cell office:value-type="float" office:value="35.673879">
                <text:p>35.673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18.88749">
                <text:p>-118.88749</text:p>
              </table:table-cell>
              <table:table-cell office:value-type="float" office:value="-15.178859">
                <text:p>-15.178859</text:p>
              </table:table-cell>
              <table:table-cell office:value-type="float" office:value="39.447162">
                <text:p>39.447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380641">
                <text:p>41.380641</text:p>
              </table:table-cell>
              <table:table-cell office:value-type="float" office:value="-6.6756524">
                <text:p>-6.6756524</text:p>
              </table:table-cell>
              <table:table-cell office:value-type="float" office:value="41.280268">
                <text:p>41.2802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23125">
                <text:p>16.223125</text:p>
              </table:table-cell>
              <table:table-cell office:value-type="float" office:value="-16.741284">
                <text:p>-16.741284</text:p>
              </table:table-cell>
              <table:table-cell office:value-type="float" office:value="39.19817">
                <text:p>39.19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.554891">
                <text:p>-17.554891</text:p>
              </table:table-cell>
              <table:table-cell office:value-type="float" office:value="-26.532894">
                <text:p>-26.532894</text:p>
              </table:table-cell>
              <table:table-cell office:value-type="float" office:value="27.859425">
                <text:p>27.8594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.913337">
                <text:p>31.913337</text:p>
              </table:table-cell>
              <table:table-cell office:value-type="float" office:value="-30.845826">
                <text:p>-30.845826</text:p>
              </table:table-cell>
              <table:table-cell office:value-type="float" office:value="27.604988">
                <text:p>27.604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585541">
                <text:p>29.585541</text:p>
              </table:table-cell>
              <table:table-cell office:value-type="float" office:value="-13.799185">
                <text:p>-13.799185</text:p>
              </table:table-cell>
              <table:table-cell office:value-type="float" office:value="29.294073">
                <text:p>29.294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2.13142">
                <text:p>-22.13142</text:p>
              </table:table-cell>
              <table:table-cell office:value-type="float" office:value="-10.641364">
                <text:p>-10.641364</text:p>
              </table:table-cell>
              <table:table-cell office:value-type="float" office:value="28.223462">
                <text:p>28.223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1251839">
                <text:p>5.1251839</text:p>
              </table:table-cell>
              <table:table-cell office:value-type="float" office:value="-2.7935532">
                <text:p>-2.7935532</text:p>
              </table:table-cell>
              <table:table-cell office:value-type="float" office:value="27.839381">
                <text:p>27.8393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757941">
                <text:p>38.757941</text:p>
              </table:table-cell>
              <table:table-cell office:value-type="float" office:value="-0.40016598">
                <text:p>-0.40016598</text:p>
              </table:table-cell>
              <table:table-cell office:value-type="float" office:value="27.829517">
                <text:p>27.8295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057148">
                <text:p>7.2057148</text:p>
              </table:table-cell>
              <table:table-cell office:value-type="float" office:value="-4.5850303">
                <text:p>-4.5850303</text:p>
              </table:table-cell>
              <table:table-cell office:value-type="float" office:value="27.524116">
                <text:p>27.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736682">
                <text:p>8.4736682</text:p>
              </table:table-cell>
              <table:table-cell office:value-type="float" office:value="-6.6081813">
                <text:p>-6.6081813</text:p>
              </table:table-cell>
              <table:table-cell office:value-type="float" office:value="27.515977">
                <text:p>27.515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511911">
                <text:p>18.511911</text:p>
              </table:table-cell>
              <table:table-cell office:value-type="float" office:value="-7.2264292">
                <text:p>-7.2264292</text:p>
              </table:table-cell>
              <table:table-cell office:value-type="float" office:value="26.18047">
                <text:p>26.180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.208383">
                <text:p>36.208383</text:p>
              </table:table-cell>
              <table:table-cell office:value-type="float" office:value="-4.1277071">
                <text:p>-4.1277071</text:p>
              </table:table-cell>
              <table:table-cell office:value-type="float" office:value="25.809356">
                <text:p>25.809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15496">
                <text:p>11.15496</text:p>
              </table:table-cell>
              <table:table-cell office:value-type="float" office:value="-3.0070054">
                <text:p>-3.0070054</text:p>
              </table:table-cell>
              <table:table-cell office:value-type="float" office:value="26.129473">
                <text:p>26.129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306982">
                <text:p>29.306982</text:p>
              </table:table-cell>
              <table:table-cell office:value-type="float" office:value="-16.616828">
                <text:p>-16.616828</text:p>
              </table:table-cell>
              <table:table-cell office:value-type="float" office:value="26.567188">
                <text:p>26.567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3.32947">
                <text:p>-113.32947</text:p>
              </table:table-cell>
              <table:table-cell office:value-type="float" office:value="-29.198924">
                <text:p>-29.198924</text:p>
              </table:table-cell>
              <table:table-cell office:value-type="float" office:value="28.930631">
                <text:p>28.930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983205">
                <text:p>77.983205</text:p>
              </table:table-cell>
              <table:table-cell office:value-type="float" office:value="-25.173715">
                <text:p>-25.173715</text:p>
              </table:table-cell>
              <table:table-cell office:value-type="float" office:value="30.640162">
                <text:p>30.640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7543089">
                <text:p>9.7543089</text:p>
              </table:table-cell>
              <table:table-cell office:value-type="float" office:value="-25.468048">
                <text:p>-25.468048</text:p>
              </table:table-cell>
              <table:table-cell office:value-type="float" office:value="30.411017">
                <text:p>30.4110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8.950365">
                <text:p>-18.950365</text:p>
              </table:table-cell>
              <table:table-cell office:value-type="float" office:value="-23.67821">
                <text:p>-23.67821</text:p>
              </table:table-cell>
              <table:table-cell office:value-type="float" office:value="28.496427">
                <text:p>28.4964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8.987625">
                <text:p>-38.987625</text:p>
              </table:table-cell>
              <table:table-cell office:value-type="float" office:value="-16.671414">
                <text:p>-16.671414</text:p>
              </table:table-cell>
              <table:table-cell office:value-type="float" office:value="29.958037">
                <text:p>29.958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314101">
                <text:p>18.314101</text:p>
              </table:table-cell>
              <table:table-cell office:value-type="float" office:value="-20.900031">
                <text:p>-20.900031</text:p>
              </table:table-cell>
              <table:table-cell office:value-type="float" office:value="29.529312">
                <text:p>29.5293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3.143414">
                <text:p>-23.143414</text:p>
              </table:table-cell>
              <table:table-cell office:value-type="float" office:value="-24.37185">
                <text:p>-24.37185</text:p>
              </table:table-cell>
              <table:table-cell office:value-type="float" office:value="27.727462">
                <text:p>27.7274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960978">
                <text:p>16.960978</text:p>
              </table:table-cell>
              <table:table-cell office:value-type="float" office:value="-26.902206">
                <text:p>-26.902206</text:p>
              </table:table-cell>
              <table:table-cell office:value-type="float" office:value="28.883643">
                <text:p>28.8836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920395">
                <text:p>24.920395</text:p>
              </table:table-cell>
              <table:table-cell office:value-type="float" office:value="-27.018709">
                <text:p>-27.018709</text:p>
              </table:table-cell>
              <table:table-cell office:value-type="float" office:value="27.323108">
                <text:p>27.323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5589347">
                <text:p>-2.5589347</text:p>
              </table:table-cell>
              <table:table-cell office:value-type="float" office:value="-14.285117">
                <text:p>-14.285117</text:p>
              </table:table-cell>
              <table:table-cell office:value-type="float" office:value="27.247844">
                <text:p>27.2478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.83631">
                <text:p>22.83631</text:p>
              </table:table-cell>
              <table:table-cell office:value-type="float" office:value="-14.722074">
                <text:p>-14.722074</text:p>
              </table:table-cell>
              <table:table-cell office:value-type="float" office:value="26.943411">
                <text:p>26.9434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046875">
                <text:p>24.046875</text:p>
              </table:table-cell>
              <table:table-cell office:value-type="float" office:value="-18.628262">
                <text:p>-18.628262</text:p>
              </table:table-cell>
              <table:table-cell office:value-type="float" office:value="27.482167">
                <text:p>27.4821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3.88154">
                <text:p>-113.88154</text:p>
              </table:table-cell>
              <table:table-cell office:value-type="float" office:value="-19.05797">
                <text:p>-19.05797</text:p>
              </table:table-cell>
              <table:table-cell office:value-type="float" office:value="25.202783">
                <text:p>25.2027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.392494">
                <text:p>31.392494</text:p>
              </table:table-cell>
              <table:table-cell office:value-type="float" office:value="-19.325003">
                <text:p>-19.325003</text:p>
              </table:table-cell>
              <table:table-cell office:value-type="float" office:value="23.964996">
                <text:p>23.9649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447789">
                <text:p>10.447789</text:p>
              </table:table-cell>
              <table:table-cell office:value-type="float" office:value="-19.747623">
                <text:p>-19.747623</text:p>
              </table:table-cell>
              <table:table-cell office:value-type="float" office:value="24.436303">
                <text:p>24.4363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112863">
                <text:p>18.112863</text:p>
              </table:table-cell>
              <table:table-cell office:value-type="float" office:value="-20.322878">
                <text:p>-20.322878</text:p>
              </table:table-cell>
              <table:table-cell office:value-type="float" office:value="22.477112">
                <text:p>22.477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0.588292">
                <text:p>-20.588292</text:p>
              </table:table-cell>
              <table:table-cell office:value-type="float" office:value="-6.6047135">
                <text:p>-6.6047135</text:p>
              </table:table-cell>
              <table:table-cell office:value-type="float" office:value="22.303512">
                <text:p>22.3035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033693">
                <text:p>28.033693</text:p>
              </table:table-cell>
              <table:table-cell office:value-type="float" office:value="-2.6282512">
                <text:p>-2.6282512</text:p>
              </table:table-cell>
              <table:table-cell office:value-type="float" office:value="21.737847">
                <text:p>21.7378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8.5531081">
                <text:p>-8.5531081</text:p>
              </table:table-cell>
              <table:table-cell office:value-type="float" office:value="-9.113159">
                <text:p>-9.113159</text:p>
              </table:table-cell>
              <table:table-cell office:value-type="float" office:value="20.627089">
                <text:p>20.6270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052011">
                <text:p>16.052011</text:p>
              </table:table-cell>
              <table:table-cell office:value-type="float" office:value="-9.5116946">
                <text:p>-9.5116946</text:p>
              </table:table-cell>
              <table:table-cell office:value-type="float" office:value="19.811005">
                <text:p>19.811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.42587">
                <text:p>41.42587</text:p>
              </table:table-cell>
              <table:table-cell office:value-type="float" office:value="-0.74531634">
                <text:p>-0.74531634</text:p>
              </table:table-cell>
              <table:table-cell office:value-type="float" office:value="19.38758">
                <text:p>19.38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2116716">
                <text:p>8.2116716</text:p>
              </table:table-cell>
              <table:table-cell office:value-type="float" office:value="-3.7551292">
                <text:p>-3.7551292</text:p>
              </table:table-cell>
              <table:table-cell office:value-type="float" office:value="19.175244">
                <text:p>19.1752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199441">
                <text:p>2.8199441</text:p>
              </table:table-cell>
              <table:table-cell office:value-type="float" office:value="5.634392">
                <text:p>5.634392</text:p>
              </table:table-cell>
              <table:table-cell office:value-type="float" office:value="19.329956">
                <text:p>19.329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6.224139">
                <text:p>-26.224139</text:p>
              </table:table-cell>
              <table:table-cell office:value-type="float" office:value="3.578438">
                <text:p>3.578438</text:p>
              </table:table-cell>
              <table:table-cell office:value-type="float" office:value="20.086842">
                <text:p>20.0868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.395834">
                <text:p>-30.395834</text:p>
              </table:table-cell>
              <table:table-cell office:value-type="float" office:value="-2.867319">
                <text:p>-2.867319</text:p>
              </table:table-cell>
              <table:table-cell office:value-type="float" office:value="22.886855">
                <text:p>22.8868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4665513">
                <text:p>6.4665513</text:p>
              </table:table-cell>
              <table:table-cell office:value-type="float" office:value="0.60776679">
                <text:p>0.60776679</text:p>
              </table:table-cell>
              <table:table-cell office:value-type="float" office:value="24.292187">
                <text:p>24.292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800548">
                <text:p>22.800548</text:p>
              </table:table-cell>
              <table:table-cell office:value-type="float" office:value="11.558115">
                <text:p>11.558115</text:p>
              </table:table-cell>
              <table:table-cell office:value-type="float" office:value="26.568753">
                <text:p>26.5687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845993">
                <text:p>23.845993</text:p>
              </table:table-cell>
              <table:table-cell office:value-type="float" office:value="12.41917">
                <text:p>12.41917</text:p>
              </table:table-cell>
              <table:table-cell office:value-type="float" office:value="32.459402">
                <text:p>32.4594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8809309">
                <text:p>-3.8809309</text:p>
              </table:table-cell>
              <table:table-cell office:value-type="float" office:value="22.906389">
                <text:p>22.906389</text:p>
              </table:table-cell>
              <table:table-cell office:value-type="float" office:value="39.100338">
                <text:p>39.1003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158299">
                <text:p>4.8158299</text:p>
              </table:table-cell>
              <table:table-cell office:value-type="float" office:value="31.044457">
                <text:p>31.044457</text:p>
              </table:table-cell>
              <table:table-cell office:value-type="float" office:value="48.137222">
                <text:p>48.1372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01234">
                <text:p>12.01234</text:p>
              </table:table-cell>
              <table:table-cell office:value-type="float" office:value="34.314205">
                <text:p>34.314205</text:p>
              </table:table-cell>
              <table:table-cell office:value-type="float" office:value="56.380245">
                <text:p>56.380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4004355">
                <text:p>-2.4004355</text:p>
              </table:table-cell>
              <table:table-cell office:value-type="float" office:value="25.863008">
                <text:p>25.863008</text:p>
              </table:table-cell>
              <table:table-cell office:value-type="float" office:value="59.207962">
                <text:p>59.207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5873934">
                <text:p>-4.5873934</text:p>
              </table:table-cell>
              <table:table-cell office:value-type="float" office:value="28.67375">
                <text:p>28.67375</text:p>
              </table:table-cell>
              <table:table-cell office:value-type="float" office:value="62.667928">
                <text:p>62.667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4408764">
                <text:p>8.4408764</text:p>
              </table:table-cell>
              <table:table-cell office:value-type="float" office:value="28.207252">
                <text:p>28.207252</text:p>
              </table:table-cell>
              <table:table-cell office:value-type="float" office:value="61.558487">
                <text:p>61.5584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1136804">
                <text:p>6.1136804</text:p>
              </table:table-cell>
              <table:table-cell office:value-type="float" office:value="30.338382">
                <text:p>30.338382</text:p>
              </table:table-cell>
              <table:table-cell office:value-type="float" office:value="68.070626">
                <text:p>68.070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.7379941">
                <text:p>-8.7379941</text:p>
              </table:table-cell>
              <table:table-cell office:value-type="float" office:value="23.323514">
                <text:p>23.323514</text:p>
              </table:table-cell>
              <table:table-cell office:value-type="float" office:value="73.654395">
                <text:p>73.654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1.780771">
                <text:p>-21.780771</text:p>
              </table:table-cell>
              <table:table-cell office:value-type="float" office:value="22.420749">
                <text:p>22.420749</text:p>
              </table:table-cell>
              <table:table-cell office:value-type="float" office:value="78.404344">
                <text:p>78.404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0571434">
                <text:p>7.0571434</text:p>
              </table:table-cell>
              <table:table-cell office:value-type="float" office:value="24.446882">
                <text:p>24.446882</text:p>
              </table:table-cell>
              <table:table-cell office:value-type="float" office:value="82.357284">
                <text:p>82.357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0.616173">
                <text:p>-20.616173</text:p>
              </table:table-cell>
              <table:table-cell office:value-type="float" office:value="24.766725">
                <text:p>24.766725</text:p>
              </table:table-cell>
              <table:table-cell office:value-type="float" office:value="84.074094">
                <text:p>84.0740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4.703838">
                <text:p>-24.703838</text:p>
              </table:table-cell>
              <table:table-cell office:value-type="float" office:value="32.496314">
                <text:p>32.496314</text:p>
              </table:table-cell>
              <table:table-cell office:value-type="float" office:value="83.43872">
                <text:p>83.438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.23432">
                <text:p>-12.23432</text:p>
              </table:table-cell>
              <table:table-cell office:value-type="float" office:value="33.401415">
                <text:p>33.401415</text:p>
              </table:table-cell>
              <table:table-cell office:value-type="float" office:value="84.782788">
                <text:p>84.782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050039">
                <text:p>4.6050039</text:p>
              </table:table-cell>
              <table:table-cell office:value-type="float" office:value="30.112581">
                <text:p>30.112581</text:p>
              </table:table-cell>
              <table:table-cell office:value-type="float" office:value="84.244343">
                <text:p>84.244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.0200923">
                <text:p>-8.0200923</text:p>
              </table:table-cell>
              <table:table-cell office:value-type="float" office:value="24.837727">
                <text:p>24.837727</text:p>
              </table:table-cell>
              <table:table-cell office:value-type="float" office:value="84.210173">
                <text:p>84.2101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2836028">
                <text:p>-3.2836028</text:p>
              </table:table-cell>
              <table:table-cell office:value-type="float" office:value="28.457773">
                <text:p>28.457773</text:p>
              </table:table-cell>
              <table:table-cell office:value-type="float" office:value="83.28336">
                <text:p>83.28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3.404957">
                <text:p>-23.404957</text:p>
              </table:table-cell>
              <table:table-cell office:value-type="float" office:value="28.662219">
                <text:p>28.662219</text:p>
              </table:table-cell>
              <table:table-cell office:value-type="float" office:value="82.503589">
                <text:p>82.503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1.635102">
                <text:p>-51.635102</text:p>
              </table:table-cell>
              <table:table-cell office:value-type="float" office:value="28.211172">
                <text:p>28.211172</text:p>
              </table:table-cell>
              <table:table-cell office:value-type="float" office:value="82.046703">
                <text:p>82.046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629034">
                <text:p>17.629034</text:p>
              </table:table-cell>
              <table:table-cell office:value-type="float" office:value="31.870118">
                <text:p>31.870118</text:p>
              </table:table-cell>
              <table:table-cell office:value-type="float" office:value="82.309318">
                <text:p>82.3093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852567">
                <text:p>28.852567</text:p>
              </table:table-cell>
              <table:table-cell office:value-type="float" office:value="32.943743">
                <text:p>32.943743</text:p>
              </table:table-cell>
              <table:table-cell office:value-type="float" office:value="82.906258">
                <text:p>82.906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233447">
                <text:p>-3.233447</text:p>
              </table:table-cell>
              <table:table-cell office:value-type="float" office:value="30.787362">
                <text:p>30.787362</text:p>
              </table:table-cell>
              <table:table-cell office:value-type="float" office:value="90.636602">
                <text:p>90.636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77916">
                <text:p>5.477916</text:p>
              </table:table-cell>
              <table:table-cell office:value-type="float" office:value="29.492062">
                <text:p>29.492062</text:p>
              </table:table-cell>
              <table:table-cell office:value-type="float" office:value="90.10871">
                <text:p>90.10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392606">
                <text:p>13.392606</text:p>
              </table:table-cell>
              <table:table-cell office:value-type="float" office:value="24.379898">
                <text:p>24.379898</text:p>
              </table:table-cell>
              <table:table-cell office:value-type="float" office:value="87.644137">
                <text:p>87.6441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0.695131">
                <text:p>-20.695131</text:p>
              </table:table-cell>
              <table:table-cell office:value-type="float" office:value="22.305826">
                <text:p>22.305826</text:p>
              </table:table-cell>
              <table:table-cell office:value-type="float" office:value="87.342078">
                <text:p>87.3420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6.926428">
                <text:p>-16.926428</text:p>
              </table:table-cell>
              <table:table-cell office:value-type="float" office:value="17.553846">
                <text:p>17.553846</text:p>
              </table:table-cell>
              <table:table-cell office:value-type="float" office:value="85.175825">
                <text:p>85.175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4.48172">
                <text:p>-14.48172</text:p>
              </table:table-cell>
              <table:table-cell office:value-type="float" office:value="19.579528">
                <text:p>19.579528</text:p>
              </table:table-cell>
              <table:table-cell office:value-type="float" office:value="82.124082">
                <text:p>82.1240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7.905974">
                <text:p>-27.905974</text:p>
              </table:table-cell>
              <table:table-cell office:value-type="float" office:value="15.325625">
                <text:p>15.325625</text:p>
              </table:table-cell>
              <table:table-cell office:value-type="float" office:value="79.802494">
                <text:p>79.8024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0.603923">
                <text:p>-20.603923</text:p>
              </table:table-cell>
              <table:table-cell office:value-type="float" office:value="6.6050133">
                <text:p>6.6050133</text:p>
              </table:table-cell>
              <table:table-cell office:value-type="float" office:value="76.940854">
                <text:p>76.9408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4593617">
                <text:p>2.4593617</text:p>
              </table:table-cell>
              <table:table-cell office:value-type="float" office:value="5.2064363">
                <text:p>5.2064363</text:p>
              </table:table-cell>
              <table:table-cell office:value-type="float" office:value="74.902921">
                <text:p>74.9029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0737094">
                <text:p>8.0737094</text:p>
              </table:table-cell>
              <table:table-cell office:value-type="float" office:value="6.4408016">
                <text:p>6.4408016</text:p>
              </table:table-cell>
              <table:table-cell office:value-type="float" office:value="74.552985">
                <text:p>74.5529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2.686365">
                <text:p>-12.686365</text:p>
              </table:table-cell>
              <table:table-cell office:value-type="float" office:value="5.8717881">
                <text:p>5.8717881</text:p>
              </table:table-cell>
              <table:table-cell office:value-type="float" office:value="76.303274">
                <text:p>76.3032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95614">
                <text:p>21.295614</text:p>
              </table:table-cell>
              <table:table-cell office:value-type="float" office:value="2.3152379">
                <text:p>2.3152379</text:p>
              </table:table-cell>
              <table:table-cell office:value-type="float" office:value="75.263331">
                <text:p>75.2633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.5340049">
                <text:p>-5.5340049</text:p>
              </table:table-cell>
              <table:table-cell office:value-type="float" office:value="-0.10420402">
                <text:p>-0.10420402</text:p>
              </table:table-cell>
              <table:table-cell office:value-type="float" office:value="73.798002">
                <text:p>73.7980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.094586">
                <text:p>-14.094586</text:p>
              </table:table-cell>
              <table:table-cell office:value-type="float" office:value="-5.1907858">
                <text:p>-5.1907858</text:p>
              </table:table-cell>
              <table:table-cell office:value-type="float" office:value="73.311743">
                <text:p>73.3117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1.144816">
                <text:p>-41.144816</text:p>
              </table:table-cell>
              <table:table-cell office:value-type="float" office:value="-0.070250454">
                <text:p>-0.070250454</text:p>
              </table:table-cell>
              <table:table-cell office:value-type="float" office:value="69.25655">
                <text:p>69.256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0.203598">
                <text:p>-30.203598</text:p>
              </table:table-cell>
              <table:table-cell office:value-type="float" office:value="4.0168636">
                <text:p>4.0168636</text:p>
              </table:table-cell>
              <table:table-cell office:value-type="float" office:value="65.202347">
                <text:p>65.2023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.756817">
                <text:p>19.756817</text:p>
              </table:table-cell>
              <table:table-cell office:value-type="float" office:value="2.0747382">
                <text:p>2.0747382</text:p>
              </table:table-cell>
              <table:table-cell office:value-type="float" office:value="64.137486">
                <text:p>64.137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.158066">
                <text:p>44.158066</text:p>
              </table:table-cell>
              <table:table-cell office:value-type="float" office:value="-11.635205">
                <text:p>-11.635205</text:p>
              </table:table-cell>
              <table:table-cell office:value-type="float" office:value="66.031619">
                <text:p>66.0316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.4134027">
                <text:p>-9.4134027</text:p>
              </table:table-cell>
              <table:table-cell office:value-type="float" office:value="-26.989275">
                <text:p>-26.989275</text:p>
              </table:table-cell>
              <table:table-cell office:value-type="float" office:value="64.476268">
                <text:p>64.4762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7563488">
                <text:p>-1.7563488</text:p>
              </table:table-cell>
              <table:table-cell office:value-type="float" office:value="-28.56019">
                <text:p>-28.56019</text:p>
              </table:table-cell>
              <table:table-cell office:value-type="float" office:value="62.795197">
                <text:p>62.7951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2718849">
                <text:p>-3.2718849</text:p>
              </table:table-cell>
              <table:table-cell office:value-type="float" office:value="-18.118631">
                <text:p>-18.118631</text:p>
              </table:table-cell>
              <table:table-cell office:value-type="float" office:value="63.037695">
                <text:p>63.0376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.182463">
                <text:p>38.182463</text:p>
              </table:table-cell>
              <table:table-cell office:value-type="float" office:value="-17.815095">
                <text:p>-17.815095</text:p>
              </table:table-cell>
              <table:table-cell office:value-type="float" office:value="63.383152">
                <text:p>63.3831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823165">
                <text:p>12.823165</text:p>
              </table:table-cell>
              <table:table-cell office:value-type="float" office:value="-16.074045">
                <text:p>-16.074045</text:p>
              </table:table-cell>
              <table:table-cell office:value-type="float" office:value="62.912592">
                <text:p>62.9125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4.833825">
                <text:p>-24.833825</text:p>
              </table:table-cell>
              <table:table-cell office:value-type="float" office:value="-12.980612">
                <text:p>-12.980612</text:p>
              </table:table-cell>
              <table:table-cell office:value-type="float" office:value="62.491246">
                <text:p>62.4912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3.239484">
                <text:p>-33.239484</text:p>
              </table:table-cell>
              <table:table-cell office:value-type="float" office:value="-11.752929">
                <text:p>-11.752929</text:p>
              </table:table-cell>
              <table:table-cell office:value-type="float" office:value="57.772362">
                <text:p>57.7723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9.05838">
                <text:p>-69.05838</text:p>
              </table:table-cell>
              <table:table-cell office:value-type="float" office:value="-8.8587205">
                <text:p>-8.8587205</text:p>
              </table:table-cell>
              <table:table-cell office:value-type="float" office:value="55.610994">
                <text:p>55.6109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053562">
                <text:p>22.053562</text:p>
              </table:table-cell>
              <table:table-cell office:value-type="float" office:value="-7.1496591">
                <text:p>-7.1496591</text:p>
              </table:table-cell>
              <table:table-cell office:value-type="float" office:value="47.631983">
                <text:p>47.6319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2622851">
                <text:p>5.2622851</text:p>
              </table:table-cell>
              <table:table-cell office:value-type="float" office:value="-5.8493926">
                <text:p>-5.8493926</text:p>
              </table:table-cell>
              <table:table-cell office:value-type="float" office:value="45.218187">
                <text:p>45.218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.375126">
                <text:p>39.375126</text:p>
              </table:table-cell>
              <table:table-cell office:value-type="float" office:value="-6.0256147">
                <text:p>-6.0256147</text:p>
              </table:table-cell>
              <table:table-cell office:value-type="float" office:value="46.868042">
                <text:p>46.8680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775544">
                <text:p>4.775544</text:p>
              </table:table-cell>
              <table:table-cell office:value-type="float" office:value="-14.599633">
                <text:p>-14.599633</text:p>
              </table:table-cell>
              <table:table-cell office:value-type="float" office:value="49.090574">
                <text:p>49.0905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.798695">
                <text:p>39.798695</text:p>
              </table:table-cell>
              <table:table-cell office:value-type="float" office:value="-21.648058">
                <text:p>-21.648058</text:p>
              </table:table-cell>
              <table:table-cell office:value-type="float" office:value="47.067962">
                <text:p>47.0679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.3638374">
                <text:p>-3.3638374</text:p>
              </table:table-cell>
              <table:table-cell office:value-type="float" office:value="-22.325852">
                <text:p>-22.325852</text:p>
              </table:table-cell>
              <table:table-cell office:value-type="float" office:value="49.308285">
                <text:p>49.3082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313223">
                <text:p>14.313223</text:p>
              </table:table-cell>
              <table:table-cell office:value-type="float" office:value="-20.394489">
                <text:p>-20.394489</text:p>
              </table:table-cell>
              <table:table-cell office:value-type="float" office:value="49.144534">
                <text:p>49.1445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.6917081">
                <text:p>-5.6917081</text:p>
              </table:table-cell>
              <table:table-cell office:value-type="float" office:value="-18.57067">
                <text:p>-18.57067</text:p>
              </table:table-cell>
              <table:table-cell office:value-type="float" office:value="49.186035">
                <text:p>49.1860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0173133">
                <text:p>8.0173133</text:p>
              </table:table-cell>
              <table:table-cell office:value-type="float" office:value="-14.091428">
                <text:p>-14.091428</text:p>
              </table:table-cell>
              <table:table-cell office:value-type="float" office:value="46.914662">
                <text:p>46.914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7.607974">
                <text:p>-17.607974</text:p>
              </table:table-cell>
              <table:table-cell office:value-type="float" office:value="-20.428498">
                <text:p>-20.428498</text:p>
              </table:table-cell>
              <table:table-cell office:value-type="float" office:value="47.33767">
                <text:p>47.337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346595">
                <text:p>2.5346595</text:p>
              </table:table-cell>
              <table:table-cell office:value-type="float" office:value="-19.406725">
                <text:p>-19.406725</text:p>
              </table:table-cell>
              <table:table-cell office:value-type="float" office:value="44.928493">
                <text:p>44.9284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943842">
                <text:p>7.6943842</text:p>
              </table:table-cell>
              <table:table-cell office:value-type="float" office:value="-15.441912">
                <text:p>-15.441912</text:p>
              </table:table-cell>
              <table:table-cell office:value-type="float" office:value="44.82119">
                <text:p>44.82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0900669">
                <text:p>-6.0900669</text:p>
              </table:table-cell>
              <table:table-cell office:value-type="float" office:value="-12.943613">
                <text:p>-12.943613</text:p>
              </table:table-cell>
              <table:table-cell office:value-type="float" office:value="44.667483">
                <text:p>44.6674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3625695">
                <text:p>4.3625695</text:p>
              </table:table-cell>
              <table:table-cell office:value-type="float" office:value="-10.709081">
                <text:p>-10.709081</text:p>
              </table:table-cell>
              <table:table-cell office:value-type="float" office:value="44.830665">
                <text:p>44.8306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.3663759">
                <text:p>-8.3663759</text:p>
              </table:table-cell>
              <table:table-cell office:value-type="float" office:value="-11.038437">
                <text:p>-11.038437</text:p>
              </table:table-cell>
              <table:table-cell office:value-type="float" office:value="45.151206">
                <text:p>45.1512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81477">
                <text:p>27.81477</text:p>
              </table:table-cell>
              <table:table-cell office:value-type="float" office:value="-16.187144">
                <text:p>-16.187144</text:p>
              </table:table-cell>
              <table:table-cell office:value-type="float" office:value="44.718634">
                <text:p>44.7186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5.603203">
                <text:p>-15.603203</text:p>
              </table:table-cell>
              <table:table-cell office:value-type="float" office:value="-19.207493">
                <text:p>-19.207493</text:p>
              </table:table-cell>
              <table:table-cell office:value-type="float" office:value="43.680613">
                <text:p>43.6806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7.171427">
                <text:p>-37.171427</text:p>
              </table:table-cell>
              <table:table-cell office:value-type="float" office:value="-18.687426">
                <text:p>-18.687426</text:p>
              </table:table-cell>
              <table:table-cell office:value-type="float" office:value="43.116599">
                <text:p>43.1165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282813">
                <text:p>10.282813</text:p>
              </table:table-cell>
              <table:table-cell office:value-type="float" office:value="-16.778861">
                <text:p>-16.778861</text:p>
              </table:table-cell>
              <table:table-cell office:value-type="float" office:value="42.066028">
                <text:p>42.0660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1332902">
                <text:p>9.1332902</text:p>
              </table:table-cell>
              <table:table-cell office:value-type="float" office:value="-16.058733">
                <text:p>-16.058733</text:p>
              </table:table-cell>
              <table:table-cell office:value-type="float" office:value="41.99781">
                <text:p>41.997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7627615">
                <text:p>0.37627615</text:p>
              </table:table-cell>
              <table:table-cell office:value-type="float" office:value="-11.620012">
                <text:p>-11.620012</text:p>
              </table:table-cell>
              <table:table-cell office:value-type="float" office:value="41.633873">
                <text:p>41.6338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88554222">
                <text:p>-0.88554222</text:p>
              </table:table-cell>
              <table:table-cell office:value-type="float" office:value="-13.406032">
                <text:p>-13.406032</text:p>
              </table:table-cell>
              <table:table-cell office:value-type="float" office:value="38.906986">
                <text:p>38.9069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7.678762">
                <text:p>-27.678762</text:p>
              </table:table-cell>
              <table:table-cell office:value-type="float" office:value="-15.460787">
                <text:p>-15.460787</text:p>
              </table:table-cell>
              <table:table-cell office:value-type="float" office:value="36.807968">
                <text:p>36.807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.84694">
                <text:p>32.84694</text:p>
              </table:table-cell>
              <table:table-cell office:value-type="float" office:value="-17.063529">
                <text:p>-17.063529</text:p>
              </table:table-cell>
              <table:table-cell office:value-type="float" office:value="34.406341">
                <text:p>34.4063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174606">
                <text:p>4.8174606</text:p>
              </table:table-cell>
              <table:table-cell office:value-type="float" office:value="-15.149842">
                <text:p>-15.149842</text:p>
              </table:table-cell>
              <table:table-cell office:value-type="float" office:value="34.712132">
                <text:p>34.7121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.3888162">
                <text:p>-9.3888162</text:p>
              </table:table-cell>
              <table:table-cell office:value-type="float" office:value="-11.88597">
                <text:p>-11.88597</text:p>
              </table:table-cell>
              <table:table-cell office:value-type="float" office:value="35.948683">
                <text:p>35.9486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2.223765">
                <text:p>-32.223765</text:p>
              </table:table-cell>
              <table:table-cell office:value-type="float" office:value="-12.206272">
                <text:p>-12.206272</text:p>
              </table:table-cell>
              <table:table-cell office:value-type="float" office:value="35.79818">
                <text:p>35.798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3.627147">
                <text:p>-33.627147</text:p>
              </table:table-cell>
              <table:table-cell office:value-type="float" office:value="-18.064192">
                <text:p>-18.064192</text:p>
              </table:table-cell>
              <table:table-cell office:value-type="float" office:value="34.242495">
                <text:p>34.242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.814017">
                <text:p>23.814017</text:p>
              </table:table-cell>
              <table:table-cell office:value-type="float" office:value="-30.415359">
                <text:p>-30.415359</text:p>
              </table:table-cell>
              <table:table-cell office:value-type="float" office:value="31.529545">
                <text:p>31.5295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.1434254">
                <text:p>-3.1434254</text:p>
              </table:table-cell>
              <table:table-cell office:value-type="float" office:value="-34.78657">
                <text:p>-34.78657</text:p>
              </table:table-cell>
              <table:table-cell office:value-type="float" office:value="31.494449">
                <text:p>31.4944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.433561">
                <text:p>42.433561</text:p>
              </table:table-cell>
              <table:table-cell office:value-type="float" office:value="-28.283794">
                <text:p>-28.283794</text:p>
              </table:table-cell>
              <table:table-cell office:value-type="float" office:value="31.121187">
                <text:p>31.1211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776132">
                <text:p>36.776132</text:p>
              </table:table-cell>
              <table:table-cell office:value-type="float" office:value="-20.513981">
                <text:p>-20.513981</text:p>
              </table:table-cell>
              <table:table-cell office:value-type="float" office:value="31.614078">
                <text:p>31.6140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236695">
                <text:p>10.236695</text:p>
              </table:table-cell>
              <table:table-cell office:value-type="float" office:value="-20.129152">
                <text:p>-20.129152</text:p>
              </table:table-cell>
              <table:table-cell office:value-type="float" office:value="32.378585">
                <text:p>32.3785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6985244">
                <text:p>6.6985244</text:p>
              </table:table-cell>
              <table:table-cell office:value-type="float" office:value="-20.655566">
                <text:p>-20.655566</text:p>
              </table:table-cell>
              <table:table-cell office:value-type="float" office:value="28.507874">
                <text:p>28.5078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2.438595">
                <text:p>-22.438595</text:p>
              </table:table-cell>
              <table:table-cell office:value-type="float" office:value="-21.707229">
                <text:p>-21.707229</text:p>
              </table:table-cell>
              <table:table-cell office:value-type="float" office:value="23.136331">
                <text:p>23.1363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1597024">
                <text:p>0.21597024</text:p>
              </table:table-cell>
              <table:table-cell office:value-type="float" office:value="-29.906067">
                <text:p>-29.906067</text:p>
              </table:table-cell>
              <table:table-cell office:value-type="float" office:value="-8.6422823">
                <text:p>-8.64228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0.782047">
                <text:p>-10.782047</text:p>
              </table:table-cell>
              <table:table-cell office:value-type="float" office:value="-33.742532">
                <text:p>-33.742532</text:p>
              </table:table-cell>
              <table:table-cell office:value-type="float" office:value="-32.27532">
                <text:p>-32.275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2642261">
                <text:p>2.2642261</text:p>
              </table:table-cell>
              <table:table-cell office:value-type="float" office:value="-39.107835">
                <text:p>-39.107835</text:p>
              </table:table-cell>
              <table:table-cell office:value-type="float" office:value="-39.730776">
                <text:p>-39.7307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374219">
                <text:p>25.374219</text:p>
              </table:table-cell>
              <table:table-cell office:value-type="float" office:value="-41.637208">
                <text:p>-41.637208</text:p>
              </table:table-cell>
              <table:table-cell office:value-type="float" office:value="-39.854409">
                <text:p>-39.8544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307774">
                <text:p>16.307774</text:p>
              </table:table-cell>
              <table:table-cell office:value-type="float" office:value="-42.217344">
                <text:p>-42.217344</text:p>
              </table:table-cell>
              <table:table-cell office:value-type="float" office:value="-47.462268">
                <text:p>-47.4622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.651939">
                <text:p>23.651939</text:p>
              </table:table-cell>
              <table:table-cell office:value-type="float" office:value="-47.388655">
                <text:p>-47.388655</text:p>
              </table:table-cell>
              <table:table-cell office:value-type="float" office:value="-59.138248">
                <text:p>-59.1382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37591">
                <text:p>13.37591</text:p>
              </table:table-cell>
              <table:table-cell office:value-type="float" office:value="-43.61041">
                <text:p>-43.61041</text:p>
              </table:table-cell>
              <table:table-cell office:value-type="float" office:value="-50.796089">
                <text:p>-50.796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84.990519">
                <text:p>-84.990519</text:p>
              </table:table-cell>
              <table:table-cell office:value-type="float" office:value="-28.522284">
                <text:p>-28.522284</text:p>
              </table:table-cell>
              <table:table-cell office:value-type="float" office:value="-43.227428">
                <text:p>-43.2274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7588405">
                <text:p>7.7588405</text:p>
              </table:table-cell>
              <table:table-cell office:value-type="float" office:value="-28.179743">
                <text:p>-28.179743</text:p>
              </table:table-cell>
              <table:table-cell office:value-type="float" office:value="-43.955318">
                <text:p>-43.9553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992559">
                <text:p>19.992559</text:p>
              </table:table-cell>
              <table:table-cell office:value-type="float" office:value="-29.791726">
                <text:p>-29.791726</text:p>
              </table:table-cell>
              <table:table-cell office:value-type="float" office:value="-38.952554">
                <text:p>-38.9525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6266063">
                <text:p>3.6266063</text:p>
              </table:table-cell>
              <table:table-cell office:value-type="float" office:value="-29.464658">
                <text:p>-29.464658</text:p>
              </table:table-cell>
              <table:table-cell office:value-type="float" office:value="-34.173745">
                <text:p>-34.1737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.913496">
                <text:p>-14.913496</text:p>
              </table:table-cell>
              <table:table-cell office:value-type="float" office:value="-24.412579">
                <text:p>-24.412579</text:p>
              </table:table-cell>
              <table:table-cell office:value-type="float" office:value="-19.793958">
                <text:p>-19.7939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5.119945">
                <text:p>-15.119945</text:p>
              </table:table-cell>
              <table:table-cell office:value-type="float" office:value="-23.846409">
                <text:p>-23.846409</text:p>
              </table:table-cell>
              <table:table-cell office:value-type="float" office:value="-16.981311">
                <text:p>-16.9813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6.309721">
                <text:p>-16.309721</text:p>
              </table:table-cell>
              <table:table-cell office:value-type="float" office:value="-19.287239">
                <text:p>-19.287239</text:p>
              </table:table-cell>
              <table:table-cell office:value-type="float" office:value="-15.702903">
                <text:p>-15.7029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.822209">
                <text:p>14.822209</text:p>
              </table:table-cell>
              <table:table-cell office:value-type="float" office:value="-13.734028">
                <text:p>-13.734028</text:p>
              </table:table-cell>
              <table:table-cell office:value-type="float" office:value="-12.562525">
                <text:p>-12.5625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470658">
                <text:p>17.470658</text:p>
              </table:table-cell>
              <table:table-cell office:value-type="float" office:value="-7.3184914">
                <text:p>-7.3184914</text:p>
              </table:table-cell>
              <table:table-cell office:value-type="float" office:value="-10.836047">
                <text:p>-10.8360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6.4674892">
                <text:p>-6.4674892</text:p>
              </table:table-cell>
              <table:table-cell office:value-type="float" office:value="-13.196537">
                <text:p>-13.196537</text:p>
              </table:table-cell>
              <table:table-cell office:value-type="float" office:value="-8.7882424">
                <text:p>-8.78824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4.318648">
                <text:p>54.318648</text:p>
              </table:table-cell>
              <table:table-cell office:value-type="float" office:value="-14.912229">
                <text:p>-14.912229</text:p>
              </table:table-cell>
              <table:table-cell office:value-type="float" office:value="-6.1549843">
                <text:p>-6.15498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408299">
                <text:p>16.408299</text:p>
              </table:table-cell>
              <table:table-cell office:value-type="float" office:value="-4.6836299">
                <text:p>-4.6836299</text:p>
              </table:table-cell>
              <table:table-cell office:value-type="float" office:value="-6.2823469">
                <text:p>-6.28234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2.476234">
                <text:p>-12.476234</text:p>
              </table:table-cell>
              <table:table-cell office:value-type="float" office:value="-5.5048995">
                <text:p>-5.5048995</text:p>
              </table:table-cell>
              <table:table-cell office:value-type="float" office:value="-10.591038">
                <text:p>-10.5910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221815">
                <text:p>4.0221815</text:p>
              </table:table-cell>
              <table:table-cell office:value-type="float" office:value="-1.4225609">
                <text:p>-1.4225609</text:p>
              </table:table-cell>
              <table:table-cell office:value-type="float" office:value="-11.067882">
                <text:p>-11.0678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9.5514251">
                <text:p>-9.5514251</text:p>
              </table:table-cell>
              <table:table-cell office:value-type="float" office:value="0.5631624">
                <text:p>0.5631624</text:p>
              </table:table-cell>
              <table:table-cell office:value-type="float" office:value="-13.542264">
                <text:p>-13.5422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34998">
                <text:p>1.534998</text:p>
              </table:table-cell>
              <table:table-cell office:value-type="float" office:value="2.585384">
                <text:p>2.585384</text:p>
              </table:table-cell>
              <table:table-cell office:value-type="float" office:value="-19.03643">
                <text:p>-19.036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6.277676">
                <text:p>-16.277676</text:p>
              </table:table-cell>
              <table:table-cell office:value-type="float" office:value="4.2153765">
                <text:p>4.2153765</text:p>
              </table:table-cell>
              <table:table-cell office:value-type="float" office:value="-30.111892">
                <text:p>-30.1118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6799597">
                <text:p>1.6799597</text:p>
              </table:table-cell>
              <table:table-cell office:value-type="float" office:value="8.3586955">
                <text:p>8.3586955</text:p>
              </table:table-cell>
              <table:table-cell office:value-type="float" office:value="-30.413691">
                <text:p>-30.4136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5517335">
                <text:p>7.5517335</text:p>
              </table:table-cell>
              <table:table-cell office:value-type="float" office:value="9.9951385">
                <text:p>9.9951385</text:p>
              </table:table-cell>
              <table:table-cell office:value-type="float" office:value="-35.314277">
                <text:p>-35.3142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4679014">
                <text:p>6.4679014</text:p>
              </table:table-cell>
              <table:table-cell office:value-type="float" office:value="8.0458397">
                <text:p>8.0458397</text:p>
              </table:table-cell>
              <table:table-cell office:value-type="float" office:value="-30.046746">
                <text:p>-30.0467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.8841549">
                <text:p>-5.8841549</text:p>
              </table:table-cell>
              <table:table-cell office:value-type="float" office:value="6.7866224">
                <text:p>6.7866224</text:p>
              </table:table-cell>
              <table:table-cell office:value-type="float" office:value="-28.337194">
                <text:p>-28.3371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.0028353">
                <text:p>-7.0028353</text:p>
              </table:table-cell>
              <table:table-cell office:value-type="float" office:value="-1.4706064">
                <text:p>-1.4706064</text:p>
              </table:table-cell>
              <table:table-cell office:value-type="float" office:value="-31.498233">
                <text:p>-31.4982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8564418">
                <text:p>8.8564418</text:p>
              </table:table-cell>
              <table:table-cell office:value-type="float" office:value="-2.8061936">
                <text:p>-2.8061936</text:p>
              </table:table-cell>
              <table:table-cell office:value-type="float" office:value="-36.474806">
                <text:p>-36.4748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819467">
                <text:p>23.819467</text:p>
              </table:table-cell>
              <table:table-cell office:value-type="float" office:value="-1.0495323">
                <text:p>-1.0495323</text:p>
              </table:table-cell>
              <table:table-cell office:value-type="float" office:value="-40.260406">
                <text:p>-40.2604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2006221">
                <text:p>7.2006221</text:p>
              </table:table-cell>
              <table:table-cell office:value-type="float" office:value="0.14341779">
                <text:p>0.14341779</text:p>
              </table:table-cell>
              <table:table-cell office:value-type="float" office:value="-44.089115">
                <text:p>-44.0891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654643">
                <text:p>33.654643</text:p>
              </table:table-cell>
              <table:table-cell office:value-type="float" office:value="4.1204807">
                <text:p>4.1204807</text:p>
              </table:table-cell>
              <table:table-cell office:value-type="float" office:value="-50.300766">
                <text:p>-50.3007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0170516">
                <text:p>9.0170516</text:p>
              </table:table-cell>
              <table:table-cell office:value-type="float" office:value="8.2012024">
                <text:p>8.2012024</text:p>
              </table:table-cell>
              <table:table-cell office:value-type="float" office:value="-53.667893">
                <text:p>-53.6678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8244307">
                <text:p>4.8244307</text:p>
              </table:table-cell>
              <table:table-cell office:value-type="float" office:value="7.8077636">
                <text:p>7.8077636</text:p>
              </table:table-cell>
              <table:table-cell office:value-type="float" office:value="-43.156209">
                <text:p>-43.1562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7.784646">
                <text:p>-57.784646</text:p>
              </table:table-cell>
              <table:table-cell office:value-type="float" office:value="10.732402">
                <text:p>10.732402</text:p>
              </table:table-cell>
              <table:table-cell office:value-type="float" office:value="-30.74942">
                <text:p>-30.749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9.8360289">
                <text:p>-9.8360289</text:p>
              </table:table-cell>
              <table:table-cell office:value-type="float" office:value="6.9149882">
                <text:p>6.9149882</text:p>
              </table:table-cell>
              <table:table-cell office:value-type="float" office:value="-27.586977">
                <text:p>-27.5869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2603026">
                <text:p>8.2603026</text:p>
              </table:table-cell>
              <table:table-cell office:value-type="float" office:value="10.754091">
                <text:p>10.754091</text:p>
              </table:table-cell>
              <table:table-cell office:value-type="float" office:value="-21.328513">
                <text:p>-21.3285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7731623">
                <text:p>8.7731623</text:p>
              </table:table-cell>
              <table:table-cell office:value-type="float" office:value="10.720149">
                <text:p>10.720149</text:p>
              </table:table-cell>
              <table:table-cell office:value-type="float" office:value="-12.311553">
                <text:p>-12.3115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6070155">
                <text:p>-1.6070155</text:p>
              </table:table-cell>
              <table:table-cell office:value-type="float" office:value="11.512004">
                <text:p>11.512004</text:p>
              </table:table-cell>
              <table:table-cell office:value-type="float" office:value="-15.592991">
                <text:p>-15.592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5292669">
                <text:p>0.75292669</text:p>
              </table:table-cell>
              <table:table-cell office:value-type="float" office:value="4.750811">
                <text:p>4.750811</text:p>
              </table:table-cell>
              <table:table-cell office:value-type="float" office:value="-20.096505">
                <text:p>-20.0965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491548">
                <text:p>10.491548</text:p>
              </table:table-cell>
              <table:table-cell office:value-type="float" office:value="2.8586272">
                <text:p>2.8586272</text:p>
              </table:table-cell>
              <table:table-cell office:value-type="float" office:value="-21.96274">
                <text:p>-21.962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854315">
                <text:p>17.854315</text:p>
              </table:table-cell>
              <table:table-cell office:value-type="float" office:value="6.7366479">
                <text:p>6.7366479</text:p>
              </table:table-cell>
              <table:table-cell office:value-type="float" office:value="-26.279139">
                <text:p>-26.2791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479207">
                <text:p>1.6479207</text:p>
              </table:table-cell>
              <table:table-cell office:value-type="float" office:value="6.7918846">
                <text:p>6.7918846</text:p>
              </table:table-cell>
              <table:table-cell office:value-type="float" office:value="-24.281556">
                <text:p>-24.2815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256173">
                <text:p>11.256173</text:p>
              </table:table-cell>
              <table:table-cell office:value-type="float" office:value="8.3143384">
                <text:p>8.3143384</text:p>
              </table:table-cell>
              <table:table-cell office:value-type="float" office:value="-21.029189">
                <text:p>-21.0291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845881">
                <text:p>14.845881</text:p>
              </table:table-cell>
              <table:table-cell office:value-type="float" office:value="12.152016">
                <text:p>12.152016</text:p>
              </table:table-cell>
              <table:table-cell office:value-type="float" office:value="-21.263231">
                <text:p>-21.2632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6.9507835">
                <text:p>-6.9507835</text:p>
              </table:table-cell>
              <table:table-cell office:value-type="float" office:value="10.884845">
                <text:p>10.884845</text:p>
              </table:table-cell>
              <table:table-cell office:value-type="float" office:value="-12.55686">
                <text:p>-12.556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0.942252">
                <text:p>-10.942252</text:p>
              </table:table-cell>
              <table:table-cell office:value-type="float" office:value="12.045029">
                <text:p>12.045029</text:p>
              </table:table-cell>
              <table:table-cell office:value-type="float" office:value="-11.234152">
                <text:p>-11.2341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0612951">
                <text:p>5.0612951</text:p>
              </table:table-cell>
              <table:table-cell office:value-type="float" office:value="9.7307477">
                <text:p>9.7307477</text:p>
              </table:table-cell>
              <table:table-cell office:value-type="float" office:value="-15.249667">
                <text:p>-15.249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.593023">
                <text:p>17.593023</text:p>
              </table:table-cell>
              <table:table-cell office:value-type="float" office:value="9.5003898">
                <text:p>9.5003898</text:p>
              </table:table-cell>
              <table:table-cell office:value-type="float" office:value="-20.056845">
                <text:p>-20.0568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.3562539">
                <text:p>-5.3562539</text:p>
              </table:table-cell>
              <table:table-cell office:value-type="float" office:value="4.8876619">
                <text:p>4.8876619</text:p>
              </table:table-cell>
              <table:table-cell office:value-type="float" office:value="-33.1164">
                <text:p>-33.11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1.069698">
                <text:p>-11.069698</text:p>
              </table:table-cell>
              <table:table-cell office:value-type="float" office:value="-1.1988665">
                <text:p>-1.1988665</text:p>
              </table:table-cell>
              <table:table-cell office:value-type="float" office:value="-36.877085">
                <text:p>-36.8770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6.356467">
                <text:p>-16.356467</text:p>
              </table:table-cell>
              <table:table-cell office:value-type="float" office:value="-5.7500851">
                <text:p>-5.7500851</text:p>
              </table:table-cell>
              <table:table-cell office:value-type="float" office:value="-43.390212">
                <text:p>-43.3902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726901">
                <text:p>2.0726901</text:p>
              </table:table-cell>
              <table:table-cell office:value-type="float" office:value="-12.471856">
                <text:p>-12.471856</text:p>
              </table:table-cell>
              <table:table-cell office:value-type="float" office:value="-35.072926">
                <text:p>-35.0729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2.507984">
                <text:p>-72.507984</text:p>
              </table:table-cell>
              <table:table-cell office:value-type="float" office:value="-12.294257">
                <text:p>-12.294257</text:p>
              </table:table-cell>
              <table:table-cell office:value-type="float" office:value="2.3924157">
                <text:p>2.39241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.515634">
                <text:p>52.515634</text:p>
              </table:table-cell>
              <table:table-cell office:value-type="float" office:value="-14.240912">
                <text:p>-14.240912</text:p>
              </table:table-cell>
              <table:table-cell office:value-type="float" office:value="22.546899">
                <text:p>22.5468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8410866">
                <text:p>6.8410866</text:p>
              </table:table-cell>
              <table:table-cell office:value-type="float" office:value="-11.721">
                <text:p>-11.721</text:p>
              </table:table-cell>
              <table:table-cell office:value-type="float" office:value="31.437471">
                <text:p>31.4374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291965">
                <text:p>16.291965</text:p>
              </table:table-cell>
              <table:table-cell office:value-type="float" office:value="-9.4645709">
                <text:p>-9.4645709</text:p>
              </table:table-cell>
              <table:table-cell office:value-type="float" office:value="22.677453">
                <text:p>22.6774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1772023">
                <text:p>4.1772023</text:p>
              </table:table-cell>
              <table:table-cell office:value-type="float" office:value="-4.1621354">
                <text:p>-4.1621354</text:p>
              </table:table-cell>
              <table:table-cell office:value-type="float" office:value="5.6559678">
                <text:p>5.65596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74973">
                <text:p>-3.574973</text:p>
              </table:table-cell>
              <table:table-cell office:value-type="float" office:value="-2.6372904">
                <text:p>-2.6372904</text:p>
              </table:table-cell>
              <table:table-cell office:value-type="float" office:value="-8.3601132">
                <text:p>-8.36011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6.1641239">
                <text:p>-6.1641239</text:p>
              </table:table-cell>
              <table:table-cell office:value-type="float" office:value="0.58864481">
                <text:p>0.58864481</text:p>
              </table:table-cell>
              <table:table-cell office:value-type="float" office:value="-28.202887">
                <text:p>-28.2028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0640867">
                <text:p>5.0640867</text:p>
              </table:table-cell>
              <table:table-cell office:value-type="float" office:value="0.986006">
                <text:p>0.986006</text:p>
              </table:table-cell>
              <table:table-cell office:value-type="float" office:value="-32.216803">
                <text:p>-32.2168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8.023398">
                <text:p>-28.023398</text:p>
              </table:table-cell>
              <table:table-cell office:value-type="float" office:value="-1.5247888">
                <text:p>-1.5247888</text:p>
              </table:table-cell>
              <table:table-cell office:value-type="float" office:value="-28.315961">
                <text:p>-28.3159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.5936037">
                <text:p>-3.5936037</text:p>
              </table:table-cell>
              <table:table-cell office:value-type="float" office:value="-1.0572129">
                <text:p>-1.0572129</text:p>
              </table:table-cell>
              <table:table-cell office:value-type="float" office:value="-28.467272">
                <text:p>-28.4672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0939">
                <text:p>3.90939</text:p>
              </table:table-cell>
              <table:table-cell office:value-type="float" office:value="-0.60032006">
                <text:p>-0.60032006</text:p>
              </table:table-cell>
              <table:table-cell office:value-type="float" office:value="-31.971838">
                <text:p>-31.9718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.955982">
                <text:p>19.955982</text:p>
              </table:table-cell>
              <table:table-cell office:value-type="float" office:value="-4.609778">
                <text:p>-4.609778</text:p>
              </table:table-cell>
              <table:table-cell office:value-type="float" office:value="-30.114268">
                <text:p>-30.1142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3.962024">
                <text:p>-13.962024</text:p>
              </table:table-cell>
              <table:table-cell office:value-type="float" office:value="-7.1340883">
                <text:p>-7.1340883</text:p>
              </table:table-cell>
              <table:table-cell office:value-type="float" office:value="-27.313653">
                <text:p>-27.3136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76972">
                <text:p>20.76972</text:p>
              </table:table-cell>
              <table:table-cell office:value-type="float" office:value="-5.2870823">
                <text:p>-5.2870823</text:p>
              </table:table-cell>
              <table:table-cell office:value-type="float" office:value="-26.067967">
                <text:p>-26.0679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884585">
                <text:p>-0.884585</text:p>
              </table:table-cell>
              <table:table-cell office:value-type="float" office:value="-4.6701283">
                <text:p>-4.6701283</text:p>
              </table:table-cell>
              <table:table-cell office:value-type="float" office:value="-21.786978">
                <text:p>-21.7869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8657244">
                <text:p>4.8657244</text:p>
              </table:table-cell>
              <table:table-cell office:value-type="float" office:value="-2.0734209">
                <text:p>-2.0734209</text:p>
              </table:table-cell>
              <table:table-cell office:value-type="float" office:value="-24.824867">
                <text:p>-24.8248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035831">
                <text:p>8.035831</text:p>
              </table:table-cell>
              <table:table-cell office:value-type="float" office:value="-5.7673103">
                <text:p>-5.7673103</text:p>
              </table:table-cell>
              <table:table-cell office:value-type="float" office:value="-37.067596">
                <text:p>-37.0675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348299">
                <text:p>1.3348299</text:p>
              </table:table-cell>
              <table:table-cell office:value-type="float" office:value="-10.216153">
                <text:p>-10.216153</text:p>
              </table:table-cell>
              <table:table-cell office:value-type="float" office:value="-43.574369">
                <text:p>-43.5743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6.511711">
                <text:p>-16.511711</text:p>
              </table:table-cell>
              <table:table-cell office:value-type="float" office:value="-14.998768">
                <text:p>-14.998768</text:p>
              </table:table-cell>
              <table:table-cell office:value-type="float" office:value="-44.414109">
                <text:p>-44.4141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2.964772">
                <text:p>-12.964772</text:p>
              </table:table-cell>
              <table:table-cell office:value-type="float" office:value="-18.049531">
                <text:p>-18.049531</text:p>
              </table:table-cell>
              <table:table-cell office:value-type="float" office:value="-42.54915">
                <text:p>-42.549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2050396">
                <text:p>7.2050396</text:p>
              </table:table-cell>
              <table:table-cell office:value-type="float" office:value="-20.243147">
                <text:p>-20.243147</text:p>
              </table:table-cell>
              <table:table-cell office:value-type="float" office:value="-36.774065">
                <text:p>-36.7740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2.725925">
                <text:p>-22.725925</text:p>
              </table:table-cell>
              <table:table-cell office:value-type="float" office:value="-17.067111">
                <text:p>-17.067111</text:p>
              </table:table-cell>
              <table:table-cell office:value-type="float" office:value="-29.131018">
                <text:p>-29.1310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9217814">
                <text:p>4.9217814</text:p>
              </table:table-cell>
              <table:table-cell office:value-type="float" office:value="-20.494498">
                <text:p>-20.494498</text:p>
              </table:table-cell>
              <table:table-cell office:value-type="float" office:value="-24.029824">
                <text:p>-24.0298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790881">
                <text:p>9.3790881</text:p>
              </table:table-cell>
              <table:table-cell office:value-type="float" office:value="-23.657601">
                <text:p>-23.657601</text:p>
              </table:table-cell>
              <table:table-cell office:value-type="float" office:value="-24.769818">
                <text:p>-24.7698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26620982">
                <text:p>-0.26620982</text:p>
              </table:table-cell>
              <table:table-cell office:value-type="float" office:value="-24.209374">
                <text:p>-24.209374</text:p>
              </table:table-cell>
              <table:table-cell office:value-type="float" office:value="-27.496711">
                <text:p>-27.4967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2456798">
                <text:p>5.2456798</text:p>
              </table:table-cell>
              <table:table-cell office:value-type="float" office:value="-21.814152">
                <text:p>-21.814152</text:p>
              </table:table-cell>
              <table:table-cell office:value-type="float" office:value="-27.657618">
                <text:p>-27.6576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860117">
                <text:p>15.860117</text:p>
              </table:table-cell>
              <table:table-cell office:value-type="float" office:value="-20.471188">
                <text:p>-20.471188</text:p>
              </table:table-cell>
              <table:table-cell office:value-type="float" office:value="-27.667438">
                <text:p>-27.6674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.7212752">
                <text:p>-5.7212752</text:p>
              </table:table-cell>
              <table:table-cell office:value-type="float" office:value="-16.234587">
                <text:p>-16.234587</text:p>
              </table:table-cell>
              <table:table-cell office:value-type="float" office:value="-32.93181">
                <text:p>-32.931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3474415">
                <text:p>6.3474415</text:p>
              </table:table-cell>
              <table:table-cell office:value-type="float" office:value="-10.305029">
                <text:p>-10.305029</text:p>
              </table:table-cell>
              <table:table-cell office:value-type="float" office:value="-41.339754">
                <text:p>-41.3397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6506293">
                <text:p>-3.6506293</text:p>
              </table:table-cell>
              <table:table-cell office:value-type="float" office:value="-10.696206">
                <text:p>-10.696206</text:p>
              </table:table-cell>
              <table:table-cell office:value-type="float" office:value="-42.520389">
                <text:p>-42.5203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0129176">
                <text:p>7.0129176</text:p>
              </table:table-cell>
              <table:table-cell office:value-type="float" office:value="-10.944981">
                <text:p>-10.944981</text:p>
              </table:table-cell>
              <table:table-cell office:value-type="float" office:value="-39.163666">
                <text:p>-39.1636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4.153565">
                <text:p>-14.153565</text:p>
              </table:table-cell>
              <table:table-cell office:value-type="float" office:value="-8.7624762">
                <text:p>-8.7624762</text:p>
              </table:table-cell>
              <table:table-cell office:value-type="float" office:value="-36.975664">
                <text:p>-36.9756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4.087793">
                <text:p>-14.087793</text:p>
              </table:table-cell>
              <table:table-cell office:value-type="float" office:value="-8.3426734">
                <text:p>-8.3426734</text:p>
              </table:table-cell>
              <table:table-cell office:value-type="float" office:value="-34.39316">
                <text:p>-34.393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493294">
                <text:p>3.7493294</text:p>
              </table:table-cell>
              <table:table-cell office:value-type="float" office:value="-6.9405013">
                <text:p>-6.9405013</text:p>
              </table:table-cell>
              <table:table-cell office:value-type="float" office:value="-37.209705">
                <text:p>-37.2097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.7215348">
                <text:p>-5.7215348</text:p>
              </table:table-cell>
              <table:table-cell office:value-type="float" office:value="-9.6211533">
                <text:p>-9.6211533</text:p>
              </table:table-cell>
              <table:table-cell office:value-type="float" office:value="-43.565331">
                <text:p>-43.5653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172075">
                <text:p>12.172075</text:p>
              </table:table-cell>
              <table:table-cell office:value-type="float" office:value="-13.51666">
                <text:p>-13.51666</text:p>
              </table:table-cell>
              <table:table-cell office:value-type="float" office:value="-49.777458">
                <text:p>-49.7774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.5550544">
                <text:p>-3.5550544</text:p>
              </table:table-cell>
              <table:table-cell office:value-type="float" office:value="-16.305239">
                <text:p>-16.305239</text:p>
              </table:table-cell>
              <table:table-cell office:value-type="float" office:value="-51.065947">
                <text:p>-51.0659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267495">
                <text:p>0.2267495</text:p>
              </table:table-cell>
              <table:table-cell office:value-type="float" office:value="-12.900191">
                <text:p>-12.900191</text:p>
              </table:table-cell>
              <table:table-cell office:value-type="float" office:value="-53.271231">
                <text:p>-53.2712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2547625">
                <text:p>9.2547625</text:p>
              </table:table-cell>
              <table:table-cell office:value-type="float" office:value="-14.770019">
                <text:p>-14.770019</text:p>
              </table:table-cell>
              <table:table-cell office:value-type="float" office:value="-51.937118">
                <text:p>-51.9371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2684528">
                <text:p>1.2684528</text:p>
              </table:table-cell>
              <table:table-cell office:value-type="float" office:value="-16.642444">
                <text:p>-16.642444</text:p>
              </table:table-cell>
              <table:table-cell office:value-type="float" office:value="-62.612195">
                <text:p>-62.6121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6712915">
                <text:p>7.6712915</text:p>
              </table:table-cell>
              <table:table-cell office:value-type="float" office:value="-18.613468">
                <text:p>-18.613468</text:p>
              </table:table-cell>
              <table:table-cell office:value-type="float" office:value="-74.027987">
                <text:p>-74.0279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823687">
                <text:p>3.823687</text:p>
              </table:table-cell>
              <table:table-cell office:value-type="float" office:value="-21.281366">
                <text:p>-21.281366</text:p>
              </table:table-cell>
              <table:table-cell office:value-type="float" office:value="-71.124684">
                <text:p>-71.1246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.533768">
                <text:p>-3.533768</text:p>
              </table:table-cell>
              <table:table-cell office:value-type="float" office:value="-24.09437">
                <text:p>-24.09437</text:p>
              </table:table-cell>
              <table:table-cell office:value-type="float" office:value="-71.63001">
                <text:p>-71.63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7991262">
                <text:p>-1.7991262</text:p>
              </table:table-cell>
              <table:table-cell office:value-type="float" office:value="-21.990202">
                <text:p>-21.990202</text:p>
              </table:table-cell>
              <table:table-cell office:value-type="float" office:value="-69.754983">
                <text:p>-69.7549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9.1477598">
                <text:p>-9.1477598</text:p>
              </table:table-cell>
              <table:table-cell office:value-type="float" office:value="-19.470124">
                <text:p>-19.470124</text:p>
              </table:table-cell>
              <table:table-cell office:value-type="float" office:value="-60.002646">
                <text:p>-60.0026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7955872">
                <text:p>8.7955872</text:p>
              </table:table-cell>
              <table:table-cell office:value-type="float" office:value="-14.025083">
                <text:p>-14.025083</text:p>
              </table:table-cell>
              <table:table-cell office:value-type="float" office:value="-52.276066">
                <text:p>-52.2760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2147821">
                <text:p>6.2147821</text:p>
              </table:table-cell>
              <table:table-cell office:value-type="float" office:value="-16.990867">
                <text:p>-16.990867</text:p>
              </table:table-cell>
              <table:table-cell office:value-type="float" office:value="-44.611058">
                <text:p>-44.6110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7.8782584">
                <text:p>-7.8782584</text:p>
              </table:table-cell>
              <table:table-cell office:value-type="float" office:value="-16.569835">
                <text:p>-16.569835</text:p>
              </table:table-cell>
              <table:table-cell office:value-type="float" office:value="-42.170597">
                <text:p>-42.1705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.1331934">
                <text:p>-2.1331934</text:p>
              </table:table-cell>
              <table:table-cell office:value-type="float" office:value="-12.353901">
                <text:p>-12.353901</text:p>
              </table:table-cell>
              <table:table-cell office:value-type="float" office:value="-47.60734">
                <text:p>-47.607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997414">
                <text:p>11.997414</text:p>
              </table:table-cell>
              <table:table-cell office:value-type="float" office:value="-7.3546099">
                <text:p>-7.3546099</text:p>
              </table:table-cell>
              <table:table-cell office:value-type="float" office:value="-52.414759">
                <text:p>-52.4147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7272744">
                <text:p>9.7272744</text:p>
              </table:table-cell>
              <table:table-cell office:value-type="float" office:value="-2.0997415">
                <text:p>-2.0997415</text:p>
              </table:table-cell>
              <table:table-cell office:value-type="float" office:value="-50.244208">
                <text:p>-50.2442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3912665">
                <text:p>3.3912665</text:p>
              </table:table-cell>
              <table:table-cell office:value-type="float" office:value="-0.082773315">
                <text:p>-0.082773315</text:p>
              </table:table-cell>
              <table:table-cell office:value-type="float" office:value="-49.35056">
                <text:p>-49.350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254395">
                <text:p>6.2254395</text:p>
              </table:table-cell>
              <table:table-cell office:value-type="float" office:value="2.5233823">
                <text:p>2.5233823</text:p>
              </table:table-cell>
              <table:table-cell office:value-type="float" office:value="-53.769615">
                <text:p>-53.769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.6480942">
                <text:p>-7.6480942</text:p>
              </table:table-cell>
              <table:table-cell office:value-type="float" office:value="-0.66503952">
                <text:p>-0.66503952</text:p>
              </table:table-cell>
              <table:table-cell office:value-type="float" office:value="-49.211066">
                <text:p>-49.2110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058884">
                <text:p>10.058884</text:p>
              </table:table-cell>
              <table:table-cell office:value-type="float" office:value="-2.7307567">
                <text:p>-2.7307567</text:p>
              </table:table-cell>
              <table:table-cell office:value-type="float" office:value="-45.626448">
                <text:p>-45.6264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4.504209">
                <text:p>-14.504209</text:p>
              </table:table-cell>
              <table:table-cell office:value-type="float" office:value="3.3605937">
                <text:p>3.3605937</text:p>
              </table:table-cell>
              <table:table-cell office:value-type="float" office:value="-45.825058">
                <text:p>-45.8250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538163">
                <text:p>15.538163</text:p>
              </table:table-cell>
              <table:table-cell office:value-type="float" office:value="1.3825972">
                <text:p>1.3825972</text:p>
              </table:table-cell>
              <table:table-cell office:value-type="float" office:value="-37.917807">
                <text:p>-37.9178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91344829">
                <text:p>0.091344829</text:p>
              </table:table-cell>
              <table:table-cell office:value-type="float" office:value="0.17853593">
                <text:p>0.17853593</text:p>
              </table:table-cell>
              <table:table-cell office:value-type="float" office:value="-38.86672">
                <text:p>-38.866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6.652925">
                <text:p>-16.652925</text:p>
              </table:table-cell>
              <table:table-cell office:value-type="float" office:value="-5.8984103">
                <text:p>-5.8984103</text:p>
              </table:table-cell>
              <table:table-cell office:value-type="float" office:value="-45.345351">
                <text:p>-45.3453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.455807">
                <text:p>18.455807</text:p>
              </table:table-cell>
              <table:table-cell office:value-type="float" office:value="-4.7486586">
                <text:p>-4.7486586</text:p>
              </table:table-cell>
              <table:table-cell office:value-type="float" office:value="-50.959747">
                <text:p>-50.9597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5209171">
                <text:p>2.5209171</text:p>
              </table:table-cell>
              <table:table-cell office:value-type="float" office:value="-4.3823616">
                <text:p>-4.3823616</text:p>
              </table:table-cell>
              <table:table-cell office:value-type="float" office:value="-50.914015">
                <text:p>-50.9140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5542994">
                <text:p>7.5542994</text:p>
              </table:table-cell>
              <table:table-cell office:value-type="float" office:value="-5.9865743">
                <text:p>-5.9865743</text:p>
              </table:table-cell>
              <table:table-cell office:value-type="float" office:value="-50.022169">
                <text:p>-50.0221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6.5196785">
                <text:p>-6.5196785</text:p>
              </table:table-cell>
              <table:table-cell office:value-type="float" office:value="-10.130735">
                <text:p>-10.130735</text:p>
              </table:table-cell>
              <table:table-cell office:value-type="float" office:value="-52.828687">
                <text:p>-52.8286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7967626">
                <text:p>3.7967626</text:p>
              </table:table-cell>
              <table:table-cell office:value-type="float" office:value="-11.057327">
                <text:p>-11.057327</text:p>
              </table:table-cell>
              <table:table-cell office:value-type="float" office:value="-51.556861">
                <text:p>-51.5568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4353624">
                <text:p>7.4353624</text:p>
              </table:table-cell>
              <table:table-cell office:value-type="float" office:value="-12.532061">
                <text:p>-12.532061</text:p>
              </table:table-cell>
              <table:table-cell office:value-type="float" office:value="-45.752707">
                <text:p>-45.7527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3763331">
                <text:p>-1.3763331</text:p>
              </table:table-cell>
              <table:table-cell office:value-type="float" office:value="-14.613237">
                <text:p>-14.613237</text:p>
              </table:table-cell>
              <table:table-cell office:value-type="float" office:value="-46.556811">
                <text:p>-46.5568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5297459">
                <text:p>7.5297459</text:p>
              </table:table-cell>
              <table:table-cell office:value-type="float" office:value="-16.68015">
                <text:p>-16.68015</text:p>
              </table:table-cell>
              <table:table-cell office:value-type="float" office:value="-45.10512">
                <text:p>-45.105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.8169654">
                <text:p>-2.8169654</text:p>
              </table:table-cell>
              <table:table-cell office:value-type="float" office:value="-13.756424">
                <text:p>-13.756424</text:p>
              </table:table-cell>
              <table:table-cell office:value-type="float" office:value="-34.106373">
                <text:p>-34.1063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.7985899">
                <text:p>-2.7985899</text:p>
              </table:table-cell>
              <table:table-cell office:value-type="float" office:value="-14.202325">
                <text:p>-14.202325</text:p>
              </table:table-cell>
              <table:table-cell office:value-type="float" office:value="-27.552002">
                <text:p>-27.5520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48222329">
                <text:p>0.0048222329</text:p>
              </table:table-cell>
              <table:table-cell office:value-type="float" office:value="-15.530526">
                <text:p>-15.530526</text:p>
              </table:table-cell>
              <table:table-cell office:value-type="float" office:value="-33.584021">
                <text:p>-33.5840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0518681">
                <text:p>6.0518681</text:p>
              </table:table-cell>
              <table:table-cell office:value-type="float" office:value="-21.817754">
                <text:p>-21.817754</text:p>
              </table:table-cell>
              <table:table-cell office:value-type="float" office:value="-37.833005">
                <text:p>-37.8330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6291061">
                <text:p>1.6291061</text:p>
              </table:table-cell>
              <table:table-cell office:value-type="float" office:value="-28.534732">
                <text:p>-28.534732</text:p>
              </table:table-cell>
              <table:table-cell office:value-type="float" office:value="-36.585397">
                <text:p>-36.5853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6.2116656">
                <text:p>-6.2116656</text:p>
              </table:table-cell>
              <table:table-cell office:value-type="float" office:value="-25.777197">
                <text:p>-25.777197</text:p>
              </table:table-cell>
              <table:table-cell office:value-type="float" office:value="-32.076938">
                <text:p>-32.0769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89277">
                <text:p>8.89277</text:p>
              </table:table-cell>
              <table:table-cell office:value-type="float" office:value="-25.340876">
                <text:p>-25.340876</text:p>
              </table:table-cell>
              <table:table-cell office:value-type="float" office:value="-25.297324">
                <text:p>-25.2973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7032393">
                <text:p>6.7032393</text:p>
              </table:table-cell>
              <table:table-cell office:value-type="float" office:value="-23.46868">
                <text:p>-23.46868</text:p>
              </table:table-cell>
              <table:table-cell office:value-type="float" office:value="-20.398381">
                <text:p>-20.3983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3749442">
                <text:p>8.3749442</text:p>
              </table:table-cell>
              <table:table-cell office:value-type="float" office:value="-12.778005">
                <text:p>-12.778005</text:p>
              </table:table-cell>
              <table:table-cell office:value-type="float" office:value="-23.15521">
                <text:p>-23.155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604421">
                <text:p>10.604421</text:p>
              </table:table-cell>
              <table:table-cell office:value-type="float" office:value="-11.111114">
                <text:p>-11.111114</text:p>
              </table:table-cell>
              <table:table-cell office:value-type="float" office:value="-20.965669">
                <text:p>-20.9656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2363091">
                <text:p>-1.2363091</text:p>
              </table:table-cell>
              <table:table-cell office:value-type="float" office:value="-10.156435">
                <text:p>-10.156435</text:p>
              </table:table-cell>
              <table:table-cell office:value-type="float" office:value="-22.019109">
                <text:p>-22.0191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5637735">
                <text:p>6.5637735</text:p>
              </table:table-cell>
              <table:table-cell office:value-type="float" office:value="-13.183241">
                <text:p>-13.183241</text:p>
              </table:table-cell>
              <table:table-cell office:value-type="float" office:value="-31.964302">
                <text:p>-31.9643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25862805">
                <text:p>-0.25862805</text:p>
              </table:table-cell>
              <table:table-cell office:value-type="float" office:value="-11.919527">
                <text:p>-11.919527</text:p>
              </table:table-cell>
              <table:table-cell office:value-type="float" office:value="-40.623599">
                <text:p>-40.6235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605272">
                <text:p>9.605272</text:p>
              </table:table-cell>
              <table:table-cell office:value-type="float" office:value="-13.09084">
                <text:p>-13.09084</text:p>
              </table:table-cell>
              <table:table-cell office:value-type="float" office:value="-47.880392">
                <text:p>-47.8803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1.955693">
                <text:p>-11.955693</text:p>
              </table:table-cell>
              <table:table-cell office:value-type="float" office:value="-12.665023">
                <text:p>-12.665023</text:p>
              </table:table-cell>
              <table:table-cell office:value-type="float" office:value="-43.921656">
                <text:p>-43.9216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4.246198">
                <text:p>-14.246198</text:p>
              </table:table-cell>
              <table:table-cell office:value-type="float" office:value="-12.860628">
                <text:p>-12.860628</text:p>
              </table:table-cell>
              <table:table-cell office:value-type="float" office:value="-50.796826">
                <text:p>-50.7968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2447311">
                <text:p>8.2447311</text:p>
              </table:table-cell>
              <table:table-cell office:value-type="float" office:value="-9.5199197">
                <text:p>-9.5199197</text:p>
              </table:table-cell>
              <table:table-cell office:value-type="float" office:value="-50.117913">
                <text:p>-50.1179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.151273">
                <text:p>16.151273</text:p>
              </table:table-cell>
              <table:table-cell office:value-type="float" office:value="-8.6151958">
                <text:p>-8.6151958</text:p>
              </table:table-cell>
              <table:table-cell office:value-type="float" office:value="-47.715202">
                <text:p>-47.7152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3740103">
                <text:p>6.3740103</text:p>
              </table:table-cell>
              <table:table-cell office:value-type="float" office:value="-6.3377072">
                <text:p>-6.3377072</text:p>
              </table:table-cell>
              <table:table-cell office:value-type="float" office:value="-48.578005">
                <text:p>-48.5780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3537761">
                <text:p>9.3537761</text:p>
              </table:table-cell>
              <table:table-cell office:value-type="float" office:value="-7.4419559">
                <text:p>-7.4419559</text:p>
              </table:table-cell>
              <table:table-cell office:value-type="float" office:value="-43.951635">
                <text:p>-43.9516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.6285718">
                <text:p>-2.6285718</text:p>
              </table:table-cell>
              <table:table-cell office:value-type="float" office:value="-8.0683749">
                <text:p>-8.0683749</text:p>
              </table:table-cell>
              <table:table-cell office:value-type="float" office:value="-48.719772">
                <text:p>-48.7197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.376323">
                <text:p>-3.376323</text:p>
              </table:table-cell>
              <table:table-cell office:value-type="float" office:value="-9.4863921">
                <text:p>-9.4863921</text:p>
              </table:table-cell>
              <table:table-cell office:value-type="float" office:value="-60.20399">
                <text:p>-60.203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.968859">
                <text:p>21.968859</text:p>
              </table:table-cell>
              <table:table-cell office:value-type="float" office:value="-12.552162">
                <text:p>-12.552162</text:p>
              </table:table-cell>
              <table:table-cell office:value-type="float" office:value="-71.037882">
                <text:p>-71.0378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5099573">
                <text:p>6.5099573</text:p>
              </table:table-cell>
              <table:table-cell office:value-type="float" office:value="-21.312447">
                <text:p>-21.312447</text:p>
              </table:table-cell>
              <table:table-cell office:value-type="float" office:value="-78.34674">
                <text:p>-78.346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.076963">
                <text:p>-2.076963</text:p>
              </table:table-cell>
              <table:table-cell office:value-type="float" office:value="-22.245072">
                <text:p>-22.245072</text:p>
              </table:table-cell>
              <table:table-cell office:value-type="float" office:value="-85.988804">
                <text:p>-85.9888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.4402555">
                <text:p>-2.4402555</text:p>
              </table:table-cell>
              <table:table-cell office:value-type="float" office:value="-26.368686">
                <text:p>-26.368686</text:p>
              </table:table-cell>
              <table:table-cell office:value-type="float" office:value="-82.374175">
                <text:p>-82.3741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9.5454823">
                <text:p>-9.5454823</text:p>
              </table:table-cell>
              <table:table-cell office:value-type="float" office:value="-27.400407">
                <text:p>-27.400407</text:p>
              </table:table-cell>
              <table:table-cell office:value-type="float" office:value="-84.194077">
                <text:p>-84.1940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4.9415676">
                <text:p>-4.9415676</text:p>
              </table:table-cell>
              <table:table-cell office:value-type="float" office:value="-32.663661">
                <text:p>-32.663661</text:p>
              </table:table-cell>
              <table:table-cell office:value-type="float" office:value="-92.579339">
                <text:p>-92.5793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.3259575">
                <text:p>-2.3259575</text:p>
              </table:table-cell>
              <table:table-cell office:value-type="float" office:value="-36.223894">
                <text:p>-36.223894</text:p>
              </table:table-cell>
              <table:table-cell office:value-type="float" office:value="-93.342873">
                <text:p>-93.3428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7.927955">
                <text:p>-17.927955</text:p>
              </table:table-cell>
              <table:table-cell office:value-type="float" office:value="-33.715263">
                <text:p>-33.715263</text:p>
              </table:table-cell>
              <table:table-cell office:value-type="float" office:value="-95.300261">
                <text:p>-95.3002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807087">
                <text:p>1.5807087</text:p>
              </table:table-cell>
              <table:table-cell office:value-type="float" office:value="-25.330023">
                <text:p>-25.330023</text:p>
              </table:table-cell>
              <table:table-cell office:value-type="float" office:value="-83.485205">
                <text:p>-83.4852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1614169">
                <text:p>2.1614169</text:p>
              </table:table-cell>
              <table:table-cell office:value-type="float" office:value="-22.86042">
                <text:p>-22.86042</text:p>
              </table:table-cell>
              <table:table-cell office:value-type="float" office:value="-89.036266">
                <text:p>-89.0362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236592">
                <text:p>15.236592</text:p>
              </table:table-cell>
              <table:table-cell office:value-type="float" office:value="-26.253009">
                <text:p>-26.253009</text:p>
              </table:table-cell>
              <table:table-cell office:value-type="float" office:value="-98.862796">
                <text:p>-98.8627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.1665546">
                <text:p>-3.1665546</text:p>
              </table:table-cell>
              <table:table-cell office:value-type="float" office:value="-25.999661">
                <text:p>-25.999661</text:p>
              </table:table-cell>
              <table:table-cell office:value-type="float" office:value="-114.77949">
                <text:p>-114.779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8029488">
                <text:p>3.8029488</text:p>
              </table:table-cell>
              <table:table-cell office:value-type="float" office:value="-34.603172">
                <text:p>-34.603172</text:p>
              </table:table-cell>
              <table:table-cell office:value-type="float" office:value="-107.08049">
                <text:p>-107.080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7582262">
                <text:p>5.7582262</text:p>
              </table:table-cell>
              <table:table-cell office:value-type="float" office:value="-34.341206">
                <text:p>-34.341206</text:p>
              </table:table-cell>
              <table:table-cell office:value-type="float" office:value="-105.42111">
                <text:p>-105.421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5.7633053">
                <text:p>-5.7633053</text:p>
              </table:table-cell>
              <table:table-cell office:value-type="float" office:value="-26.895719">
                <text:p>-26.895719</text:p>
              </table:table-cell>
              <table:table-cell office:value-type="float" office:value="-89.666489">
                <text:p>-89.6664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6.146555">
                <text:p>-26.146555</text:p>
              </table:table-cell>
              <table:table-cell office:value-type="float" office:value="-32.064534">
                <text:p>-32.064534</text:p>
              </table:table-cell>
              <table:table-cell office:value-type="float" office:value="-70.05453">
                <text:p>-70.054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.5336968">
                <text:p>-3.5336968</text:p>
              </table:table-cell>
              <table:table-cell office:value-type="float" office:value="-24.698869">
                <text:p>-24.698869</text:p>
              </table:table-cell>
              <table:table-cell office:value-type="float" office:value="-65.177953">
                <text:p>-65.1779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9.327957">
                <text:p>-19.327957</text:p>
              </table:table-cell>
              <table:table-cell office:value-type="float" office:value="-30.246217">
                <text:p>-30.246217</text:p>
              </table:table-cell>
              <table:table-cell office:value-type="float" office:value="-63.017767">
                <text:p>-63.0177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.963847">
                <text:p>27.963847</text:p>
              </table:table-cell>
              <table:table-cell office:value-type="float" office:value="-27.591052">
                <text:p>-27.591052</text:p>
              </table:table-cell>
              <table:table-cell office:value-type="float" office:value="-50.818783">
                <text:p>-50.8187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.0152298">
                <text:p>-2.0152298</text:p>
              </table:table-cell>
              <table:table-cell office:value-type="float" office:value="-23.172957">
                <text:p>-23.172957</text:p>
              </table:table-cell>
              <table:table-cell office:value-type="float" office:value="-43.02435">
                <text:p>-43.024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0714164">
                <text:p>0.80714164</text:p>
              </table:table-cell>
              <table:table-cell office:value-type="float" office:value="-18.583331">
                <text:p>-18.583331</text:p>
              </table:table-cell>
              <table:table-cell office:value-type="float" office:value="-33.336707">
                <text:p>-33.3367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2256637">
                <text:p>9.2256637</text:p>
              </table:table-cell>
              <table:table-cell office:value-type="float" office:value="-7.2755195">
                <text:p>-7.2755195</text:p>
              </table:table-cell>
              <table:table-cell office:value-type="float" office:value="-33.607796">
                <text:p>-33.6077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37970419">
                <text:p>-0.37970419</text:p>
              </table:table-cell>
              <table:table-cell office:value-type="float" office:value="-7.0621783">
                <text:p>-7.0621783</text:p>
              </table:table-cell>
              <table:table-cell office:value-type="float" office:value="-26.991711">
                <text:p>-26.9917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4.79314">
                <text:p>-14.79314</text:p>
              </table:table-cell>
              <table:table-cell office:value-type="float" office:value="-5.1203984">
                <text:p>-5.1203984</text:p>
              </table:table-cell>
              <table:table-cell office:value-type="float" office:value="-22.132046">
                <text:p>-22.1320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.80417">
                <text:p>17.80417</text:p>
              </table:table-cell>
              <table:table-cell office:value-type="float" office:value="-7.863755">
                <text:p>-7.863755</text:p>
              </table:table-cell>
              <table:table-cell office:value-type="float" office:value="-18.640096">
                <text:p>-18.6400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297685">
                <text:p>11.297685</text:p>
              </table:table-cell>
              <table:table-cell office:value-type="float" office:value="-5.1183375">
                <text:p>-5.1183375</text:p>
              </table:table-cell>
              <table:table-cell office:value-type="float" office:value="-11.075818">
                <text:p>-11.0758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7752374">
                <text:p>0.57752374</text:p>
              </table:table-cell>
              <table:table-cell office:value-type="float" office:value="-0.18724934">
                <text:p>-0.18724934</text:p>
              </table:table-cell>
              <table:table-cell office:value-type="float" office:value="-10.536887">
                <text:p>-10.5368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980896">
                <text:p>11.980896</text:p>
              </table:table-cell>
              <table:table-cell office:value-type="float" office:value="0.20434336">
                <text:p>0.20434336</text:p>
              </table:table-cell>
              <table:table-cell office:value-type="float" office:value="-23.615157">
                <text:p>-23.6151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9069521">
                <text:p>8.9069521</text:p>
              </table:table-cell>
              <table:table-cell office:value-type="float" office:value="-1.8416091">
                <text:p>-1.8416091</text:p>
              </table:table-cell>
              <table:table-cell office:value-type="float" office:value="-15.650192">
                <text:p>-15.6501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6317133">
                <text:p>-3.6317133</text:p>
              </table:table-cell>
              <table:table-cell office:value-type="float" office:value="-2.4055674">
                <text:p>-2.4055674</text:p>
              </table:table-cell>
              <table:table-cell office:value-type="float" office:value="-6.9606763">
                <text:p>-6.96067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916156">
                <text:p>10.916156</text:p>
              </table:table-cell>
              <table:table-cell office:value-type="float" office:value="-1.1147396">
                <text:p>-1.1147396</text:p>
              </table:table-cell>
              <table:table-cell office:value-type="float" office:value="-10.44892">
                <text:p>-10.448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.222967">
                <text:p>14.222967</text:p>
              </table:table-cell>
              <table:table-cell office:value-type="float" office:value="0.19304915">
                <text:p>0.19304915</text:p>
              </table:table-cell>
              <table:table-cell office:value-type="float" office:value="-7.6318325">
                <text:p>-7.63183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6054499">
                <text:p>0.66054499</text:p>
              </table:table-cell>
              <table:table-cell office:value-type="float" office:value="2.1135652">
                <text:p>2.1135652</text:p>
              </table:table-cell>
              <table:table-cell office:value-type="float" office:value="-2.2199565">
                <text:p>-2.21995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5392812">
                <text:p>7.5392812</text:p>
              </table:table-cell>
              <table:table-cell office:value-type="float" office:value="3.5724914">
                <text:p>3.5724914</text:p>
              </table:table-cell>
              <table:table-cell office:value-type="float" office:value="-5.2134459">
                <text:p>-5.21344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3120848">
                <text:p>9.3120848</text:p>
              </table:table-cell>
              <table:table-cell office:value-type="float" office:value="4.3322937">
                <text:p>4.3322937</text:p>
              </table:table-cell>
              <table:table-cell office:value-type="float" office:value="-4.414441">
                <text:p>-4.4144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1.704285">
                <text:p>-21.704285</text:p>
              </table:table-cell>
              <table:table-cell office:value-type="float" office:value="0.43285663">
                <text:p>0.43285663</text:p>
              </table:table-cell>
              <table:table-cell office:value-type="float" office:value="-22.118828">
                <text:p>-22.1188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1978231">
                <text:p>-2.1978231</text:p>
              </table:table-cell>
              <table:table-cell office:value-type="float" office:value="-2.7249228">
                <text:p>-2.7249228</text:p>
              </table:table-cell>
              <table:table-cell office:value-type="float" office:value="-25.508154">
                <text:p>-25.5081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8.3383314">
                <text:p>-8.3383314</text:p>
              </table:table-cell>
              <table:table-cell office:value-type="float" office:value="-6.3317683">
                <text:p>-6.3317683</text:p>
              </table:table-cell>
              <table:table-cell office:value-type="float" office:value="-23.794662">
                <text:p>-23.7946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862299">
                <text:p>11.862299</text:p>
              </table:table-cell>
              <table:table-cell office:value-type="float" office:value="-6.6418753">
                <text:p>-6.6418753</text:p>
              </table:table-cell>
              <table:table-cell office:value-type="float" office:value="-32.026084">
                <text:p>-32.026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5.579664">
                <text:p>-15.579664</text:p>
              </table:table-cell>
              <table:table-cell office:value-type="float" office:value="-7.8994973">
                <text:p>-7.8994973</text:p>
              </table:table-cell>
              <table:table-cell office:value-type="float" office:value="-32.283253">
                <text:p>-32.2832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2.351777">
                <text:p>-12.351777</text:p>
              </table:table-cell>
              <table:table-cell office:value-type="float" office:value="-7.0930185">
                <text:p>-7.0930185</text:p>
              </table:table-cell>
              <table:table-cell office:value-type="float" office:value="-25.901573">
                <text:p>-25.9015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7.63576">
                <text:p>-27.63576</text:p>
              </table:table-cell>
              <table:table-cell office:value-type="float" office:value="-8.469916">
                <text:p>-8.469916</text:p>
              </table:table-cell>
              <table:table-cell office:value-type="float" office:value="-28.926614">
                <text:p>-28.9266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973662">
                <text:p>34.973662</text:p>
              </table:table-cell>
              <table:table-cell office:value-type="float" office:value="-13.592323">
                <text:p>-13.592323</text:p>
              </table:table-cell>
              <table:table-cell office:value-type="float" office:value="-33.854019">
                <text:p>-33.8540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1832442">
                <text:p>3.1832442</text:p>
              </table:table-cell>
              <table:table-cell office:value-type="float" office:value="-22.825001">
                <text:p>-22.825001</text:p>
              </table:table-cell>
              <table:table-cell office:value-type="float" office:value="-29.512052">
                <text:p>-29.5120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6.6428334">
                <text:p>-6.6428334</text:p>
              </table:table-cell>
              <table:table-cell office:value-type="float" office:value="-23.853606">
                <text:p>-23.853606</text:p>
              </table:table-cell>
              <table:table-cell office:value-type="float" office:value="-35.352326">
                <text:p>-35.3523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.0532356">
                <text:p>-2.0532356</text:p>
              </table:table-cell>
              <table:table-cell office:value-type="float" office:value="-25.504598">
                <text:p>-25.504598</text:p>
              </table:table-cell>
              <table:table-cell office:value-type="float" office:value="-53.294461">
                <text:p>-53.2944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3699967">
                <text:p>4.3699967</text:p>
              </table:table-cell>
              <table:table-cell office:value-type="float" office:value="-27.329112">
                <text:p>-27.329112</text:p>
              </table:table-cell>
              <table:table-cell office:value-type="float" office:value="-68.777663">
                <text:p>-68.7776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7.7064767">
                <text:p>-7.7064767</text:p>
              </table:table-cell>
              <table:table-cell office:value-type="float" office:value="-27.620139">
                <text:p>-27.620139</text:p>
              </table:table-cell>
              <table:table-cell office:value-type="float" office:value="-69.408597">
                <text:p>-69.4085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5.784039">
                <text:p>-15.784039</text:p>
              </table:table-cell>
              <table:table-cell office:value-type="float" office:value="-24.474297">
                <text:p>-24.474297</text:p>
              </table:table-cell>
              <table:table-cell office:value-type="float" office:value="-62.967094">
                <text:p>-62.9670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266237">
                <text:p>1.266237</text:p>
              </table:table-cell>
              <table:table-cell office:value-type="float" office:value="-21.880007">
                <text:p>-21.880007</text:p>
              </table:table-cell>
              <table:table-cell office:value-type="float" office:value="-56.330429">
                <text:p>-56.3304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3.3499026">
                <text:p>-3.3499026</text:p>
              </table:table-cell>
              <table:table-cell office:value-type="float" office:value="-16.541824">
                <text:p>-16.541824</text:p>
              </table:table-cell>
              <table:table-cell office:value-type="float" office:value="-36.558818">
                <text:p>-36.5588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0.344827">
                <text:p>-10.344827</text:p>
              </table:table-cell>
              <table:table-cell office:value-type="float" office:value="-15.577811">
                <text:p>-15.577811</text:p>
              </table:table-cell>
              <table:table-cell office:value-type="float" office:value="-29.697796">
                <text:p>-29.6977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128248">
                <text:p>11.128248</text:p>
              </table:table-cell>
              <table:table-cell office:value-type="float" office:value="-18.926904">
                <text:p>-18.926904</text:p>
              </table:table-cell>
              <table:table-cell office:value-type="float" office:value="-27.90918">
                <text:p>-27.909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.6839945">
                <text:p>-2.6839945</text:p>
              </table:table-cell>
              <table:table-cell office:value-type="float" office:value="-19.30487">
                <text:p>-19.30487</text:p>
              </table:table-cell>
              <table:table-cell office:value-type="float" office:value="-32.099939">
                <text:p>-32.0999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5059538">
                <text:p>8.5059538</text:p>
              </table:table-cell>
              <table:table-cell office:value-type="float" office:value="-19.664905">
                <text:p>-19.664905</text:p>
              </table:table-cell>
              <table:table-cell office:value-type="float" office:value="-25.961883">
                <text:p>-25.9618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4.8079343">
                <text:p>-4.8079343</text:p>
              </table:table-cell>
              <table:table-cell office:value-type="float" office:value="-18.818894">
                <text:p>-18.818894</text:p>
              </table:table-cell>
              <table:table-cell office:value-type="float" office:value="-23.515603">
                <text:p>-23.5156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509678">
                <text:p>10.509678</text:p>
              </table:table-cell>
              <table:table-cell office:value-type="float" office:value="-12.031502">
                <text:p>-12.031502</text:p>
              </table:table-cell>
              <table:table-cell office:value-type="float" office:value="-18.152052">
                <text:p>-18.1520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.463036">
                <text:p>23.463036</text:p>
              </table:table-cell>
              <table:table-cell office:value-type="float" office:value="-5.5781478">
                <text:p>-5.5781478</text:p>
              </table:table-cell>
              <table:table-cell office:value-type="float" office:value="-22.702727">
                <text:p>-22.7027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1602234">
                <text:p>2.1602234</text:p>
              </table:table-cell>
              <table:table-cell office:value-type="float" office:value="-3.3183294">
                <text:p>-3.3183294</text:p>
              </table:table-cell>
              <table:table-cell office:value-type="float" office:value="-32.176257">
                <text:p>-32.1762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9.527276">
                <text:p>-29.527276</text:p>
              </table:table-cell>
              <table:table-cell office:value-type="float" office:value="1.4640732">
                <text:p>1.4640732</text:p>
              </table:table-cell>
              <table:table-cell office:value-type="float" office:value="-20.413069">
                <text:p>-20.4130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6564635">
                <text:p>9.6564635</text:p>
              </table:table-cell>
              <table:table-cell office:value-type="float" office:value="3.4229444">
                <text:p>3.4229444</text:p>
              </table:table-cell>
              <table:table-cell office:value-type="float" office:value="-8.1287983">
                <text:p>-8.12879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.620361">
                <text:p>27.620361</text:p>
              </table:table-cell>
              <table:table-cell office:value-type="float" office:value="3.0665459">
                <text:p>3.0665459</text:p>
              </table:table-cell>
              <table:table-cell office:value-type="float" office:value="-2.499951">
                <text:p>-2.4999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.0965472">
                <text:p>9.0965472</text:p>
              </table:table-cell>
              <table:table-cell office:value-type="float" office:value="6.9081405">
                <text:p>6.9081405</text:p>
              </table:table-cell>
              <table:table-cell office:value-type="float" office:value="-12.433428">
                <text:p>-12.4334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8.530442">
                <text:p>-18.530442</text:p>
              </table:table-cell>
              <table:table-cell office:value-type="float" office:value="10.495301">
                <text:p>10.495301</text:p>
              </table:table-cell>
              <table:table-cell office:value-type="float" office:value="-29.785972">
                <text:p>-29.7859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2736703">
                <text:p>0.22736703</text:p>
              </table:table-cell>
              <table:table-cell office:value-type="float" office:value="13.513622">
                <text:p>13.513622</text:p>
              </table:table-cell>
              <table:table-cell office:value-type="float" office:value="-26.921939">
                <text:p>-26.9219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3.919671">
                <text:p>-13.919671</text:p>
              </table:table-cell>
              <table:table-cell office:value-type="float" office:value="12.488285">
                <text:p>12.488285</text:p>
              </table:table-cell>
              <table:table-cell office:value-type="float" office:value="-19.121818">
                <text:p>-19.1218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747082">
                <text:p>10.747082</text:p>
              </table:table-cell>
              <table:table-cell office:value-type="float" office:value="12.45067">
                <text:p>12.45067</text:p>
              </table:table-cell>
              <table:table-cell office:value-type="float" office:value="-16.802452">
                <text:p>-16.8024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9993064">
                <text:p>7.9993064</text:p>
              </table:table-cell>
              <table:table-cell office:value-type="float" office:value="14.555844">
                <text:p>14.555844</text:p>
              </table:table-cell>
              <table:table-cell office:value-type="float" office:value="-15.28831">
                <text:p>-15.288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142171">
                <text:p>12.142171</text:p>
              </table:table-cell>
              <table:table-cell office:value-type="float" office:value="15.804106">
                <text:p>15.804106</text:p>
              </table:table-cell>
              <table:table-cell office:value-type="float" office:value="-26.110059">
                <text:p>-26.1100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.776328">
                <text:p>14.776328</text:p>
              </table:table-cell>
              <table:table-cell office:value-type="float" office:value="30.342871">
                <text:p>30.342871</text:p>
              </table:table-cell>
              <table:table-cell office:value-type="float" office:value="-19.733383">
                <text:p>-19.7333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5474879">
                <text:p>3.5474879</text:p>
              </table:table-cell>
              <table:table-cell office:value-type="float" office:value="32.796762">
                <text:p>32.796762</text:p>
              </table:table-cell>
              <table:table-cell office:value-type="float" office:value="-19.239905">
                <text:p>-19.2399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364909">
                <text:p>21.364909</text:p>
              </table:table-cell>
              <table:table-cell office:value-type="float" office:value="35.016057">
                <text:p>35.016057</text:p>
              </table:table-cell>
              <table:table-cell office:value-type="float" office:value="-15.373749">
                <text:p>-15.3737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5.2978415">
                <text:p>-5.2978415</text:p>
              </table:table-cell>
              <table:table-cell office:value-type="float" office:value="39.457998">
                <text:p>39.457998</text:p>
              </table:table-cell>
              <table:table-cell office:value-type="float" office:value="-10.710175">
                <text:p>-10.7101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60993482">
                <text:p>-0.60993482</text:p>
              </table:table-cell>
              <table:table-cell office:value-type="float" office:value="40.576355">
                <text:p>40.576355</text:p>
              </table:table-cell>
              <table:table-cell office:value-type="float" office:value="-9.0703909">
                <text:p>-9.07039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42848993">
                <text:p>-0.42848993</text:p>
              </table:table-cell>
              <table:table-cell office:value-type="float" office:value="37.861192">
                <text:p>37.861192</text:p>
              </table:table-cell>
              <table:table-cell office:value-type="float" office:value="-4.6057516">
                <text:p>-4.60575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95097318">
                <text:p>-0.95097318</text:p>
              </table:table-cell>
              <table:table-cell office:value-type="float" office:value="33.968685">
                <text:p>33.968685</text:p>
              </table:table-cell>
              <table:table-cell office:value-type="float" office:value="-4.2078243">
                <text:p>-4.20782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5.2011784">
                <text:p>-5.2011784</text:p>
              </table:table-cell>
              <table:table-cell office:value-type="float" office:value="27.68524">
                <text:p>27.68524</text:p>
              </table:table-cell>
              <table:table-cell office:value-type="float" office:value="5.1947353">
                <text:p>5.19473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.643549">
                <text:p>26.643549</text:p>
              </table:table-cell>
              <table:table-cell office:value-type="float" office:value="22.303495">
                <text:p>22.303495</text:p>
              </table:table-cell>
              <table:table-cell office:value-type="float" office:value="-1.6303715">
                <text:p>-1.63037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7723136">
                <text:p>5.7723136</text:p>
              </table:table-cell>
              <table:table-cell office:value-type="float" office:value="29.108653">
                <text:p>29.108653</text:p>
              </table:table-cell>
              <table:table-cell office:value-type="float" office:value="5.3045002">
                <text:p>5.30450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5.282667">
                <text:p>-15.282667</text:p>
              </table:table-cell>
              <table:table-cell office:value-type="float" office:value="32.336099">
                <text:p>32.336099</text:p>
              </table:table-cell>
              <table:table-cell office:value-type="float" office:value="14.628859">
                <text:p>14.6288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227815">
                <text:p>10.227815</text:p>
              </table:table-cell>
              <table:table-cell office:value-type="float" office:value="31.633912">
                <text:p>31.633912</text:p>
              </table:table-cell>
              <table:table-cell office:value-type="float" office:value="16.82161">
                <text:p>16.821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1693312">
                <text:p>8.1693312</text:p>
              </table:table-cell>
              <table:table-cell office:value-type="float" office:value="33.372806">
                <text:p>33.372806</text:p>
              </table:table-cell>
              <table:table-cell office:value-type="float" office:value="27.826717">
                <text:p>27.8267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5.7426702">
                <text:p>-5.7426702</text:p>
              </table:table-cell>
              <table:table-cell office:value-type="float" office:value="39.162531">
                <text:p>39.162531</text:p>
              </table:table-cell>
              <table:table-cell office:value-type="float" office:value="14.557807">
                <text:p>14.5578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.1610162">
                <text:p>-6.1610162</text:p>
              </table:table-cell>
              <table:table-cell office:value-type="float" office:value="40.295981">
                <text:p>40.295981</text:p>
              </table:table-cell>
              <table:table-cell office:value-type="float" office:value="-1.2652146">
                <text:p>-1.26521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203744">
                <text:p>11.203744</text:p>
              </table:table-cell>
              <table:table-cell office:value-type="float" office:value="34.571516">
                <text:p>34.571516</text:p>
              </table:table-cell>
              <table:table-cell office:value-type="float" office:value="8.4870277">
                <text:p>8.48702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6284428">
                <text:p>4.6284428</text:p>
              </table:table-cell>
              <table:table-cell office:value-type="float" office:value="35.088299">
                <text:p>35.088299</text:p>
              </table:table-cell>
              <table:table-cell office:value-type="float" office:value="13.766046">
                <text:p>13.7660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3421734">
                <text:p>5.3421734</text:p>
              </table:table-cell>
              <table:table-cell office:value-type="float" office:value="35.579781">
                <text:p>35.579781</text:p>
              </table:table-cell>
              <table:table-cell office:value-type="float" office:value="27.544489">
                <text:p>27.5444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8330268">
                <text:p>4.8330268</text:p>
              </table:table-cell>
              <table:table-cell office:value-type="float" office:value="35.709126">
                <text:p>35.709126</text:p>
              </table:table-cell>
              <table:table-cell office:value-type="float" office:value="26.023824">
                <text:p>26.0238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5546029">
                <text:p>2.5546029</text:p>
              </table:table-cell>
              <table:table-cell office:value-type="float" office:value="31.678585">
                <text:p>31.678585</text:p>
              </table:table-cell>
              <table:table-cell office:value-type="float" office:value="21.519375">
                <text:p>21.519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.1856642">
                <text:p>-6.1856642</text:p>
              </table:table-cell>
              <table:table-cell office:value-type="float" office:value="20.805542">
                <text:p>20.805542</text:p>
              </table:table-cell>
              <table:table-cell office:value-type="float" office:value="34.658642">
                <text:p>34.6586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5840888">
                <text:p>-2.5840888</text:p>
              </table:table-cell>
              <table:table-cell office:value-type="float" office:value="15.329085">
                <text:p>15.329085</text:p>
              </table:table-cell>
              <table:table-cell office:value-type="float" office:value="40.869744">
                <text:p>40.8697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2038">
                <text:p>0.992038</text:p>
              </table:table-cell>
              <table:table-cell office:value-type="float" office:value="13.559321">
                <text:p>13.559321</text:p>
              </table:table-cell>
              <table:table-cell office:value-type="float" office:value="50.765625">
                <text:p>50.7656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.8307513">
                <text:p>-6.8307513</text:p>
              </table:table-cell>
              <table:table-cell office:value-type="float" office:value="19.668683">
                <text:p>19.668683</text:p>
              </table:table-cell>
              <table:table-cell office:value-type="float" office:value="49.653475">
                <text:p>49.6534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601133">
                <text:p>1.601133</text:p>
              </table:table-cell>
              <table:table-cell office:value-type="float" office:value="23.688148">
                <text:p>23.688148</text:p>
              </table:table-cell>
              <table:table-cell office:value-type="float" office:value="43.350665">
                <text:p>43.3506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8602368">
                <text:p>7.8602368</text:p>
              </table:table-cell>
              <table:table-cell office:value-type="float" office:value="22.364507">
                <text:p>22.364507</text:p>
              </table:table-cell>
              <table:table-cell office:value-type="float" office:value="33.650406">
                <text:p>33.6504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6624634">
                <text:p>4.6624634</text:p>
              </table:table-cell>
              <table:table-cell office:value-type="float" office:value="17.539813">
                <text:p>17.539813</text:p>
              </table:table-cell>
              <table:table-cell office:value-type="float" office:value="35.446577">
                <text:p>35.4465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8.252581">
                <text:p>-8.252581</text:p>
              </table:table-cell>
              <table:table-cell office:value-type="float" office:value="12.955454">
                <text:p>12.955454</text:p>
              </table:table-cell>
              <table:table-cell office:value-type="float" office:value="44.221894">
                <text:p>44.2218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8235353">
                <text:p>-1.8235353</text:p>
              </table:table-cell>
              <table:table-cell office:value-type="float" office:value="15.534344">
                <text:p>15.534344</text:p>
              </table:table-cell>
              <table:table-cell office:value-type="float" office:value="38.656224">
                <text:p>38.6562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.5772085">
                <text:p>-2.5772085</text:p>
              </table:table-cell>
              <table:table-cell office:value-type="float" office:value="18.024581">
                <text:p>18.024581</text:p>
              </table:table-cell>
              <table:table-cell office:value-type="float" office:value="43.150063">
                <text:p>43.1500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644006">
                <text:p>1.6644006</text:p>
              </table:table-cell>
              <table:table-cell office:value-type="float" office:value="15.89522">
                <text:p>15.89522</text:p>
              </table:table-cell>
              <table:table-cell office:value-type="float" office:value="54.727492">
                <text:p>54.7274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7.147113">
                <text:p>-7.147113</text:p>
              </table:table-cell>
              <table:table-cell office:value-type="float" office:value="15.075465">
                <text:p>15.075465</text:p>
              </table:table-cell>
              <table:table-cell office:value-type="float" office:value="57.502428">
                <text:p>57.5024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5265194">
                <text:p>-1.5265194</text:p>
              </table:table-cell>
              <table:table-cell office:value-type="float" office:value="17.60279">
                <text:p>17.60279</text:p>
              </table:table-cell>
              <table:table-cell office:value-type="float" office:value="56.268619">
                <text:p>56.2686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556261">
                <text:p>16.556261</text:p>
              </table:table-cell>
              <table:table-cell office:value-type="float" office:value="21.046427">
                <text:p>21.046427</text:p>
              </table:table-cell>
              <table:table-cell office:value-type="float" office:value="62.150966">
                <text:p>62.1509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5.2276346">
                <text:p>-5.2276346</text:p>
              </table:table-cell>
              <table:table-cell office:value-type="float" office:value="26.976715">
                <text:p>26.976715</text:p>
              </table:table-cell>
              <table:table-cell office:value-type="float" office:value="59.417294">
                <text:p>59.4172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4.7113545">
                <text:p>-4.7113545</text:p>
              </table:table-cell>
              <table:table-cell office:value-type="float" office:value="29.892896">
                <text:p>29.892896</text:p>
              </table:table-cell>
              <table:table-cell office:value-type="float" office:value="45.027511">
                <text:p>45.0275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6058877">
                <text:p>5.6058877</text:p>
              </table:table-cell>
              <table:table-cell office:value-type="float" office:value="31.524392">
                <text:p>31.524392</text:p>
              </table:table-cell>
              <table:table-cell office:value-type="float" office:value="37.17052">
                <text:p>37.170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6.0633355">
                <text:p>-6.0633355</text:p>
              </table:table-cell>
              <table:table-cell office:value-type="float" office:value="32.620687">
                <text:p>32.620687</text:p>
              </table:table-cell>
              <table:table-cell office:value-type="float" office:value="37.07151">
                <text:p>37.071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.5839241">
                <text:p>-3.5839241</text:p>
              </table:table-cell>
              <table:table-cell office:value-type="float" office:value="33.443609">
                <text:p>33.443609</text:p>
              </table:table-cell>
              <table:table-cell office:value-type="float" office:value="40.696713">
                <text:p>40.6967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3939093">
                <text:p>-1.3939093</text:p>
              </table:table-cell>
              <table:table-cell office:value-type="float" office:value="34.715997">
                <text:p>34.715997</text:p>
              </table:table-cell>
              <table:table-cell office:value-type="float" office:value="30.111544">
                <text:p>30.1115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9826302">
                <text:p>2.9826302</text:p>
              </table:table-cell>
              <table:table-cell office:value-type="float" office:value="34.870975">
                <text:p>34.870975</text:p>
              </table:table-cell>
              <table:table-cell office:value-type="float" office:value="37.938107">
                <text:p>37.9381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2282079">
                <text:p>-1.2282079</text:p>
              </table:table-cell>
              <table:table-cell office:value-type="float" office:value="37.503923">
                <text:p>37.503923</text:p>
              </table:table-cell>
              <table:table-cell office:value-type="float" office:value="42.135816">
                <text:p>42.1358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5789099">
                <text:p>4.5789099</text:p>
              </table:table-cell>
              <table:table-cell office:value-type="float" office:value="40.206737">
                <text:p>40.206737</text:p>
              </table:table-cell>
              <table:table-cell office:value-type="float" office:value="48.918468">
                <text:p>48.9184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8.764245">
                <text:p>-8.764245</text:p>
              </table:table-cell>
              <table:table-cell office:value-type="float" office:value="43.335624">
                <text:p>43.335624</text:p>
              </table:table-cell>
              <table:table-cell office:value-type="float" office:value="50.165489">
                <text:p>50.1654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4.5300167">
                <text:p>-4.5300167</text:p>
              </table:table-cell>
              <table:table-cell office:value-type="float" office:value="39.702492">
                <text:p>39.702492</text:p>
              </table:table-cell>
              <table:table-cell office:value-type="float" office:value="55.749458">
                <text:p>55.7494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3054578">
                <text:p>7.3054578</text:p>
              </table:table-cell>
              <table:table-cell office:value-type="float" office:value="43.253674">
                <text:p>43.253674</text:p>
              </table:table-cell>
              <table:table-cell office:value-type="float" office:value="63.745744">
                <text:p>63.7457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1.455108">
                <text:p>-11.455108</text:p>
              </table:table-cell>
              <table:table-cell office:value-type="float" office:value="47.054656">
                <text:p>47.054656</text:p>
              </table:table-cell>
              <table:table-cell office:value-type="float" office:value="60.214855">
                <text:p>60.2148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.142312">
                <text:p>14.142312</text:p>
              </table:table-cell>
              <table:table-cell office:value-type="float" office:value="50.86939">
                <text:p>50.86939</text:p>
              </table:table-cell>
              <table:table-cell office:value-type="float" office:value="65.459708">
                <text:p>65.4597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.104911">
                <text:p>10.104911</text:p>
              </table:table-cell>
              <table:table-cell office:value-type="float" office:value="56.806754">
                <text:p>56.806754</text:p>
              </table:table-cell>
              <table:table-cell office:value-type="float" office:value="73.676382">
                <text:p>73.6763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.0388197">
                <text:p>-3.0388197</text:p>
              </table:table-cell>
              <table:table-cell office:value-type="float" office:value="57.274224">
                <text:p>57.274224</text:p>
              </table:table-cell>
              <table:table-cell office:value-type="float" office:value="81.208621">
                <text:p>81.2086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3158594">
                <text:p>7.3158594</text:p>
              </table:table-cell>
              <table:table-cell office:value-type="float" office:value="56.824304">
                <text:p>56.824304</text:p>
              </table:table-cell>
              <table:table-cell office:value-type="float" office:value="78.115411">
                <text:p>78.115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